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839in"/>
    </style:style>
    <style:style style:name="co3" style:family="table-column">
      <style:table-column-properties fo:break-before="auto" style:column-width="1.63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number-columns-repeated="11" table:default-cell-style-name="Default"/>
        <table:table-column table:style-name="co1" table:number-columns-repeated="2" table:default-cell-style-name="ce1"/>
        <table:table-column table:style-name="co1" table:number-columns-repeated="15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labelnois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art_date</text:p>
          </table:table-cell>
          <table:table-cell table:style-name="Default" office:value-type="string" calcext:value-type="string">
            <text:p>model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method_name</text:p>
          </table:table-cell>
          <table:table-cell office:value-type="string" calcext:value-type="string">
            <text:p>num_folds</text:p>
          </table:table-cell>
          <table:table-cell office:value-type="string" calcext:value-type="string">
            <text:p>num_test_rounds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cv_seed</text:p>
          </table:table-cell>
          <table:table-cell office:value-type="string" calcext:value-type="string">
            <text:p>commit_hash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optuna_study_id</text:p>
          </table:table-cell>
          <table:table-cell office:value-type="string" calcext:value-type="string">
            <text:p>experiment_id</text:p>
          </table:table-cell>
          <table:table-cell office:value-type="string" calcext:value-type="string">
            <text:p>start_date</text:p>
          </table:table-cell>
          <table:table-cell table:style-name="Default" office:value-type="string" calcext:value-type="string">
            <text:p>end_date</text:p>
          </table:table-cell>
          <table:table-cell table:style-name="Default" office:value-type="string" calcext:value-type="string">
            <text:p>is_complete</text:p>
          </table:table-cell>
          <table:table-cell office:value-type="string" calcext:value-type="string">
            <text:p>best_trial_number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err_msg</text:p>
          </table:table-cell>
          <table:table-cell office:value-type="string" calcext:value-type="string">
            <text:p>best_avg_train_loss</text:p>
          </table:table-cell>
          <table:table-cell office:value-type="string" calcext:value-type="string">
            <text:p>best_avg_train_loss_epoch</text:p>
          </table:table-cell>
          <table:table-cell office:value-type="string" calcext:value-type="string">
            <text:p>best_avg_val_acc</text:p>
          </table:table-cell>
          <table:table-cell office:value-type="string" calcext:value-type="string">
            <text:p>best_avg_val_acc_epoch</text:p>
          </table:table-cell>
          <table:table-cell office:value-type="string" calcext:value-type="string">
            <text:p>best_avg_val_loss</text:p>
          </table:table-cell>
          <table:table-cell office:value-type="string" calcext:value-type="string">
            <text:p>best_avg_val_loss_epoch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udy_id</text:p>
          </table:table-cell>
          <table:table-cell office:value-type="string" calcext:value-type="string">
            <text:p>final_train_loss</text:p>
          </table:table-cell>
          <table:table-cell office:value-type="string" calcext:value-type="string">
            <text:p>test_acc</text:p>
          </table:table-cell>
          <table:table-cell office:value-type="string" calcext:value-type="string">
            <text:p>test_loss</text:p>
          </table:table-cell>
          <table:table-cell office:value-type="string" calcext:value-type="string">
            <text:p>created_at</text:p>
          </table:table-cell>
          <table:table-cell table:style-name="Default"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025-11-21 13:06:17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025-11-21 13:06:17</text:p>
          </table:table-cell>
          <table:table-cell office:value-type="string" calcext:value-type="string">
            <text:p>2025-11-21 13:33:1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office:value-type="float" office:value="0.64902651309967" calcext:value-type="float">
            <text:p>0.64902651309967</text:p>
          </table:table-cell>
          <table:table-cell office:value-type="float" office:value="0.709999978542328" calcext:value-type="float">
            <text:p>0.709999978542328</text:p>
          </table:table-cell>
          <table:table-cell office:value-type="float" office:value="0.602515697479248" calcext:value-type="float">
            <text:p>0.602515697479248</text:p>
          </table:table-cell>
          <table:table-cell table:style-name="ce1" office:value-type="string" calcext:value-type="string">
            <text:p>2025-11-21 13:15:03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025-11-21 13:06:17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025-11-21 13:06:17</text:p>
          </table:table-cell>
          <table:table-cell office:value-type="string" calcext:value-type="string">
            <text:p>2025-11-21 13:33:1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62566125392914" calcext:value-type="float">
            <text:p>0.662566125392914</text:p>
          </table:table-cell>
          <table:table-cell office:value-type="float" office:value="0.7049999833107" calcext:value-type="float">
            <text:p>0.7049999833107</text:p>
          </table:table-cell>
          <table:table-cell office:value-type="float" office:value="0.600786685943604" calcext:value-type="float">
            <text:p>0.600786685943604</text:p>
          </table:table-cell>
          <table:table-cell table:style-name="ce1" office:value-type="string" calcext:value-type="string">
            <text:p>2025-11-21 13:24:02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025-11-21 13:06:17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025-11-21 13:06:17</text:p>
          </table:table-cell>
          <table:table-cell office:value-type="string" calcext:value-type="string">
            <text:p>2025-11-21 13:33:1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658422470092773" calcext:value-type="float">
            <text:p>0.658422470092773</text:p>
          </table:table-cell>
          <table:table-cell office:value-type="float" office:value="0.709999978542328" calcext:value-type="float">
            <text:p>0.709999978542328</text:p>
          </table:table-cell>
          <table:table-cell office:value-type="float" office:value="0.608744561672211" calcext:value-type="float">
            <text:p>0.608744561672211</text:p>
          </table:table-cell>
          <table:table-cell table:style-name="ce1" office:value-type="string" calcext:value-type="string">
            <text:p>2025-11-21 13:33:10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2025-11-21 13:22:33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emb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2025-11-21 13:22:33</text:p>
          </table:table-cell>
          <table:table-cell office:value-type="string" calcext:value-type="string">
            <text:p>2025-11-21 13:31:0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681584179401398" calcext:value-type="float">
            <text:p>0.681584179401398</text:p>
          </table:table-cell>
          <table:table-cell office:value-type="float" office:value="0.694999992847443" calcext:value-type="float">
            <text:p>0.694999992847443</text:p>
          </table:table-cell>
          <table:table-cell office:value-type="float" office:value="0.610999703407288" calcext:value-type="float">
            <text:p>0.610999703407288</text:p>
          </table:table-cell>
          <table:table-cell table:style-name="ce1" office:value-type="string" calcext:value-type="string">
            <text:p>2025-11-21 13:25:23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2025-11-21 13:22:33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emb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2025-11-21 13:22:33</text:p>
          </table:table-cell>
          <table:table-cell office:value-type="string" calcext:value-type="string">
            <text:p>2025-11-21 13:31:0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686414182186127" calcext:value-type="float">
            <text:p>0.686414182186127</text:p>
          </table:table-cell>
          <table:table-cell office:value-type="float" office:value="0.685000002384186" calcext:value-type="float">
            <text:p>0.685000002384186</text:p>
          </table:table-cell>
          <table:table-cell office:value-type="float" office:value="0.612401485443115" calcext:value-type="float">
            <text:p>0.612401485443115</text:p>
          </table:table-cell>
          <table:table-cell table:style-name="ce1" office:value-type="string" calcext:value-type="string">
            <text:p>2025-11-21 13:28:11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2025-11-21 13:22:33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emb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2025-11-21 13:22:33</text:p>
          </table:table-cell>
          <table:table-cell office:value-type="string" calcext:value-type="string">
            <text:p>2025-11-21 13:31:0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table:number-columns-repeated="2" office:value-type="float" office:value="8" calcext:value-type="float">
            <text:p>8</text:p>
          </table:table-cell>
          <table:table-cell office:value-type="float" office:value="0.679180383682251" calcext:value-type="float">
            <text:p>0.679180383682251</text:p>
          </table:table-cell>
          <table:table-cell office:value-type="float" office:value="0.7049999833107" calcext:value-type="float">
            <text:p>0.7049999833107</text:p>
          </table:table-cell>
          <table:table-cell office:value-type="float" office:value="0.603246152400971" calcext:value-type="float">
            <text:p>0.603246152400971</text:p>
          </table:table-cell>
          <table:table-cell table:style-name="ce1" office:value-type="string" calcext:value-type="string">
            <text:p>2025-11-21 13:31:01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2025-11-21 13:23:25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2025-11-21 13:23:25</text:p>
          </table:table-cell>
          <table:table-cell office:value-type="string" calcext:value-type="string">
            <text:p>2025-11-21 13:48:0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table:number-columns-repeated="2" office:value-type="float" office:value="9" calcext:value-type="float">
            <text:p>9</text:p>
          </table:table-cell>
          <table:table-cell office:value-type="float" office:value="0.670089781284332" calcext:value-type="float">
            <text:p>0.670089781284332</text:p>
          </table:table-cell>
          <table:table-cell office:value-type="float" office:value="0.740000009536743" calcext:value-type="float">
            <text:p>0.740000009536743</text:p>
          </table:table-cell>
          <table:table-cell office:value-type="float" office:value="0.619911730289459" calcext:value-type="float">
            <text:p>0.619911730289459</text:p>
          </table:table-cell>
          <table:table-cell table:style-name="ce1" office:value-type="string" calcext:value-type="string">
            <text:p>2025-11-21 13:31:35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2025-11-21 13:23:25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2025-11-21 13:23:25</text:p>
          </table:table-cell>
          <table:table-cell office:value-type="string" calcext:value-type="string">
            <text:p>2025-11-21 13:48:0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0.666008949279785" calcext:value-type="float">
            <text:p>0.666008949279785</text:p>
          </table:table-cell>
          <table:table-cell office:value-type="float" office:value="0.634999990463257" calcext:value-type="float">
            <text:p>0.634999990463257</text:p>
          </table:table-cell>
          <table:table-cell office:value-type="float" office:value="0.655302405357361" calcext:value-type="float">
            <text:p>0.655302405357361</text:p>
          </table:table-cell>
          <table:table-cell table:style-name="ce1" office:value-type="string" calcext:value-type="string">
            <text:p>2025-11-21 13:39:49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2025-11-21 13:23:25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2025-11-21 13:23:25</text:p>
          </table:table-cell>
          <table:table-cell office:value-type="string" calcext:value-type="string">
            <text:p>2025-11-21 13:48:0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0.674885332584381" calcext:value-type="float">
            <text:p>0.674885332584381</text:p>
          </table:table-cell>
          <table:table-cell office:value-type="float" office:value="0.644999980926514" calcext:value-type="float">
            <text:p>0.644999980926514</text:p>
          </table:table-cell>
          <table:table-cell office:value-type="float" office:value="0.633488416671753" calcext:value-type="float">
            <text:p>0.633488416671753</text:p>
          </table:table-cell>
          <table:table-cell table:style-name="ce1" office:value-type="string" calcext:value-type="string">
            <text:p>2025-11-21 13:48:04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2025-11-21 13:25:26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if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2025-11-21 13:25:26</text:p>
          </table:table-cell>
          <table:table-cell office:value-type="string" calcext:value-type="string">
            <text:p>2025-11-21 13:46:5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.677044332027435" calcext:value-type="float">
            <text:p>0.677044332027435</text:p>
          </table:table-cell>
          <table:table-cell office:value-type="float" office:value="0.670000016689301" calcext:value-type="float">
            <text:p>0.670000016689301</text:p>
          </table:table-cell>
          <table:table-cell office:value-type="float" office:value="0.638488471508026" calcext:value-type="float">
            <text:p>0.638488471508026</text:p>
          </table:table-cell>
          <table:table-cell table:style-name="ce1" office:value-type="string" calcext:value-type="string">
            <text:p>2025-11-21 13:32:32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2025-11-21 13:25:26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if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2025-11-21 13:25:26</text:p>
          </table:table-cell>
          <table:table-cell office:value-type="string" calcext:value-type="string">
            <text:p>2025-11-21 13:46:5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0.678685128688812" calcext:value-type="float">
            <text:p>0.678685128688812</text:p>
          </table:table-cell>
          <table:table-cell office:value-type="float" office:value="0.665000021457672" calcext:value-type="float">
            <text:p>0.665000021457672</text:p>
          </table:table-cell>
          <table:table-cell office:value-type="float" office:value="0.639262437820435" calcext:value-type="float">
            <text:p>0.639262437820435</text:p>
          </table:table-cell>
          <table:table-cell table:style-name="ce1" office:value-type="string" calcext:value-type="string">
            <text:p>2025-11-21 13:39:41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2025-11-21 13:25:26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if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2025-11-21 13:25:26</text:p>
          </table:table-cell>
          <table:table-cell office:value-type="string" calcext:value-type="string">
            <text:p>2025-11-21 13:46:5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0.67704975605011" calcext:value-type="float">
            <text:p>0.67704975605011</text:p>
          </table:table-cell>
          <table:table-cell office:value-type="float" office:value="0.660000026226044" calcext:value-type="float">
            <text:p>0.660000026226044</text:p>
          </table:table-cell>
          <table:table-cell office:value-type="float" office:value="0.637219667434692" calcext:value-type="float">
            <text:p>0.637219667434692</text:p>
          </table:table-cell>
          <table:table-cell table:style-name="ce1" office:value-type="string" calcext:value-type="string">
            <text:p>2025-11-21 13:46:52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2025-11-21 13:25:56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o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2025-11-21 13:25:56</text:p>
          </table:table-cell>
          <table:table-cell office:value-type="string" calcext:value-type="string">
            <text:p>2025-11-21 13:38:3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.678035736083984" calcext:value-type="float">
            <text:p>0.678035736083984</text:p>
          </table:table-cell>
          <table:table-cell office:value-type="float" office:value="0.725000023841858" calcext:value-type="float">
            <text:p>0.725000023841858</text:p>
          </table:table-cell>
          <table:table-cell office:value-type="float" office:value="0.637739658355713" calcext:value-type="float">
            <text:p>0.637739658355713</text:p>
          </table:table-cell>
          <table:table-cell table:style-name="ce1" office:value-type="string" calcext:value-type="string">
            <text:p>2025-11-21 13:30:05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2025-11-21 13:25:56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o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2025-11-21 13:25:56</text:p>
          </table:table-cell>
          <table:table-cell office:value-type="string" calcext:value-type="string">
            <text:p>2025-11-21 13:38:3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0.681146562099457" calcext:value-type="float">
            <text:p>0.681146562099457</text:p>
          </table:table-cell>
          <table:table-cell office:value-type="float" office:value="0.699999988079071" calcext:value-type="float">
            <text:p>0.699999988079071</text:p>
          </table:table-cell>
          <table:table-cell office:value-type="float" office:value="0.613180637359619" calcext:value-type="float">
            <text:p>0.613180637359619</text:p>
          </table:table-cell>
          <table:table-cell table:style-name="ce1" office:value-type="string" calcext:value-type="string">
            <text:p>2025-11-21 13:34:19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2025-11-21 13:25:56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o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2025-11-21 13:25:56</text:p>
          </table:table-cell>
          <table:table-cell office:value-type="string" calcext:value-type="string">
            <text:p>2025-11-21 13:38:3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0.676775872707367" calcext:value-type="float">
            <text:p>0.676775872707367</text:p>
          </table:table-cell>
          <table:table-cell office:value-type="float" office:value="0.7049999833107" calcext:value-type="float">
            <text:p>0.7049999833107</text:p>
          </table:table-cell>
          <table:table-cell office:value-type="float" office:value="0.635450065135956" calcext:value-type="float">
            <text:p>0.635450065135956</text:p>
          </table:table-cell>
          <table:table-cell table:style-name="ce1" office:value-type="string" calcext:value-type="string">
            <text:p>2025-11-21 13:38:36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2025-11-21 13:26:07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ub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2025-11-21 13:26:07</text:p>
          </table:table-cell>
          <table:table-cell office:value-type="string" calcext:value-type="string">
            <text:p>2025-11-21 13:40:4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672704219818115" calcext:value-type="float">
            <text:p>0.672704219818115</text:p>
          </table:table-cell>
          <table:table-cell office:value-type="float" office:value="0.610000014305115" calcext:value-type="float">
            <text:p>0.610000014305115</text:p>
          </table:table-cell>
          <table:table-cell office:value-type="float" office:value="0.656363368034363" calcext:value-type="float">
            <text:p>0.656363368034363</text:p>
          </table:table-cell>
          <table:table-cell table:style-name="ce1" office:value-type="string" calcext:value-type="string">
            <text:p>2025-11-21 13:30:29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2025-11-21 13:26:07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ub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2025-11-21 13:26:07</text:p>
          </table:table-cell>
          <table:table-cell office:value-type="string" calcext:value-type="string">
            <text:p>2025-11-21 13:40:4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0.673049211502075" calcext:value-type="float">
            <text:p>0.673049211502075</text:p>
          </table:table-cell>
          <table:table-cell office:value-type="float" office:value="0.639999985694885" calcext:value-type="float">
            <text:p>0.639999985694885</text:p>
          </table:table-cell>
          <table:table-cell office:value-type="float" office:value="0.63568389415741" calcext:value-type="float">
            <text:p>0.63568389415741</text:p>
          </table:table-cell>
          <table:table-cell table:style-name="ce1" office:value-type="string" calcext:value-type="string">
            <text:p>2025-11-21 13:35:26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2025-11-21 13:26:07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ub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2025-11-21 13:26:07</text:p>
          </table:table-cell>
          <table:table-cell office:value-type="string" calcext:value-type="string">
            <text:p>2025-11-21 13:40:4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0.659802734851837" calcext:value-type="float">
            <text:p>0.659802734851837</text:p>
          </table:table-cell>
          <table:table-cell office:value-type="float" office:value="0.654999971389771" calcext:value-type="float">
            <text:p>0.654999971389771</text:p>
          </table:table-cell>
          <table:table-cell office:value-type="float" office:value="0.635390281677246" calcext:value-type="float">
            <text:p>0.635390281677246</text:p>
          </table:table-cell>
          <table:table-cell table:style-name="ce1" office:value-type="string" calcext:value-type="string">
            <text:p>2025-11-21 13:40:41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2025-11-21 13:26:20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d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2025-11-21 13:26:20</text:p>
          </table:table-cell>
          <table:table-cell office:value-type="string" calcext:value-type="string">
            <text:p>2025-11-21 13:56:3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0.505814075469971" calcext:value-type="float">
            <text:p>0.505814075469971</text:p>
          </table:table-cell>
          <table:table-cell office:value-type="float" office:value="0.610000014305115" calcext:value-type="float">
            <text:p>0.610000014305115</text:p>
          </table:table-cell>
          <table:table-cell office:value-type="float" office:value="0.710251331329346" calcext:value-type="float">
            <text:p>0.710251331329346</text:p>
          </table:table-cell>
          <table:table-cell table:style-name="ce1" office:value-type="string" calcext:value-type="string">
            <text:p>2025-11-21 13:38:07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2025-11-21 13:26:20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d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2025-11-21 13:26:20</text:p>
          </table:table-cell>
          <table:table-cell office:value-type="string" calcext:value-type="string">
            <text:p>2025-11-21 13:56:3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0.517935514450073" calcext:value-type="float">
            <text:p>0.517935514450073</text:p>
          </table:table-cell>
          <table:table-cell office:value-type="float" office:value="0.620000004768372" calcext:value-type="float">
            <text:p>0.620000004768372</text:p>
          </table:table-cell>
          <table:table-cell office:value-type="float" office:value="0.673613131046295" calcext:value-type="float">
            <text:p>0.673613131046295</text:p>
          </table:table-cell>
          <table:table-cell table:style-name="ce1" office:value-type="string" calcext:value-type="string">
            <text:p>2025-11-21 13:48:49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2025-11-21 13:26:20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d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2025-11-21 13:26:20</text:p>
          </table:table-cell>
          <table:table-cell office:value-type="string" calcext:value-type="string">
            <text:p>2025-11-21 13:56:3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0.521332502365112" calcext:value-type="float">
            <text:p>0.521332502365112</text:p>
          </table:table-cell>
          <table:table-cell office:value-type="float" office:value="0.59500002861023" calcext:value-type="float">
            <text:p>0.59500002861023</text:p>
          </table:table-cell>
          <table:table-cell office:value-type="float" office:value="0.697772204875946" calcext:value-type="float">
            <text:p>0.697772204875946</text:p>
          </table:table-cell>
          <table:table-cell table:style-name="ce1" office:value-type="string" calcext:value-type="string">
            <text:p>2025-11-21 13:56:38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2025-11-21 13:26:40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4" calcext:value-type="float">
            <text:p>14</text:p>
          </table:table-cell>
          <table:table-cell office:value-type="float" office:value="141" calcext:value-type="float">
            <text:p>141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2025-11-21 13:26:40</text:p>
          </table:table-cell>
          <table:table-cell office:value-type="string" calcext:value-type="string">
            <text:p>2025-11-21 14:52:3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0.68505847454071" calcext:value-type="float">
            <text:p>0.68505847454071</text:p>
          </table:table-cell>
          <table:table-cell office:value-type="float" office:value="0.714999973773956" calcext:value-type="float">
            <text:p>0.714999973773956</text:p>
          </table:table-cell>
          <table:table-cell office:value-type="float" office:value="0.623379588127136" calcext:value-type="float">
            <text:p>0.623379588127136</text:p>
          </table:table-cell>
          <table:table-cell table:style-name="ce1" office:value-type="string" calcext:value-type="string">
            <text:p>2025-11-21 14:05:05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2025-11-21 13:26:40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4" calcext:value-type="float">
            <text:p>14</text:p>
          </table:table-cell>
          <table:table-cell office:value-type="float" office:value="141" calcext:value-type="float">
            <text:p>141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2025-11-21 13:26:40</text:p>
          </table:table-cell>
          <table:table-cell office:value-type="string" calcext:value-type="string">
            <text:p>2025-11-21 14:52:3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office:value-type="float" office:value="0.678566038608551" calcext:value-type="float">
            <text:p>0.678566038608551</text:p>
          </table:table-cell>
          <table:table-cell office:value-type="float" office:value="0.675000011920929" calcext:value-type="float">
            <text:p>0.675000011920929</text:p>
          </table:table-cell>
          <table:table-cell office:value-type="float" office:value="0.639461994171143" calcext:value-type="float">
            <text:p>0.639461994171143</text:p>
          </table:table-cell>
          <table:table-cell table:style-name="ce1" office:value-type="string" calcext:value-type="string">
            <text:p>2025-11-21 14:44:53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2025-11-21 13:26:40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4" calcext:value-type="float">
            <text:p>14</text:p>
          </table:table-cell>
          <table:table-cell office:value-type="float" office:value="141" calcext:value-type="float">
            <text:p>141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2025-11-21 13:26:40</text:p>
          </table:table-cell>
          <table:table-cell office:value-type="string" calcext:value-type="string">
            <text:p>2025-11-21 14:52:3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office:value-type="float" office:value="0.682533740997315" calcext:value-type="float">
            <text:p>0.682533740997315</text:p>
          </table:table-cell>
          <table:table-cell office:value-type="float" office:value="0.680000007152557" calcext:value-type="float">
            <text:p>0.680000007152557</text:p>
          </table:table-cell>
          <table:table-cell office:value-type="float" office:value="0.64331442117691" calcext:value-type="float">
            <text:p>0.64331442117691</text:p>
          </table:table-cell>
          <table:table-cell table:style-name="ce1" office:value-type="string" calcext:value-type="string">
            <text:p>2025-11-21 14:52:32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2025-11-21 13:27:10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ub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2025-11-21 13:27:10</text:p>
          </table:table-cell>
          <table:table-cell office:value-type="string" calcext:value-type="string">
            <text:p>2025-11-21 13:34:0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64315539598465" calcext:value-type="float">
            <text:p>0.64315539598465</text:p>
          </table:table-cell>
          <table:table-cell office:value-type="float" office:value="0.730000019073486" calcext:value-type="float">
            <text:p>0.730000019073486</text:p>
          </table:table-cell>
          <table:table-cell office:value-type="float" office:value="0.57262396812439" calcext:value-type="float">
            <text:p>0.57262396812439</text:p>
          </table:table-cell>
          <table:table-cell table:style-name="ce1" office:value-type="string" calcext:value-type="string">
            <text:p>2025-11-21 13:29:30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2025-11-21 13:27:10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ub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2025-11-21 13:27:10</text:p>
          </table:table-cell>
          <table:table-cell office:value-type="string" calcext:value-type="string">
            <text:p>2025-11-21 13:34:0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.63273823261261" calcext:value-type="float">
            <text:p>0.63273823261261</text:p>
          </table:table-cell>
          <table:table-cell office:value-type="float" office:value="0.7049999833107" calcext:value-type="float">
            <text:p>0.7049999833107</text:p>
          </table:table-cell>
          <table:table-cell office:value-type="float" office:value="0.56549197435379" calcext:value-type="float">
            <text:p>0.56549197435379</text:p>
          </table:table-cell>
          <table:table-cell table:style-name="ce1" office:value-type="string" calcext:value-type="string">
            <text:p>2025-11-21 13:31:40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2025-11-21 13:27:10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ub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2025-11-21 13:27:10</text:p>
          </table:table-cell>
          <table:table-cell office:value-type="string" calcext:value-type="string">
            <text:p>2025-11-21 13:34:0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648545384407044" calcext:value-type="float">
            <text:p>0.648545384407044</text:p>
          </table:table-cell>
          <table:table-cell office:value-type="float" office:value="0.730000019073486" calcext:value-type="float">
            <text:p>0.730000019073486</text:p>
          </table:table-cell>
          <table:table-cell office:value-type="float" office:value="0.56957870721817" calcext:value-type="float">
            <text:p>0.56957870721817</text:p>
          </table:table-cell>
          <table:table-cell table:style-name="ce1" office:value-type="string" calcext:value-type="string">
            <text:p>2025-11-21 13:34:04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2025-11-21 13:28:23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d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17" calcext:value-type="float">
            <text:p>17</text:p>
          </table:table-cell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2025-11-21 13:28:23</text:p>
          </table:table-cell>
          <table:table-cell office:value-type="string" calcext:value-type="string">
            <text:p>2025-11-21 13:38:3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.443283826112747" calcext:value-type="float">
            <text:p>0.443283826112747</text:p>
          </table:table-cell>
          <table:table-cell office:value-type="float" office:value="0.689999997615814" calcext:value-type="float">
            <text:p>0.689999997615814</text:p>
          </table:table-cell>
          <table:table-cell office:value-type="float" office:value="0.57955938577652" calcext:value-type="float">
            <text:p>0.57955938577652</text:p>
          </table:table-cell>
          <table:table-cell table:style-name="ce1" office:value-type="string" calcext:value-type="string">
            <text:p>2025-11-21 13:31:46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2025-11-21 13:28:23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d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17" calcext:value-type="float">
            <text:p>17</text:p>
          </table:table-cell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2025-11-21 13:28:23</text:p>
          </table:table-cell>
          <table:table-cell office:value-type="string" calcext:value-type="string">
            <text:p>2025-11-21 13:38:3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0.453774809837341" calcext:value-type="float">
            <text:p>0.453774809837341</text:p>
          </table:table-cell>
          <table:table-cell office:value-type="float" office:value="0.714999973773956" calcext:value-type="float">
            <text:p>0.714999973773956</text:p>
          </table:table-cell>
          <table:table-cell office:value-type="float" office:value="0.557618141174316" calcext:value-type="float">
            <text:p>0.557618141174316</text:p>
          </table:table-cell>
          <table:table-cell table:style-name="ce1" office:value-type="string" calcext:value-type="string">
            <text:p>2025-11-21 13:35:11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2025-11-21 13:28:23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d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17" calcext:value-type="float">
            <text:p>17</text:p>
          </table:table-cell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2025-11-21 13:28:23</text:p>
          </table:table-cell>
          <table:table-cell office:value-type="string" calcext:value-type="string">
            <text:p>2025-11-21 13:38:3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0.429568737745285" calcext:value-type="float">
            <text:p>0.429568737745285</text:p>
          </table:table-cell>
          <table:table-cell office:value-type="float" office:value="0.699999988079071" calcext:value-type="float">
            <text:p>0.699999988079071</text:p>
          </table:table-cell>
          <table:table-cell office:value-type="float" office:value="0.614361703395844" calcext:value-type="float">
            <text:p>0.614361703395844</text:p>
          </table:table-cell>
          <table:table-cell table:style-name="ce1" office:value-type="string" calcext:value-type="string">
            <text:p>2025-11-21 13:38:32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2025-11-21 13:31:06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emb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2025-11-21 13:31:06</text:p>
          </table:table-cell>
          <table:table-cell office:value-type="string" calcext:value-type="string">
            <text:p>2025-11-21 13:32:4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.650656640529633" calcext:value-type="float">
            <text:p>0.650656640529633</text:p>
          </table:table-cell>
          <table:table-cell office:value-type="float" office:value="0.740000009536743" calcext:value-type="float">
            <text:p>0.740000009536743</text:p>
          </table:table-cell>
          <table:table-cell office:value-type="float" office:value="0.57399445772171" calcext:value-type="float">
            <text:p>0.57399445772171</text:p>
          </table:table-cell>
          <table:table-cell table:style-name="ce1" office:value-type="string" calcext:value-type="string">
            <text:p>2025-11-21 13:31:39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2025-11-21 13:31:06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emb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2025-11-21 13:31:06</text:p>
          </table:table-cell>
          <table:table-cell office:value-type="string" calcext:value-type="string">
            <text:p>2025-11-21 13:32:4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0.640700161457062" calcext:value-type="float">
            <text:p>0.640700161457062</text:p>
          </table:table-cell>
          <table:table-cell office:value-type="float" office:value="0.754999995231628" calcext:value-type="float">
            <text:p>0.754999995231628</text:p>
          </table:table-cell>
          <table:table-cell office:value-type="float" office:value="0.556123852729797" calcext:value-type="float">
            <text:p>0.556123852729797</text:p>
          </table:table-cell>
          <table:table-cell table:style-name="ce1" office:value-type="string" calcext:value-type="string">
            <text:p>2025-11-21 13:32:11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2025-11-21 13:31:06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emb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2025-11-21 13:31:06</text:p>
          </table:table-cell>
          <table:table-cell office:value-type="string" calcext:value-type="string">
            <text:p>2025-11-21 13:32:4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0.652900576591492" calcext:value-type="float">
            <text:p>0.652900576591492</text:p>
          </table:table-cell>
          <table:table-cell office:value-type="float" office:value="0.7049999833107" calcext:value-type="float">
            <text:p>0.7049999833107</text:p>
          </table:table-cell>
          <table:table-cell office:value-type="float" office:value="0.568010568618774" calcext:value-type="float">
            <text:p>0.568010568618774</text:p>
          </table:table-cell>
          <table:table-cell table:style-name="ce1" office:value-type="string" calcext:value-type="string">
            <text:p>2025-11-21 13:32:44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025-11-21 13:32:4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emb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025-11-21 13:32:49</text:p>
          </table:table-cell>
          <table:table-cell office:value-type="string" calcext:value-type="string">
            <text:p>2025-11-21 13:33:5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.658001601696014" calcext:value-type="float">
            <text:p>0.658001601696014</text:p>
          </table:table-cell>
          <table:table-cell office:value-type="float" office:value="0.5" calcext:value-type="float">
            <text:p>0.5</text:p>
          </table:table-cell>
          <table:table-cell office:value-type="float" office:value="2.66598749160767" calcext:value-type="float">
            <text:p>2.66598749160767</text:p>
          </table:table-cell>
          <table:table-cell table:style-name="ce1" office:value-type="string" calcext:value-type="string">
            <text:p>2025-11-21 13:33:09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025-11-21 13:32:4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emb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025-11-21 13:32:49</text:p>
          </table:table-cell>
          <table:table-cell office:value-type="string" calcext:value-type="string">
            <text:p>2025-11-21 13:33:5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.663589060306549" calcext:value-type="float">
            <text:p>0.663589060306549</text:p>
          </table:table-cell>
          <table:table-cell office:value-type="float" office:value="0.675000011920929" calcext:value-type="float">
            <text:p>0.675000011920929</text:p>
          </table:table-cell>
          <table:table-cell office:value-type="float" office:value="0.605378329753876" calcext:value-type="float">
            <text:p>0.605378329753876</text:p>
          </table:table-cell>
          <table:table-cell table:style-name="ce1" office:value-type="string" calcext:value-type="string">
            <text:p>2025-11-21 13:33:30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025-11-21 13:32:4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emb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025-11-21 13:32:49</text:p>
          </table:table-cell>
          <table:table-cell office:value-type="string" calcext:value-type="string">
            <text:p>2025-11-21 13:33:5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office:value-type="float" office:value="19" calcext:value-type="float">
            <text:p>19</text:p>
          </table:table-cell>
          <table:table-cell office:value-type="float" office:value="0.66013365983963" calcext:value-type="float">
            <text:p>0.66013365983963</text:p>
          </table:table-cell>
          <table:table-cell office:value-type="float" office:value="0.634999990463257" calcext:value-type="float">
            <text:p>0.634999990463257</text:p>
          </table:table-cell>
          <table:table-cell office:value-type="float" office:value="0.903009116649628" calcext:value-type="float">
            <text:p>0.903009116649628</text:p>
          </table:table-cell>
          <table:table-cell table:style-name="ce1" office:value-type="string" calcext:value-type="string">
            <text:p>2025-11-21 13:33:51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2025-11-21 13:33:55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emb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2025-11-21 13:33:55</text:p>
          </table:table-cell>
          <table:table-cell office:value-type="string" calcext:value-type="string">
            <text:p>2025-11-21 13:35:2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0.609487175941467" calcext:value-type="float">
            <text:p>0.609487175941467</text:p>
          </table:table-cell>
          <table:table-cell office:value-type="float" office:value="0.75" calcext:value-type="float">
            <text:p>0.75</text:p>
          </table:table-cell>
          <table:table-cell office:value-type="float" office:value="0.545168161392212" calcext:value-type="float">
            <text:p>0.545168161392212</text:p>
          </table:table-cell>
          <table:table-cell table:style-name="ce1" office:value-type="string" calcext:value-type="string">
            <text:p>2025-11-21 13:34:25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2025-11-21 13:33:55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emb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2025-11-21 13:33:55</text:p>
          </table:table-cell>
          <table:table-cell office:value-type="string" calcext:value-type="string">
            <text:p>2025-11-21 13:35:2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0.606519341468811" calcext:value-type="float">
            <text:p>0.606519341468811</text:p>
          </table:table-cell>
          <table:table-cell office:value-type="float" office:value="0.699999988079071" calcext:value-type="float">
            <text:p>0.699999988079071</text:p>
          </table:table-cell>
          <table:table-cell office:value-type="float" office:value="0.55382764339447" calcext:value-type="float">
            <text:p>0.55382764339447</text:p>
          </table:table-cell>
          <table:table-cell table:style-name="ce1" office:value-type="string" calcext:value-type="string">
            <text:p>2025-11-21 13:34:55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2025-11-21 13:33:55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emb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2025-11-21 13:33:55</text:p>
          </table:table-cell>
          <table:table-cell office:value-type="string" calcext:value-type="string">
            <text:p>2025-11-21 13:35:2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.610752403736115" calcext:value-type="float">
            <text:p>0.610752403736115</text:p>
          </table:table-cell>
          <table:table-cell office:value-type="float" office:value="0.709999978542328" calcext:value-type="float">
            <text:p>0.709999978542328</text:p>
          </table:table-cell>
          <table:table-cell office:value-type="float" office:value="0.553930103778839" calcext:value-type="float">
            <text:p>0.553930103778839</text:p>
          </table:table-cell>
          <table:table-cell table:style-name="ce1" office:value-type="string" calcext:value-type="string">
            <text:p>2025-11-21 13:35:24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2025-11-21 13:34:12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ub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21" calcext:value-type="float">
            <text:p>21</text:p>
          </table:table-cell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2025-11-21 13:34:12</text:p>
          </table:table-cell>
          <table:table-cell office:value-type="string" calcext:value-type="string">
            <text:p>2025-11-21 13:46:45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0.58467972278595" calcext:value-type="float">
            <text:p>0.58467972278595</text:p>
          </table:table-cell>
          <table:table-cell office:value-type="float" office:value="0.689999997615814" calcext:value-type="float">
            <text:p>0.689999997615814</text:p>
          </table:table-cell>
          <table:table-cell office:value-type="float" office:value="0.559501588344574" calcext:value-type="float">
            <text:p>0.559501588344574</text:p>
          </table:table-cell>
          <table:table-cell table:style-name="ce1" office:value-type="string" calcext:value-type="string">
            <text:p>2025-11-21 13:38:24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2025-11-21 13:34:12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ub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21" calcext:value-type="float">
            <text:p>21</text:p>
          </table:table-cell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2025-11-21 13:34:12</text:p>
          </table:table-cell>
          <table:table-cell office:value-type="string" calcext:value-type="string">
            <text:p>2025-11-21 13:46:45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0.570498466491699" calcext:value-type="float">
            <text:p>0.570498466491699</text:p>
          </table:table-cell>
          <table:table-cell office:value-type="float" office:value="0.7049999833107" calcext:value-type="float">
            <text:p>0.7049999833107</text:p>
          </table:table-cell>
          <table:table-cell office:value-type="float" office:value="0.565892994403839" calcext:value-type="float">
            <text:p>0.565892994403839</text:p>
          </table:table-cell>
          <table:table-cell table:style-name="ce1" office:value-type="string" calcext:value-type="string">
            <text:p>2025-11-21 13:42:42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2025-11-21 13:34:12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ub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21" calcext:value-type="float">
            <text:p>21</text:p>
          </table:table-cell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2025-11-21 13:34:12</text:p>
          </table:table-cell>
          <table:table-cell office:value-type="string" calcext:value-type="string">
            <text:p>2025-11-21 13:46:45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0.577780187129974" calcext:value-type="float">
            <text:p>0.577780187129974</text:p>
          </table:table-cell>
          <table:table-cell office:value-type="float" office:value="0.689999997615814" calcext:value-type="float">
            <text:p>0.689999997615814</text:p>
          </table:table-cell>
          <table:table-cell office:value-type="float" office:value="0.571805596351624" calcext:value-type="float">
            <text:p>0.571805596351624</text:p>
          </table:table-cell>
          <table:table-cell table:style-name="ce1" office:value-type="string" calcext:value-type="string">
            <text:p>2025-11-21 13:46:45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2025-11-21 13:34:42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2025-11-21 13:34:43</text:p>
          </table:table-cell>
          <table:table-cell office:value-type="string" calcext:value-type="string">
            <text:p>2025-11-21 13:40:05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0.639336168766022" calcext:value-type="float">
            <text:p>0.639336168766022</text:p>
          </table:table-cell>
          <table:table-cell office:value-type="float" office:value="0.725000023841858" calcext:value-type="float">
            <text:p>0.725000023841858</text:p>
          </table:table-cell>
          <table:table-cell office:value-type="float" office:value="0.56674337387085" calcext:value-type="float">
            <text:p>0.56674337387085</text:p>
          </table:table-cell>
          <table:table-cell table:style-name="ce1" office:value-type="string" calcext:value-type="string">
            <text:p>2025-11-21 13:36:22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2025-11-21 13:34:42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2025-11-21 13:34:43</text:p>
          </table:table-cell>
          <table:table-cell office:value-type="string" calcext:value-type="string">
            <text:p>2025-11-21 13:40:05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0.663705170154572" calcext:value-type="float">
            <text:p>0.663705170154572</text:p>
          </table:table-cell>
          <table:table-cell office:value-type="float" office:value="0.629999995231628" calcext:value-type="float">
            <text:p>0.629999995231628</text:p>
          </table:table-cell>
          <table:table-cell office:value-type="float" office:value="0.653447091579437" calcext:value-type="float">
            <text:p>0.653447091579437</text:p>
          </table:table-cell>
          <table:table-cell table:style-name="ce1" office:value-type="string" calcext:value-type="string">
            <text:p>2025-11-21 13:38:12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2025-11-21 13:34:42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2025-11-21 13:34:43</text:p>
          </table:table-cell>
          <table:table-cell office:value-type="string" calcext:value-type="string">
            <text:p>2025-11-21 13:40:05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0.631765961647034" calcext:value-type="float">
            <text:p>0.631765961647034</text:p>
          </table:table-cell>
          <table:table-cell office:value-type="float" office:value="0.7049999833107" calcext:value-type="float">
            <text:p>0.7049999833107</text:p>
          </table:table-cell>
          <table:table-cell office:value-type="float" office:value="0.553019940853119" calcext:value-type="float">
            <text:p>0.553019940853119</text:p>
          </table:table-cell>
          <table:table-cell table:style-name="ce1" office:value-type="string" calcext:value-type="string">
            <text:p>2025-11-21 13:40:05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2025-11-21 13:35:2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emb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" office:value-type="string" calcext:value-type="string">
            <text:p>2025-11-21 13:35:29</text:p>
          </table:table-cell>
          <table:table-cell office:value-type="string" calcext:value-type="string">
            <text:p>2025-11-21 13:36:03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0.667547523975372" calcext:value-type="float">
            <text:p>0.667547523975372</text:p>
          </table:table-cell>
          <table:table-cell office:value-type="float" office:value="0.7049999833107" calcext:value-type="float">
            <text:p>0.7049999833107</text:p>
          </table:table-cell>
          <table:table-cell office:value-type="float" office:value="0.611406087875366" calcext:value-type="float">
            <text:p>0.611406087875366</text:p>
          </table:table-cell>
          <table:table-cell table:style-name="ce1" office:value-type="string" calcext:value-type="string">
            <text:p>2025-11-21 13:35:40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2025-11-21 13:35:2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emb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" office:value-type="string" calcext:value-type="string">
            <text:p>2025-11-21 13:35:29</text:p>
          </table:table-cell>
          <table:table-cell office:value-type="string" calcext:value-type="string">
            <text:p>2025-11-21 13:36:03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0.676635324954987" calcext:value-type="float">
            <text:p>0.676635324954987</text:p>
          </table:table-cell>
          <table:table-cell office:value-type="float" office:value="0.699999988079071" calcext:value-type="float">
            <text:p>0.699999988079071</text:p>
          </table:table-cell>
          <table:table-cell office:value-type="float" office:value="0.593011558055878" calcext:value-type="float">
            <text:p>0.593011558055878</text:p>
          </table:table-cell>
          <table:table-cell table:style-name="ce1" office:value-type="string" calcext:value-type="string">
            <text:p>2025-11-21 13:35:51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2025-11-21 13:35:2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emb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" office:value-type="string" calcext:value-type="string">
            <text:p>2025-11-21 13:35:29</text:p>
          </table:table-cell>
          <table:table-cell office:value-type="string" calcext:value-type="string">
            <text:p>2025-11-21 13:36:03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0.659444451332092" calcext:value-type="float">
            <text:p>0.659444451332092</text:p>
          </table:table-cell>
          <table:table-cell office:value-type="float" office:value="0.699999988079071" calcext:value-type="float">
            <text:p>0.699999988079071</text:p>
          </table:table-cell>
          <table:table-cell office:value-type="float" office:value="0.586921036243439" calcext:value-type="float">
            <text:p>0.586921036243439</text:p>
          </table:table-cell>
          <table:table-cell table:style-name="ce1" office:value-type="string" calcext:value-type="string">
            <text:p>2025-11-21 13:36:03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2025-11-21 13:38:40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d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2025-11-21 13:38:40</text:p>
          </table:table-cell>
          <table:table-cell office:value-type="string" calcext:value-type="string">
            <text:p>2025-11-21 13:43:5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0.517343938350678" calcext:value-type="float">
            <text:p>0.517343938350678</text:p>
          </table:table-cell>
          <table:table-cell office:value-type="float" office:value="0.745000004768372" calcext:value-type="float">
            <text:p>0.745000004768372</text:p>
          </table:table-cell>
          <table:table-cell office:value-type="float" office:value="0.511859118938446" calcext:value-type="float">
            <text:p>0.511859118938446</text:p>
          </table:table-cell>
          <table:table-cell table:style-name="ce1" office:value-type="string" calcext:value-type="string">
            <text:p>2025-11-21 13:40:21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2025-11-21 13:38:40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d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2025-11-21 13:38:40</text:p>
          </table:table-cell>
          <table:table-cell office:value-type="string" calcext:value-type="string">
            <text:p>2025-11-21 13:43:5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0.510622918605804" calcext:value-type="float">
            <text:p>0.510622918605804</text:p>
          </table:table-cell>
          <table:table-cell office:value-type="float" office:value="0.745000004768372" calcext:value-type="float">
            <text:p>0.745000004768372</text:p>
          </table:table-cell>
          <table:table-cell office:value-type="float" office:value="0.515209138393402" calcext:value-type="float">
            <text:p>0.515209138393402</text:p>
          </table:table-cell>
          <table:table-cell table:style-name="ce1" office:value-type="string" calcext:value-type="string">
            <text:p>2025-11-21 13:42:08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2025-11-21 13:38:40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d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2025-11-21 13:38:40</text:p>
          </table:table-cell>
          <table:table-cell office:value-type="string" calcext:value-type="string">
            <text:p>2025-11-21 13:43:5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0.509775519371033" calcext:value-type="float">
            <text:p>0.509775519371033</text:p>
          </table:table-cell>
          <table:table-cell office:value-type="float" office:value="0.745000004768372" calcext:value-type="float">
            <text:p>0.745000004768372</text:p>
          </table:table-cell>
          <table:table-cell office:value-type="float" office:value="0.539496123790741" calcext:value-type="float">
            <text:p>0.539496123790741</text:p>
          </table:table-cell>
          <table:table-cell table:style-name="ce1" office:value-type="string" calcext:value-type="string">
            <text:p>2025-11-21 13:43:54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2025-11-21 13:39:41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o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2025-11-21 13:39:41</text:p>
          </table:table-cell>
          <table:table-cell office:value-type="string" calcext:value-type="string">
            <text:p>2025-11-21 13:44:0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0.661296606063843" calcext:value-type="float">
            <text:p>0.661296606063843</text:p>
          </table:table-cell>
          <table:table-cell office:value-type="float" office:value="0.694999992847443" calcext:value-type="float">
            <text:p>0.694999992847443</text:p>
          </table:table-cell>
          <table:table-cell office:value-type="float" office:value="0.611268758773804" calcext:value-type="float">
            <text:p>0.611268758773804</text:p>
          </table:table-cell>
          <table:table-cell table:style-name="ce1" office:value-type="string" calcext:value-type="string">
            <text:p>2025-11-21 13:41:09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2025-11-21 13:39:41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o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2025-11-21 13:39:41</text:p>
          </table:table-cell>
          <table:table-cell office:value-type="string" calcext:value-type="string">
            <text:p>2025-11-21 13:44:0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0.678621232509613" calcext:value-type="float">
            <text:p>0.678621232509613</text:p>
          </table:table-cell>
          <table:table-cell office:value-type="float" office:value="0.7049999833107" calcext:value-type="float">
            <text:p>0.7049999833107</text:p>
          </table:table-cell>
          <table:table-cell office:value-type="float" office:value="0.635837912559509" calcext:value-type="float">
            <text:p>0.635837912559509</text:p>
          </table:table-cell>
          <table:table-cell table:style-name="ce1" office:value-type="string" calcext:value-type="string">
            <text:p>2025-11-21 13:42:37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2025-11-21 13:39:41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o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2025-11-21 13:39:41</text:p>
          </table:table-cell>
          <table:table-cell office:value-type="string" calcext:value-type="string">
            <text:p>2025-11-21 13:44:0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0.664898216724396" calcext:value-type="float">
            <text:p>0.664898216724396</text:p>
          </table:table-cell>
          <table:table-cell office:value-type="float" office:value="0.709999978542328" calcext:value-type="float">
            <text:p>0.709999978542328</text:p>
          </table:table-cell>
          <table:table-cell office:value-type="float" office:value="0.622157156467438" calcext:value-type="float">
            <text:p>0.622157156467438</text:p>
          </table:table-cell>
          <table:table-cell table:style-name="ce1" office:value-type="string" calcext:value-type="string">
            <text:p>2025-11-21 13:44:06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2025-11-21 13:40:4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ub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2025-11-21 13:40:49</text:p>
          </table:table-cell>
          <table:table-cell office:value-type="string" calcext:value-type="string">
            <text:p>2025-11-21 13:47:0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0.629933714866638" calcext:value-type="float">
            <text:p>0.629933714866638</text:p>
          </table:table-cell>
          <table:table-cell office:value-type="float" office:value="0.740000009536743" calcext:value-type="float">
            <text:p>0.740000009536743</text:p>
          </table:table-cell>
          <table:table-cell office:value-type="float" office:value="0.543152511119843" calcext:value-type="float">
            <text:p>0.543152511119843</text:p>
          </table:table-cell>
          <table:table-cell table:style-name="ce1" office:value-type="string" calcext:value-type="string">
            <text:p>2025-11-21 13:42:53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2025-11-21 13:40:4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ub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2025-11-21 13:40:49</text:p>
          </table:table-cell>
          <table:table-cell office:value-type="string" calcext:value-type="string">
            <text:p>2025-11-21 13:47:0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0.608397901058197" calcext:value-type="float">
            <text:p>0.608397901058197</text:p>
          </table:table-cell>
          <table:table-cell office:value-type="float" office:value="0.709999978542328" calcext:value-type="float">
            <text:p>0.709999978542328</text:p>
          </table:table-cell>
          <table:table-cell office:value-type="float" office:value="0.573071479797363" calcext:value-type="float">
            <text:p>0.573071479797363</text:p>
          </table:table-cell>
          <table:table-cell table:style-name="ce1" office:value-type="string" calcext:value-type="string">
            <text:p>2025-11-21 13:45:00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2025-11-21 13:40:4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ub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2025-11-21 13:40:49</text:p>
          </table:table-cell>
          <table:table-cell office:value-type="string" calcext:value-type="string">
            <text:p>2025-11-21 13:47:0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0.607883870601654" calcext:value-type="float">
            <text:p>0.607883870601654</text:p>
          </table:table-cell>
          <table:table-cell office:value-type="float" office:value="0.754999995231628" calcext:value-type="float">
            <text:p>0.754999995231628</text:p>
          </table:table-cell>
          <table:table-cell office:value-type="float" office:value="0.53605192899704" calcext:value-type="float">
            <text:p>0.53605192899704</text:p>
          </table:table-cell>
          <table:table-cell table:style-name="ce1" office:value-type="string" calcext:value-type="string">
            <text:p>2025-11-21 13:47:08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2025-11-21 13:41:38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2025-11-21 13:41:38</text:p>
          </table:table-cell>
          <table:table-cell office:value-type="string" calcext:value-type="string">
            <text:p>2025-11-21 13:50:0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0.579301536083221" calcext:value-type="float">
            <text:p>0.579301536083221</text:p>
          </table:table-cell>
          <table:table-cell office:value-type="float" office:value="0.689999997615814" calcext:value-type="float">
            <text:p>0.689999997615814</text:p>
          </table:table-cell>
          <table:table-cell office:value-type="float" office:value="0.576453566551209" calcext:value-type="float">
            <text:p>0.576453566551209</text:p>
          </table:table-cell>
          <table:table-cell table:style-name="ce1" office:value-type="string" calcext:value-type="string">
            <text:p>2025-11-21 13:44:19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2025-11-21 13:41:38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2025-11-21 13:41:38</text:p>
          </table:table-cell>
          <table:table-cell office:value-type="string" calcext:value-type="string">
            <text:p>2025-11-21 13:50:0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0.572523653507233" calcext:value-type="float">
            <text:p>0.572523653507233</text:p>
          </table:table-cell>
          <table:table-cell office:value-type="float" office:value="0.654999971389771" calcext:value-type="float">
            <text:p>0.654999971389771</text:p>
          </table:table-cell>
          <table:table-cell office:value-type="float" office:value="0.642361462116242" calcext:value-type="float">
            <text:p>0.642361462116242</text:p>
          </table:table-cell>
          <table:table-cell table:style-name="ce1" office:value-type="string" calcext:value-type="string">
            <text:p>2025-11-21 13:47:12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2025-11-21 13:41:38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2025-11-21 13:41:38</text:p>
          </table:table-cell>
          <table:table-cell office:value-type="string" calcext:value-type="string">
            <text:p>2025-11-21 13:50:0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  <table:table-cell office:value-type="float" office:value="0.569909751415253" calcext:value-type="float">
            <text:p>0.569909751415253</text:p>
          </table:table-cell>
          <table:table-cell office:value-type="float" office:value="0.610000014305115" calcext:value-type="float">
            <text:p>0.610000014305115</text:p>
          </table:table-cell>
          <table:table-cell office:value-type="float" office:value="1.13295829296112" calcext:value-type="float">
            <text:p>1.13295829296112</text:p>
          </table:table-cell>
          <table:table-cell table:style-name="ce1" office:value-type="string" calcext:value-type="string">
            <text:p>2025-11-21 13:50:09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2025-11-21 13:44:03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d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2025-11-21 13:44:03</text:p>
          </table:table-cell>
          <table:table-cell office:value-type="string" calcext:value-type="string">
            <text:p>2025-11-21 13:46:2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0.465139627456665" calcext:value-type="float">
            <text:p>0.465139627456665</text:p>
          </table:table-cell>
          <table:table-cell office:value-type="float" office:value="0.699999988079071" calcext:value-type="float">
            <text:p>0.699999988079071</text:p>
          </table:table-cell>
          <table:table-cell office:value-type="float" office:value="0.604900777339935" calcext:value-type="float">
            <text:p>0.604900777339935</text:p>
          </table:table-cell>
          <table:table-cell table:style-name="ce1" office:value-type="string" calcext:value-type="string">
            <text:p>2025-11-21 13:44:48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2025-11-21 13:44:03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d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2025-11-21 13:44:03</text:p>
          </table:table-cell>
          <table:table-cell office:value-type="string" calcext:value-type="string">
            <text:p>2025-11-21 13:46:2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0.451835036277771" calcext:value-type="float">
            <text:p>0.451835036277771</text:p>
          </table:table-cell>
          <table:table-cell office:value-type="float" office:value="0.665000021457672" calcext:value-type="float">
            <text:p>0.665000021457672</text:p>
          </table:table-cell>
          <table:table-cell office:value-type="float" office:value="0.663125991821289" calcext:value-type="float">
            <text:p>0.663125991821289</text:p>
          </table:table-cell>
          <table:table-cell table:style-name="ce1" office:value-type="string" calcext:value-type="string">
            <text:p>2025-11-21 13:45:35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2025-11-21 13:44:03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d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2025-11-21 13:44:03</text:p>
          </table:table-cell>
          <table:table-cell office:value-type="string" calcext:value-type="string">
            <text:p>2025-11-21 13:46:2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0.435840755701065" calcext:value-type="float">
            <text:p>0.435840755701065</text:p>
          </table:table-cell>
          <table:table-cell office:value-type="float" office:value="0.654999971389771" calcext:value-type="float">
            <text:p>0.654999971389771</text:p>
          </table:table-cell>
          <table:table-cell office:value-type="float" office:value="0.635787427425385" calcext:value-type="float">
            <text:p>0.635787427425385</text:p>
          </table:table-cell>
          <table:table-cell table:style-name="ce1" office:value-type="string" calcext:value-type="string">
            <text:p>2025-11-21 13:46:24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2025-11-21 13:45:12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o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2025-11-21 13:45:12</text:p>
          </table:table-cell>
          <table:table-cell office:value-type="string" calcext:value-type="string">
            <text:p>2025-11-21 13:51:2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0.584108710289002" calcext:value-type="float">
            <text:p>0.584108710289002</text:p>
          </table:table-cell>
          <table:table-cell office:value-type="float" office:value="0.665000021457672" calcext:value-type="float">
            <text:p>0.665000021457672</text:p>
          </table:table-cell>
          <table:table-cell office:value-type="float" office:value="0.571299254894257" calcext:value-type="float">
            <text:p>0.571299254894257</text:p>
          </table:table-cell>
          <table:table-cell table:style-name="ce1" office:value-type="string" calcext:value-type="string">
            <text:p>2025-11-21 13:47:14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2025-11-21 13:45:12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o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2025-11-21 13:45:12</text:p>
          </table:table-cell>
          <table:table-cell office:value-type="string" calcext:value-type="string">
            <text:p>2025-11-21 13:51:2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0.600725948810577" calcext:value-type="float">
            <text:p>0.600725948810577</text:p>
          </table:table-cell>
          <table:table-cell office:value-type="float" office:value="0.665000021457672" calcext:value-type="float">
            <text:p>0.665000021457672</text:p>
          </table:table-cell>
          <table:table-cell office:value-type="float" office:value="0.580086886882782" calcext:value-type="float">
            <text:p>0.580086886882782</text:p>
          </table:table-cell>
          <table:table-cell table:style-name="ce1" office:value-type="string" calcext:value-type="string">
            <text:p>2025-11-21 13:49:22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2025-11-21 13:45:12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o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2025-11-21 13:45:12</text:p>
          </table:table-cell>
          <table:table-cell office:value-type="string" calcext:value-type="string">
            <text:p>2025-11-21 13:51:2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0.605462551116943" calcext:value-type="float">
            <text:p>0.605462551116943</text:p>
          </table:table-cell>
          <table:table-cell office:value-type="float" office:value="0.670000016689301" calcext:value-type="float">
            <text:p>0.670000016689301</text:p>
          </table:table-cell>
          <table:table-cell office:value-type="float" office:value="0.603209137916565" calcext:value-type="float">
            <text:p>0.603209137916565</text:p>
          </table:table-cell>
          <table:table-cell table:style-name="ce1" office:value-type="string" calcext:value-type="string">
            <text:p>2025-11-21 13:51:29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2025-11-21 13:46:53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ub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30" calcext:value-type="float">
            <text:p>3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2025-11-21 13:46:53</text:p>
          </table:table-cell>
          <table:table-cell office:value-type="string" calcext:value-type="string">
            <text:p>2025-11-21 13:49:0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0.648799359798431" calcext:value-type="float">
            <text:p>0.648799359798431</text:p>
          </table:table-cell>
          <table:table-cell office:value-type="float" office:value="0.689999997615814" calcext:value-type="float">
            <text:p>0.689999997615814</text:p>
          </table:table-cell>
          <table:table-cell office:value-type="float" office:value="0.586468875408173" calcext:value-type="float">
            <text:p>0.586468875408173</text:p>
          </table:table-cell>
          <table:table-cell table:style-name="ce1" office:value-type="string" calcext:value-type="string">
            <text:p>2025-11-21 13:47:38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2025-11-21 13:46:53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ub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30" calcext:value-type="float">
            <text:p>3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2025-11-21 13:46:53</text:p>
          </table:table-cell>
          <table:table-cell office:value-type="string" calcext:value-type="string">
            <text:p>2025-11-21 13:49:0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0.644128203392029" calcext:value-type="float">
            <text:p>0.644128203392029</text:p>
          </table:table-cell>
          <table:table-cell office:value-type="float" office:value="0.709999978542328" calcext:value-type="float">
            <text:p>0.709999978542328</text:p>
          </table:table-cell>
          <table:table-cell office:value-type="float" office:value="0.583498895168304" calcext:value-type="float">
            <text:p>0.583498895168304</text:p>
          </table:table-cell>
          <table:table-cell table:style-name="ce1" office:value-type="string" calcext:value-type="string">
            <text:p>2025-11-21 13:48:21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2025-11-21 13:46:53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ub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30" calcext:value-type="float">
            <text:p>3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2025-11-21 13:46:53</text:p>
          </table:table-cell>
          <table:table-cell office:value-type="string" calcext:value-type="string">
            <text:p>2025-11-21 13:49:0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0.650080502033234" calcext:value-type="float">
            <text:p>0.650080502033234</text:p>
          </table:table-cell>
          <table:table-cell office:value-type="float" office:value="0.600000023841858" calcext:value-type="float">
            <text:p>0.600000023841858</text:p>
          </table:table-cell>
          <table:table-cell office:value-type="float" office:value="0.670814275741577" calcext:value-type="float">
            <text:p>0.670814275741577</text:p>
          </table:table-cell>
          <table:table-cell table:style-name="ce1" office:value-type="string" calcext:value-type="string">
            <text:p>2025-11-21 13:49:04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2025-11-21 13:47:57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if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2025-11-21 13:47:57</text:p>
          </table:table-cell>
          <table:table-cell office:value-type="string" calcext:value-type="string">
            <text:p>2025-11-21 13:52:0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0.666743099689484" calcext:value-type="float">
            <text:p>0.666743099689484</text:p>
          </table:table-cell>
          <table:table-cell office:value-type="float" office:value="0.7049999833107" calcext:value-type="float">
            <text:p>0.7049999833107</text:p>
          </table:table-cell>
          <table:table-cell office:value-type="float" office:value="0.631343424320221" calcext:value-type="float">
            <text:p>0.631343424320221</text:p>
          </table:table-cell>
          <table:table-cell table:style-name="ce1" office:value-type="string" calcext:value-type="string">
            <text:p>2025-11-21 13:49:19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2025-11-21 13:47:57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if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2025-11-21 13:47:57</text:p>
          </table:table-cell>
          <table:table-cell office:value-type="string" calcext:value-type="string">
            <text:p>2025-11-21 13:52:0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0.661508917808533" calcext:value-type="float">
            <text:p>0.661508917808533</text:p>
          </table:table-cell>
          <table:table-cell office:value-type="float" office:value="0.735000014305115" calcext:value-type="float">
            <text:p>0.735000014305115</text:p>
          </table:table-cell>
          <table:table-cell office:value-type="float" office:value="0.59715861082077" calcext:value-type="float">
            <text:p>0.59715861082077</text:p>
          </table:table-cell>
          <table:table-cell table:style-name="ce1" office:value-type="string" calcext:value-type="string">
            <text:p>2025-11-21 13:50:43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2025-11-21 13:47:57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if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2025-11-21 13:47:57</text:p>
          </table:table-cell>
          <table:table-cell office:value-type="string" calcext:value-type="string">
            <text:p>2025-11-21 13:52:0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 office:value-type="float" office:value="0.694683253765106" calcext:value-type="float">
            <text:p>0.694683253765106</text:p>
          </table:table-cell>
          <table:table-cell office:value-type="float" office:value="0.5" calcext:value-type="float">
            <text:p>0.5</text:p>
          </table:table-cell>
          <table:table-cell office:value-type="float" office:value="0.693794548511505" calcext:value-type="float">
            <text:p>0.693794548511505</text:p>
          </table:table-cell>
          <table:table-cell table:style-name="ce1" office:value-type="string" calcext:value-type="string">
            <text:p>2025-11-21 13:52:07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2025-11-21 13:48:0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2025-11-21 13:48:09</text:p>
          </table:table-cell>
          <table:table-cell office:value-type="string" calcext:value-type="string">
            <text:p>2025-11-21 14:00:1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  <table:table-cell office:value-type="float" office:value="0.694562673568726" calcext:value-type="float">
            <text:p>0.694562673568726</text:p>
          </table:table-cell>
          <table:table-cell office:value-type="float" office:value="0.5" calcext:value-type="float">
            <text:p>0.5</text:p>
          </table:table-cell>
          <table:table-cell office:value-type="float" office:value="0.693189144134522" calcext:value-type="float">
            <text:p>0.693189144134522</text:p>
          </table:table-cell>
          <table:table-cell table:style-name="ce1" office:value-type="string" calcext:value-type="string">
            <text:p>2025-11-21 13:52:08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2025-11-21 13:48:0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2025-11-21 13:48:09</text:p>
          </table:table-cell>
          <table:table-cell office:value-type="string" calcext:value-type="string">
            <text:p>2025-11-21 14:00:1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0.668797731399536" calcext:value-type="float">
            <text:p>0.668797731399536</text:p>
          </table:table-cell>
          <table:table-cell office:value-type="float" office:value="0.72000002861023" calcext:value-type="float">
            <text:p>0.72000002861023</text:p>
          </table:table-cell>
          <table:table-cell office:value-type="float" office:value="0.570080518722534" calcext:value-type="float">
            <text:p>0.570080518722534</text:p>
          </table:table-cell>
          <table:table-cell table:style-name="ce1" office:value-type="string" calcext:value-type="string">
            <text:p>2025-11-21 13:56:10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2025-11-21 13:48:0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2025-11-21 13:48:09</text:p>
          </table:table-cell>
          <table:table-cell office:value-type="string" calcext:value-type="string">
            <text:p>2025-11-21 14:00:1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0.685410678386688" calcext:value-type="float">
            <text:p>0.685410678386688</text:p>
          </table:table-cell>
          <table:table-cell office:value-type="float" office:value="0.644999980926514" calcext:value-type="float">
            <text:p>0.644999980926514</text:p>
          </table:table-cell>
          <table:table-cell office:value-type="float" office:value="0.653746247291565" calcext:value-type="float">
            <text:p>0.653746247291565</text:p>
          </table:table-cell>
          <table:table-cell table:style-name="ce1" office:value-type="string" calcext:value-type="string">
            <text:p>2025-11-21 14:00:12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2025-11-21 13:51:42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2025-11-21 13:51:42</text:p>
          </table:table-cell>
          <table:table-cell office:value-type="string" calcext:value-type="string">
            <text:p>2025-11-21 13:57:53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0.60045462846756" calcext:value-type="float">
            <text:p>0.60045462846756</text:p>
          </table:table-cell>
          <table:table-cell office:value-type="float" office:value="0.714999973773956" calcext:value-type="float">
            <text:p>0.714999973773956</text:p>
          </table:table-cell>
          <table:table-cell office:value-type="float" office:value="0.53842031955719" calcext:value-type="float">
            <text:p>0.53842031955719</text:p>
          </table:table-cell>
          <table:table-cell table:style-name="ce1" office:value-type="string" calcext:value-type="string">
            <text:p>2025-11-21 13:53:36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2025-11-21 13:51:42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2025-11-21 13:51:42</text:p>
          </table:table-cell>
          <table:table-cell office:value-type="string" calcext:value-type="string">
            <text:p>2025-11-21 13:57:53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office:value-type="float" office:value="0.593794286251068" calcext:value-type="float">
            <text:p>0.593794286251068</text:p>
          </table:table-cell>
          <table:table-cell office:value-type="float" office:value="0.75" calcext:value-type="float">
            <text:p>0.75</text:p>
          </table:table-cell>
          <table:table-cell office:value-type="float" office:value="0.539519369602203" calcext:value-type="float">
            <text:p>0.539519369602203</text:p>
          </table:table-cell>
          <table:table-cell table:style-name="ce1" office:value-type="string" calcext:value-type="string">
            <text:p>2025-11-21 13:55:40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2025-11-21 13:51:42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2025-11-21 13:51:42</text:p>
          </table:table-cell>
          <table:table-cell office:value-type="string" calcext:value-type="string">
            <text:p>2025-11-21 13:57:53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office:value-type="float" office:value="0.593478202819824" calcext:value-type="float">
            <text:p>0.593478202819824</text:p>
          </table:table-cell>
          <table:table-cell office:value-type="float" office:value="0.72000002861023" calcext:value-type="float">
            <text:p>0.72000002861023</text:p>
          </table:table-cell>
          <table:table-cell office:value-type="float" office:value="0.552324414253235" calcext:value-type="float">
            <text:p>0.552324414253235</text:p>
          </table:table-cell>
          <table:table-cell table:style-name="ce1" office:value-type="string" calcext:value-type="string">
            <text:p>2025-11-21 13:57:52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2025-11-21 13:52:34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o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2025-11-21 13:52:34</text:p>
          </table:table-cell>
          <table:table-cell office:value-type="string" calcext:value-type="string">
            <text:p>2025-11-21 13:57:1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  <table:table-cell office:value-type="float" office:value="0.652945935726166" calcext:value-type="float">
            <text:p>0.652945935726166</text:p>
          </table:table-cell>
          <table:table-cell office:value-type="float" office:value="0.7049999833107" calcext:value-type="float">
            <text:p>0.7049999833107</text:p>
          </table:table-cell>
          <table:table-cell office:value-type="float" office:value="0.608151853084564" calcext:value-type="float">
            <text:p>0.608151853084564</text:p>
          </table:table-cell>
          <table:table-cell table:style-name="ce1" office:value-type="string" calcext:value-type="string">
            <text:p>2025-11-21 13:54:07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2025-11-21 13:52:34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o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2025-11-21 13:52:34</text:p>
          </table:table-cell>
          <table:table-cell office:value-type="string" calcext:value-type="string">
            <text:p>2025-11-21 13:57:1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office:value-type="float" office:value="0.645522177219391" calcext:value-type="float">
            <text:p>0.645522177219391</text:p>
          </table:table-cell>
          <table:table-cell office:value-type="float" office:value="0.685000002384186" calcext:value-type="float">
            <text:p>0.685000002384186</text:p>
          </table:table-cell>
          <table:table-cell office:value-type="float" office:value="0.603280305862427" calcext:value-type="float">
            <text:p>0.603280305862427</text:p>
          </table:table-cell>
          <table:table-cell table:style-name="ce1" office:value-type="string" calcext:value-type="string">
            <text:p>2025-11-21 13:55:43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2025-11-21 13:52:34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o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2025-11-21 13:52:34</text:p>
          </table:table-cell>
          <table:table-cell office:value-type="string" calcext:value-type="string">
            <text:p>2025-11-21 13:57:1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0.639905393123627" calcext:value-type="float">
            <text:p>0.639905393123627</text:p>
          </table:table-cell>
          <table:table-cell office:value-type="float" office:value="0.680000007152557" calcext:value-type="float">
            <text:p>0.680000007152557</text:p>
          </table:table-cell>
          <table:table-cell office:value-type="float" office:value="0.604911506175995" calcext:value-type="float">
            <text:p>0.604911506175995</text:p>
          </table:table-cell>
          <table:table-cell table:style-name="ce1" office:value-type="string" calcext:value-type="string">
            <text:p>2025-11-21 13:57:18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2025-11-21 13:53:12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if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2025-11-21 13:53:12</text:p>
          </table:table-cell>
          <table:table-cell office:value-type="string" calcext:value-type="string">
            <text:p>2025-11-21 13:59:5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0.637387752532959" calcext:value-type="float">
            <text:p>0.637387752532959</text:p>
          </table:table-cell>
          <table:table-cell office:value-type="float" office:value="0.670000016689301" calcext:value-type="float">
            <text:p>0.670000016689301</text:p>
          </table:table-cell>
          <table:table-cell office:value-type="float" office:value="0.599240601062775" calcext:value-type="float">
            <text:p>0.599240601062775</text:p>
          </table:table-cell>
          <table:table-cell table:style-name="ce1" office:value-type="string" calcext:value-type="string">
            <text:p>2025-11-21 13:55:25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2025-11-21 13:53:12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if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2025-11-21 13:53:12</text:p>
          </table:table-cell>
          <table:table-cell office:value-type="string" calcext:value-type="string">
            <text:p>2025-11-21 13:59:5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office:value-type="float" office:value="0.6460902094841" calcext:value-type="float">
            <text:p>0.6460902094841</text:p>
          </table:table-cell>
          <table:table-cell office:value-type="float" office:value="0.654999971389771" calcext:value-type="float">
            <text:p>0.654999971389771</text:p>
          </table:table-cell>
          <table:table-cell office:value-type="float" office:value="0.594153225421906" calcext:value-type="float">
            <text:p>0.594153225421906</text:p>
          </table:table-cell>
          <table:table-cell table:style-name="ce1" office:value-type="string" calcext:value-type="string">
            <text:p>2025-11-21 13:57:40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2025-11-21 13:53:12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if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2025-11-21 13:53:12</text:p>
          </table:table-cell>
          <table:table-cell office:value-type="string" calcext:value-type="string">
            <text:p>2025-11-21 13:59:5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office:value-type="float" office:value="35" calcext:value-type="float">
            <text:p>35</text:p>
          </table:table-cell>
          <table:table-cell office:value-type="float" office:value="0.635269403457642" calcext:value-type="float">
            <text:p>0.635269403457642</text:p>
          </table:table-cell>
          <table:table-cell office:value-type="float" office:value="0.670000016689301" calcext:value-type="float">
            <text:p>0.670000016689301</text:p>
          </table:table-cell>
          <table:table-cell office:value-type="float" office:value="0.585166573524475" calcext:value-type="float">
            <text:p>0.585166573524475</text:p>
          </table:table-cell>
          <table:table-cell table:style-name="ce1" office:value-type="string" calcext:value-type="string">
            <text:p>2025-11-21 13:59:57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2025-11-21 13:58:24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o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2025-11-21 13:58:24</text:p>
          </table:table-cell>
          <table:table-cell office:value-type="string" calcext:value-type="string">
            <text:p>2025-11-21 14:02:0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0.672932744026184" calcext:value-type="float">
            <text:p>0.672932744026184</text:p>
          </table:table-cell>
          <table:table-cell office:value-type="float" office:value="0.615000009536743" calcext:value-type="float">
            <text:p>0.615000009536743</text:p>
          </table:table-cell>
          <table:table-cell office:value-type="float" office:value="0.633360147476196" calcext:value-type="float">
            <text:p>0.633360147476196</text:p>
          </table:table-cell>
          <table:table-cell table:style-name="ce1" office:value-type="string" calcext:value-type="string">
            <text:p>2025-11-21 13:59:39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2025-11-21 13:58:24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o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2025-11-21 13:58:24</text:p>
          </table:table-cell>
          <table:table-cell office:value-type="string" calcext:value-type="string">
            <text:p>2025-11-21 14:02:0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83" calcext:value-type="float">
            <text:p>83</text:p>
          </table:table-cell>
          <table:table-cell office:value-type="float" office:value="37" calcext:value-type="float">
            <text:p>37</text:p>
          </table:table-cell>
          <table:table-cell office:value-type="float" office:value="0.669256031513214" calcext:value-type="float">
            <text:p>0.669256031513214</text:p>
          </table:table-cell>
          <table:table-cell office:value-type="float" office:value="0.620000004768372" calcext:value-type="float">
            <text:p>0.620000004768372</text:p>
          </table:table-cell>
          <table:table-cell office:value-type="float" office:value="0.629093885421753" calcext:value-type="float">
            <text:p>0.629093885421753</text:p>
          </table:table-cell>
          <table:table-cell table:style-name="ce1" office:value-type="string" calcext:value-type="string">
            <text:p>2025-11-21 14:00:53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2025-11-21 13:58:24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o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2025-11-21 13:58:24</text:p>
          </table:table-cell>
          <table:table-cell office:value-type="string" calcext:value-type="string">
            <text:p>2025-11-21 14:02:0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85" calcext:value-type="float">
            <text:p>85</text:p>
          </table:table-cell>
          <table:table-cell office:value-type="float" office:value="37" calcext:value-type="float">
            <text:p>37</text:p>
          </table:table-cell>
          <table:table-cell office:value-type="float" office:value="0.672132015228272" calcext:value-type="float">
            <text:p>0.672132015228272</text:p>
          </table:table-cell>
          <table:table-cell office:value-type="float" office:value="0.680000007152557" calcext:value-type="float">
            <text:p>0.680000007152557</text:p>
          </table:table-cell>
          <table:table-cell office:value-type="float" office:value="0.626013994216919" calcext:value-type="float">
            <text:p>0.626013994216919</text:p>
          </table:table-cell>
          <table:table-cell table:style-name="ce1" office:value-type="string" calcext:value-type="string">
            <text:p>2025-11-21 14:02:08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2025-11-21 13:59:26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2025-11-21 13:59:26</text:p>
          </table:table-cell>
          <table:table-cell office:value-type="string" calcext:value-type="string">
            <text:p>2025-11-21 14:05:3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  <table:table-cell office:value-type="float" office:value="0.610476851463318" calcext:value-type="float">
            <text:p>0.610476851463318</text:p>
          </table:table-cell>
          <table:table-cell office:value-type="float" office:value="0.709999978542328" calcext:value-type="float">
            <text:p>0.709999978542328</text:p>
          </table:table-cell>
          <table:table-cell office:value-type="float" office:value="0.58909273147583" calcext:value-type="float">
            <text:p>0.58909273147583</text:p>
          </table:table-cell>
          <table:table-cell table:style-name="ce1" office:value-type="string" calcext:value-type="string">
            <text:p>2025-11-21 14:01:21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2025-11-21 13:59:26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2025-11-21 13:59:26</text:p>
          </table:table-cell>
          <table:table-cell office:value-type="string" calcext:value-type="string">
            <text:p>2025-11-21 14:05:3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0.607360064983368" calcext:value-type="float">
            <text:p>0.607360064983368</text:p>
          </table:table-cell>
          <table:table-cell office:value-type="float" office:value="0.680000007152557" calcext:value-type="float">
            <text:p>0.680000007152557</text:p>
          </table:table-cell>
          <table:table-cell office:value-type="float" office:value="0.587706983089447" calcext:value-type="float">
            <text:p>0.587706983089447</text:p>
          </table:table-cell>
          <table:table-cell table:style-name="ce1" office:value-type="string" calcext:value-type="string">
            <text:p>2025-11-21 14:03:26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2025-11-21 13:59:26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2025-11-21 13:59:26</text:p>
          </table:table-cell>
          <table:table-cell office:value-type="string" calcext:value-type="string">
            <text:p>2025-11-21 14:05:3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  <table:table-cell office:value-type="float" office:value="0.601699829101563" calcext:value-type="float">
            <text:p>0.601699829101563</text:p>
          </table:table-cell>
          <table:table-cell office:value-type="float" office:value="0.699999988079071" calcext:value-type="float">
            <text:p>0.699999988079071</text:p>
          </table:table-cell>
          <table:table-cell office:value-type="float" office:value="0.569583714008331" calcext:value-type="float">
            <text:p>0.569583714008331</text:p>
          </table:table-cell>
          <table:table-cell table:style-name="ce1" office:value-type="string" calcext:value-type="string">
            <text:p>2025-11-21 14:05:34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2025-11-21 14:00:17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39" calcext:value-type="float">
            <text:p>39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2025-11-21 14:00:17</text:p>
          </table:table-cell>
          <table:table-cell office:value-type="string" calcext:value-type="string">
            <text:p>2025-11-21 14:09:1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office:value-type="float" office:value="0.64312356710434" calcext:value-type="float">
            <text:p>0.64312356710434</text:p>
          </table:table-cell>
          <table:table-cell office:value-type="float" office:value="0.694999992847443" calcext:value-type="float">
            <text:p>0.694999992847443</text:p>
          </table:table-cell>
          <table:table-cell office:value-type="float" office:value="0.598258852958679" calcext:value-type="float">
            <text:p>0.598258852958679</text:p>
          </table:table-cell>
          <table:table-cell table:style-name="ce1" office:value-type="string" calcext:value-type="string">
            <text:p>2025-11-21 14:03:13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2025-11-21 14:00:17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39" calcext:value-type="float">
            <text:p>39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2025-11-21 14:00:17</text:p>
          </table:table-cell>
          <table:table-cell office:value-type="string" calcext:value-type="string">
            <text:p>2025-11-21 14:09:1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 office:value-type="float" office:value="0.638217926025391" calcext:value-type="float">
            <text:p>0.638217926025391</text:p>
          </table:table-cell>
          <table:table-cell office:value-type="float" office:value="0.550000011920929" calcext:value-type="float">
            <text:p>0.550000011920929</text:p>
          </table:table-cell>
          <table:table-cell office:value-type="float" office:value="0.690045118331909" calcext:value-type="float">
            <text:p>0.690045118331909</text:p>
          </table:table-cell>
          <table:table-cell table:style-name="ce1" office:value-type="string" calcext:value-type="string">
            <text:p>2025-11-21 14:06:13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2025-11-21 14:00:17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39" calcext:value-type="float">
            <text:p>39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2025-11-21 14:00:17</text:p>
          </table:table-cell>
          <table:table-cell office:value-type="string" calcext:value-type="string">
            <text:p>2025-11-21 14:09:1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95" calcext:value-type="float">
            <text:p>95</text:p>
          </table:table-cell>
          <table:table-cell office:value-type="float" office:value="39" calcext:value-type="float">
            <text:p>39</text:p>
          </table:table-cell>
          <table:table-cell office:value-type="float" office:value="0.637110531330109" calcext:value-type="float">
            <text:p>0.637110531330109</text:p>
          </table:table-cell>
          <table:table-cell office:value-type="float" office:value="0.709999978542328" calcext:value-type="float">
            <text:p>0.709999978542328</text:p>
          </table:table-cell>
          <table:table-cell office:value-type="float" office:value="0.564504981040955" calcext:value-type="float">
            <text:p>0.564504981040955</text:p>
          </table:table-cell>
          <table:table-cell table:style-name="ce1" office:value-type="string" calcext:value-type="string">
            <text:p>2025-11-21 14:09:10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2025-11-21 14:01:03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if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2025-11-21 14:01:03</text:p>
          </table:table-cell>
          <table:table-cell office:value-type="string" calcext:value-type="string">
            <text:p>2025-11-21 14:06:0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0.654961585998535" calcext:value-type="float">
            <text:p>0.654961585998535</text:p>
          </table:table-cell>
          <table:table-cell office:value-type="float" office:value="0.7049999833107" calcext:value-type="float">
            <text:p>0.7049999833107</text:p>
          </table:table-cell>
          <table:table-cell office:value-type="float" office:value="0.556785881519318" calcext:value-type="float">
            <text:p>0.556785881519318</text:p>
          </table:table-cell>
          <table:table-cell table:style-name="ce1" office:value-type="string" calcext:value-type="string">
            <text:p>2025-11-21 14:02:43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2025-11-21 14:01:03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if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2025-11-21 14:01:03</text:p>
          </table:table-cell>
          <table:table-cell office:value-type="string" calcext:value-type="string">
            <text:p>2025-11-21 14:06:0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</text:p>
          </table:table-cell>
          <table:table-cell office:value-type="float" office:value="0.64681613445282" calcext:value-type="float">
            <text:p>0.64681613445282</text:p>
          </table:table-cell>
          <table:table-cell office:value-type="float" office:value="0.709999978542328" calcext:value-type="float">
            <text:p>0.709999978542328</text:p>
          </table:table-cell>
          <table:table-cell office:value-type="float" office:value="0.56688779592514" calcext:value-type="float">
            <text:p>0.56688779592514</text:p>
          </table:table-cell>
          <table:table-cell table:style-name="ce1" office:value-type="string" calcext:value-type="string">
            <text:p>2025-11-21 14:04:26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2025-11-21 14:01:03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if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2025-11-21 14:01:03</text:p>
          </table:table-cell>
          <table:table-cell office:value-type="string" calcext:value-type="string">
            <text:p>2025-11-21 14:06:0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92" calcext:value-type="float">
            <text:p>92</text:p>
          </table:table-cell>
          <table:table-cell office:value-type="float" office:value="40" calcext:value-type="float">
            <text:p>40</text:p>
          </table:table-cell>
          <table:table-cell office:value-type="float" office:value="0.640722334384918" calcext:value-type="float">
            <text:p>0.640722334384918</text:p>
          </table:table-cell>
          <table:table-cell office:value-type="float" office:value="0.734999895095825" calcext:value-type="float">
            <text:p>0.734999895095825</text:p>
          </table:table-cell>
          <table:table-cell office:value-type="float" office:value="0.560526847839356" calcext:value-type="float">
            <text:p>0.560526847839356</text:p>
          </table:table-cell>
          <table:table-cell table:style-name="ce1" office:value-type="string" calcext:value-type="string">
            <text:p>2025-11-21 14:06:09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2025-11-21 14:07:14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if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2025-11-21 14:07:14</text:p>
          </table:table-cell>
          <table:table-cell office:value-type="string" calcext:value-type="string">
            <text:p>2025-11-21 14:10:1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office:value-type="float" office:value="0.647014558315277" calcext:value-type="float">
            <text:p>0.647014558315277</text:p>
          </table:table-cell>
          <table:table-cell office:value-type="float" office:value="0.694999992847443" calcext:value-type="float">
            <text:p>0.694999992847443</text:p>
          </table:table-cell>
          <table:table-cell office:value-type="float" office:value="0.611290156841278" calcext:value-type="float">
            <text:p>0.611290156841278</text:p>
          </table:table-cell>
          <table:table-cell table:style-name="ce1" office:value-type="string" calcext:value-type="string">
            <text:p>2025-11-21 14:08:14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2025-11-21 14:07:14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if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2025-11-21 14:07:14</text:p>
          </table:table-cell>
          <table:table-cell office:value-type="string" calcext:value-type="string">
            <text:p>2025-11-21 14:10:1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office:value-type="float" office:value="0.644565880298615" calcext:value-type="float">
            <text:p>0.644565880298615</text:p>
          </table:table-cell>
          <table:table-cell office:value-type="float" office:value="0.7049999833107" calcext:value-type="float">
            <text:p>0.7049999833107</text:p>
          </table:table-cell>
          <table:table-cell office:value-type="float" office:value="0.584168672561646" calcext:value-type="float">
            <text:p>0.584168672561646</text:p>
          </table:table-cell>
          <table:table-cell table:style-name="ce1" office:value-type="string" calcext:value-type="string">
            <text:p>2025-11-21 14:09:17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2025-11-21 14:07:14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if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2025-11-21 14:07:14</text:p>
          </table:table-cell>
          <table:table-cell office:value-type="string" calcext:value-type="string">
            <text:p>2025-11-21 14:10:1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97" calcext:value-type="float">
            <text:p>97</text:p>
          </table:table-cell>
          <table:table-cell office:value-type="float" office:value="41" calcext:value-type="float">
            <text:p>41</text:p>
          </table:table-cell>
          <table:table-cell office:value-type="float" office:value="0.646757662296295" calcext:value-type="float">
            <text:p>0.646757662296295</text:p>
          </table:table-cell>
          <table:table-cell office:value-type="float" office:value="0.7049999833107" calcext:value-type="float">
            <text:p>0.7049999833107</text:p>
          </table:table-cell>
          <table:table-cell office:value-type="float" office:value="0.579535841941834" calcext:value-type="float">
            <text:p>0.579535841941834</text:p>
          </table:table-cell>
          <table:table-cell table:style-name="ce1" office:value-type="string" calcext:value-type="string">
            <text:p>2025-11-21 14:10:19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2025-11-21 14:09:15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2025-11-21 14:09:15</text:p>
          </table:table-cell>
          <table:table-cell office:value-type="string" calcext:value-type="string">
            <text:p>2025-11-21 14:23:4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0.644692242145538" calcext:value-type="float">
            <text:p>0.644692242145538</text:p>
          </table:table-cell>
          <table:table-cell office:value-type="float" office:value="0.740000009536743" calcext:value-type="float">
            <text:p>0.740000009536743</text:p>
          </table:table-cell>
          <table:table-cell office:value-type="float" office:value="0.544701278209686" calcext:value-type="float">
            <text:p>0.544701278209686</text:p>
          </table:table-cell>
          <table:table-cell table:style-name="ce1" office:value-type="string" calcext:value-type="string">
            <text:p>2025-11-21 14:14:01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2025-11-21 14:09:15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2025-11-21 14:09:15</text:p>
          </table:table-cell>
          <table:table-cell office:value-type="string" calcext:value-type="string">
            <text:p>2025-11-21 14:23:4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0.652723133563995" calcext:value-type="float">
            <text:p>0.652723133563995</text:p>
          </table:table-cell>
          <table:table-cell office:value-type="float" office:value="0.689999997615814" calcext:value-type="float">
            <text:p>0.689999997615814</text:p>
          </table:table-cell>
          <table:table-cell office:value-type="float" office:value="0.588977336883545" calcext:value-type="float">
            <text:p>0.588977336883545</text:p>
          </table:table-cell>
          <table:table-cell table:style-name="ce1" office:value-type="string" calcext:value-type="string">
            <text:p>2025-11-21 14:18:48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2025-11-21 14:09:15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2025-11-21 14:09:15</text:p>
          </table:table-cell>
          <table:table-cell office:value-type="string" calcext:value-type="string">
            <text:p>2025-11-21 14:23:4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660654604434967" calcext:value-type="float">
            <text:p>0.660654604434967</text:p>
          </table:table-cell>
          <table:table-cell office:value-type="float" office:value="0.725000023841858" calcext:value-type="float">
            <text:p>0.725000023841858</text:p>
          </table:table-cell>
          <table:table-cell office:value-type="float" office:value="0.543117523193359" calcext:value-type="float">
            <text:p>0.543117523193359</text:p>
          </table:table-cell>
          <table:table-cell table:style-name="ce1" office:value-type="string" calcext:value-type="string">
            <text:p>2025-11-21 14:23:41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2025-11-21 14:23:46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44" calcext:value-type="float">
            <text:p>44</text:p>
          </table:table-cell>
          <table:table-cell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2025-11-21 14:23:46</text:p>
          </table:table-cell>
          <table:table-cell office:value-type="string" calcext:value-type="string">
            <text:p>2025-11-21 14:26:1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office:value-type="float" office:value="0.641073882579804" calcext:value-type="float">
            <text:p>0.641073882579804</text:p>
          </table:table-cell>
          <table:table-cell office:value-type="float" office:value="0.699999988079071" calcext:value-type="float">
            <text:p>0.699999988079071</text:p>
          </table:table-cell>
          <table:table-cell office:value-type="float" office:value="0.586489260196686" calcext:value-type="float">
            <text:p>0.586489260196686</text:p>
          </table:table-cell>
          <table:table-cell table:style-name="ce1" office:value-type="string" calcext:value-type="string">
            <text:p>2025-11-21 14:24:37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2025-11-21 14:23:46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44" calcext:value-type="float">
            <text:p>44</text:p>
          </table:table-cell>
          <table:table-cell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2025-11-21 14:23:46</text:p>
          </table:table-cell>
          <table:table-cell office:value-type="string" calcext:value-type="string">
            <text:p>2025-11-21 14:26:1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0.638766467571259" calcext:value-type="float">
            <text:p>0.638766467571259</text:p>
          </table:table-cell>
          <table:table-cell office:value-type="float" office:value="0.7049999833107" calcext:value-type="float">
            <text:p>0.7049999833107</text:p>
          </table:table-cell>
          <table:table-cell office:value-type="float" office:value="0.579641461372376" calcext:value-type="float">
            <text:p>0.579641461372376</text:p>
          </table:table-cell>
          <table:table-cell table:style-name="ce1" office:value-type="string" calcext:value-type="string">
            <text:p>2025-11-21 14:25:28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2025-11-21 14:23:46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44" calcext:value-type="float">
            <text:p>44</text:p>
          </table:table-cell>
          <table:table-cell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2025-11-21 14:23:46</text:p>
          </table:table-cell>
          <table:table-cell office:value-type="string" calcext:value-type="string">
            <text:p>2025-11-21 14:26:1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3" calcext:value-type="float">
            <text:p>103</text:p>
          </table:table-cell>
          <table:table-cell office:value-type="float" office:value="44" calcext:value-type="float">
            <text:p>44</text:p>
          </table:table-cell>
          <table:table-cell office:value-type="float" office:value="0.643691778182983" calcext:value-type="float">
            <text:p>0.643691778182983</text:p>
          </table:table-cell>
          <table:table-cell office:value-type="float" office:value="0.689999997615814" calcext:value-type="float">
            <text:p>0.689999997615814</text:p>
          </table:table-cell>
          <table:table-cell office:value-type="float" office:value="0.577943623065949" calcext:value-type="float">
            <text:p>0.577943623065949</text:p>
          </table:table-cell>
          <table:table-cell table:style-name="ce1" office:value-type="string" calcext:value-type="string">
            <text:p>2025-11-21 14:26:19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2025-11-21 15:27:16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49" calcext:value-type="float">
            <text:p>49</text:p>
          </table:table-cell>
          <table:table-cell office:value-type="float" office:value="142" calcext:value-type="float">
            <text:p>142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2025-11-21 15:27:16</text:p>
          </table:table-cell>
          <table:table-cell office:value-type="string" calcext:value-type="string">
            <text:p>2025-11-21 17:19:1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10" calcext:value-type="float">
            <text:p>110</text:p>
          </table:table-cell>
          <table:table-cell office:value-type="float" office:value="49" calcext:value-type="float">
            <text:p>49</text:p>
          </table:table-cell>
          <table:table-cell office:value-type="float" office:value="0.675099492073059" calcext:value-type="float">
            <text:p>0.675099492073059</text:p>
          </table:table-cell>
          <table:table-cell office:value-type="float" office:value="0.725000023841858" calcext:value-type="float">
            <text:p>0.725000023841858</text:p>
          </table:table-cell>
          <table:table-cell office:value-type="float" office:value="0.609462082386017" calcext:value-type="float">
            <text:p>0.609462082386017</text:p>
          </table:table-cell>
          <table:table-cell table:style-name="ce1" office:value-type="string" calcext:value-type="string">
            <text:p>2025-11-21 16:14:59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2025-11-21 15:27:16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49" calcext:value-type="float">
            <text:p>49</text:p>
          </table:table-cell>
          <table:table-cell office:value-type="float" office:value="142" calcext:value-type="float">
            <text:p>142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2025-11-21 15:27:16</text:p>
          </table:table-cell>
          <table:table-cell office:value-type="string" calcext:value-type="string">
            <text:p>2025-11-21 17:19:1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12" calcext:value-type="float">
            <text:p>112</text:p>
          </table:table-cell>
          <table:table-cell office:value-type="float" office:value="49" calcext:value-type="float">
            <text:p>49</text:p>
          </table:table-cell>
          <table:table-cell office:value-type="float" office:value="0.687951445579529" calcext:value-type="float">
            <text:p>0.687951445579529</text:p>
          </table:table-cell>
          <table:table-cell office:value-type="float" office:value="0.654999971389771" calcext:value-type="float">
            <text:p>0.654999971389771</text:p>
          </table:table-cell>
          <table:table-cell office:value-type="float" office:value="0.654674470424652" calcext:value-type="float">
            <text:p>0.654674470424652</text:p>
          </table:table-cell>
          <table:table-cell table:style-name="ce1" office:value-type="string" calcext:value-type="string">
            <text:p>2025-11-21 16:42:13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2025-11-21 15:27:16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49" calcext:value-type="float">
            <text:p>49</text:p>
          </table:table-cell>
          <table:table-cell office:value-type="float" office:value="142" calcext:value-type="float">
            <text:p>142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2025-11-21 15:27:16</text:p>
          </table:table-cell>
          <table:table-cell office:value-type="string" calcext:value-type="string">
            <text:p>2025-11-21 17:19:1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15" calcext:value-type="float">
            <text:p>115</text:p>
          </table:table-cell>
          <table:table-cell office:value-type="float" office:value="49" calcext:value-type="float">
            <text:p>49</text:p>
          </table:table-cell>
          <table:table-cell office:value-type="float" office:value="0.693460166454315" calcext:value-type="float">
            <text:p>0.693460166454315</text:p>
          </table:table-cell>
          <table:table-cell office:value-type="float" office:value="0.5" calcext:value-type="float">
            <text:p>0.5</text:p>
          </table:table-cell>
          <table:table-cell office:value-type="float" office:value="0.693881630897522" calcext:value-type="float">
            <text:p>0.693881630897522</text:p>
          </table:table-cell>
          <table:table-cell table:style-name="ce1" office:value-type="string" calcext:value-type="string">
            <text:p>2025-11-21 17:19:17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2025-11-21 15:28:16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143" calcext:value-type="float">
            <text:p>143</text:p>
          </table:table-cell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2025-11-21 15:28:16</text:p>
          </table:table-cell>
          <table:table-cell office:value-type="string" calcext:value-type="string">
            <text:p>2025-11-21 16:52:0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office:value-type="float" office:value="50" calcext:value-type="float">
            <text:p>50</text:p>
          </table:table-cell>
          <table:table-cell office:value-type="float" office:value="0.629723370075226" calcext:value-type="float">
            <text:p>0.629723370075226</text:p>
          </table:table-cell>
          <table:table-cell office:value-type="float" office:value="0.72000002861023" calcext:value-type="float">
            <text:p>0.72000002861023</text:p>
          </table:table-cell>
          <table:table-cell office:value-type="float" office:value="0.570576310157776" calcext:value-type="float">
            <text:p>0.570576310157776</text:p>
          </table:table-cell>
          <table:table-cell table:style-name="ce1" office:value-type="string" calcext:value-type="string">
            <text:p>2025-11-21 15:58:57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2025-11-21 15:28:16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143" calcext:value-type="float">
            <text:p>143</text:p>
          </table:table-cell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2025-11-21 15:28:16</text:p>
          </table:table-cell>
          <table:table-cell office:value-type="string" calcext:value-type="string">
            <text:p>2025-11-21 16:52:0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11" calcext:value-type="float">
            <text:p>111</text:p>
          </table:table-cell>
          <table:table-cell office:value-type="float" office:value="50" calcext:value-type="float">
            <text:p>50</text:p>
          </table:table-cell>
          <table:table-cell office:value-type="float" office:value="0.634846389293671" calcext:value-type="float">
            <text:p>0.634846389293671</text:p>
          </table:table-cell>
          <table:table-cell office:value-type="float" office:value="0.670000016689301" calcext:value-type="float">
            <text:p>0.670000016689301</text:p>
          </table:table-cell>
          <table:table-cell office:value-type="float" office:value="0.579386055469513" calcext:value-type="float">
            <text:p>0.579386055469513</text:p>
          </table:table-cell>
          <table:table-cell table:style-name="ce1" office:value-type="string" calcext:value-type="string">
            <text:p>2025-11-21 16:23:56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2025-11-21 15:28:16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143" calcext:value-type="float">
            <text:p>143</text:p>
          </table:table-cell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2025-11-21 15:28:16</text:p>
          </table:table-cell>
          <table:table-cell office:value-type="string" calcext:value-type="string">
            <text:p>2025-11-21 16:52:0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office:value-type="float" office:value="50" calcext:value-type="float">
            <text:p>50</text:p>
          </table:table-cell>
          <table:table-cell office:value-type="float" office:value="0.631648898124695" calcext:value-type="float">
            <text:p>0.631648898124695</text:p>
          </table:table-cell>
          <table:table-cell office:value-type="float" office:value="0.699999988079071" calcext:value-type="float">
            <text:p>0.699999988079071</text:p>
          </table:table-cell>
          <table:table-cell office:value-type="float" office:value="0.584159791469574" calcext:value-type="float">
            <text:p>0.584159791469574</text:p>
          </table:table-cell>
          <table:table-cell table:style-name="ce1" office:value-type="string" calcext:value-type="string">
            <text:p>2025-11-21 16:52:00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2025-11-21 15:34:32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d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51" calcext:value-type="float">
            <text:p>51</text:p>
          </table:table-cell>
          <table:table-cell office:value-type="float" office:value="102" calcext:value-type="float">
            <text:p>102</text:p>
          </table:table-cell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2025-11-21 15:34:32</text:p>
          </table:table-cell>
          <table:table-cell office:value-type="string" calcext:value-type="string">
            <text:p>2025-11-21 15:36:4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6" calcext:value-type="float">
            <text:p>106</text:p>
          </table:table-cell>
          <table:table-cell office:value-type="float" office:value="51" calcext:value-type="float">
            <text:p>51</text:p>
          </table:table-cell>
          <table:table-cell office:value-type="float" office:value="0.656121075153351" calcext:value-type="float">
            <text:p>0.656121075153351</text:p>
          </table:table-cell>
          <table:table-cell office:value-type="float" office:value="0.5" calcext:value-type="float">
            <text:p>0.5</text:p>
          </table:table-cell>
          <table:table-cell office:value-type="float" office:value="0.730928182601929" calcext:value-type="float">
            <text:p>0.730928182601929</text:p>
          </table:table-cell>
          <table:table-cell table:style-name="ce1" office:value-type="string" calcext:value-type="string">
            <text:p>2025-11-21 15:35:14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2025-11-21 15:34:32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d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51" calcext:value-type="float">
            <text:p>51</text:p>
          </table:table-cell>
          <table:table-cell office:value-type="float" office:value="102" calcext:value-type="float">
            <text:p>102</text:p>
          </table:table-cell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2025-11-21 15:34:32</text:p>
          </table:table-cell>
          <table:table-cell office:value-type="string" calcext:value-type="string">
            <text:p>2025-11-21 15:36:4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7" calcext:value-type="float">
            <text:p>107</text:p>
          </table:table-cell>
          <table:table-cell office:value-type="float" office:value="51" calcext:value-type="float">
            <text:p>51</text:p>
          </table:table-cell>
          <table:table-cell office:value-type="float" office:value="0.660490036010742" calcext:value-type="float">
            <text:p>0.660490036010742</text:p>
          </table:table-cell>
          <table:table-cell office:value-type="float" office:value="0.5" calcext:value-type="float">
            <text:p>0.5</text:p>
          </table:table-cell>
          <table:table-cell office:value-type="float" office:value="0.738177716732025" calcext:value-type="float">
            <text:p>0.738177716732025</text:p>
          </table:table-cell>
          <table:table-cell table:style-name="ce1" office:value-type="string" calcext:value-type="string">
            <text:p>2025-11-21 15:35:57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2025-11-21 15:34:32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d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51" calcext:value-type="float">
            <text:p>51</text:p>
          </table:table-cell>
          <table:table-cell office:value-type="float" office:value="102" calcext:value-type="float">
            <text:p>102</text:p>
          </table:table-cell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2025-11-21 15:34:32</text:p>
          </table:table-cell>
          <table:table-cell office:value-type="string" calcext:value-type="string">
            <text:p>2025-11-21 15:36:4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0.587813436985016" calcext:value-type="float">
            <text:p>0.587813436985016</text:p>
          </table:table-cell>
          <table:table-cell office:value-type="float" office:value="0.665000021457672" calcext:value-type="float">
            <text:p>0.665000021457672</text:p>
          </table:table-cell>
          <table:table-cell office:value-type="float" office:value="0.60163825750351" calcext:value-type="float">
            <text:p>0.60163825750351</text:p>
          </table:table-cell>
          <table:table-cell table:style-name="ce1" office:value-type="string" calcext:value-type="string">
            <text:p>2025-11-21 15:36:41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2025-11-21 16:52:53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52" calcext:value-type="float">
            <text:p>52</text:p>
          </table:table-cell>
          <table:table-cell office:value-type="float" office:value="144" calcext:value-type="float">
            <text:p>144</text:p>
          </table:table-cell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2025-11-21 16:52:53</text:p>
          </table:table-cell>
          <table:table-cell office:value-type="string" calcext:value-type="string">
            <text:p>2025-11-21 17:57:5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14" calcext:value-type="float">
            <text:p>114</text:p>
          </table:table-cell>
          <table:table-cell office:value-type="float" office:value="52" calcext:value-type="float">
            <text:p>52</text:p>
          </table:table-cell>
          <table:table-cell office:value-type="float" office:value="0.645795226097107" calcext:value-type="float">
            <text:p>0.645795226097107</text:p>
          </table:table-cell>
          <table:table-cell office:value-type="float" office:value="0.725000023841858" calcext:value-type="float">
            <text:p>0.725000023841858</text:p>
          </table:table-cell>
          <table:table-cell office:value-type="float" office:value="0.562225580215454" calcext:value-type="float">
            <text:p>0.562225580215454</text:p>
          </table:table-cell>
          <table:table-cell table:style-name="ce1" office:value-type="string" calcext:value-type="string">
            <text:p>2025-11-21 17:15:00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2025-11-21 16:52:53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52" calcext:value-type="float">
            <text:p>52</text:p>
          </table:table-cell>
          <table:table-cell office:value-type="float" office:value="144" calcext:value-type="float">
            <text:p>144</text:p>
          </table:table-cell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2025-11-21 16:52:53</text:p>
          </table:table-cell>
          <table:table-cell office:value-type="string" calcext:value-type="string">
            <text:p>2025-11-21 17:57:5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office:value-type="float" office:value="52" calcext:value-type="float">
            <text:p>52</text:p>
          </table:table-cell>
          <table:table-cell office:value-type="float" office:value="0.631540417671204" calcext:value-type="float">
            <text:p>0.631540417671204</text:p>
          </table:table-cell>
          <table:table-cell office:value-type="float" office:value="0.7049999833107" calcext:value-type="float">
            <text:p>0.7049999833107</text:p>
          </table:table-cell>
          <table:table-cell office:value-type="float" office:value="0.55876100063324" calcext:value-type="float">
            <text:p>0.55876100063324</text:p>
          </table:table-cell>
          <table:table-cell table:style-name="ce1" office:value-type="string" calcext:value-type="string">
            <text:p>2025-11-21 17:36:34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2025-11-21 16:52:53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52" calcext:value-type="float">
            <text:p>52</text:p>
          </table:table-cell>
          <table:table-cell office:value-type="float" office:value="144" calcext:value-type="float">
            <text:p>144</text:p>
          </table:table-cell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2025-11-21 16:52:53</text:p>
          </table:table-cell>
          <table:table-cell office:value-type="string" calcext:value-type="string">
            <text:p>2025-11-21 17:57:5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18" calcext:value-type="float">
            <text:p>118</text:p>
          </table:table-cell>
          <table:table-cell office:value-type="float" office:value="52" calcext:value-type="float">
            <text:p>52</text:p>
          </table:table-cell>
          <table:table-cell office:value-type="float" office:value="0.645019352436066" calcext:value-type="float">
            <text:p>0.645019352436066</text:p>
          </table:table-cell>
          <table:table-cell office:value-type="float" office:value="0.699999988079071" calcext:value-type="float">
            <text:p>0.699999988079071</text:p>
          </table:table-cell>
          <table:table-cell office:value-type="float" office:value="0.560028314590454" calcext:value-type="float">
            <text:p>0.560028314590454</text:p>
          </table:table-cell>
          <table:table-cell table:style-name="ce1" office:value-type="string" calcext:value-type="string">
            <text:p>2025-11-21 17:57:57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2025-11-21 17:20:08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53" calcext:value-type="float">
            <text:p>53</text:p>
          </table:table-cell>
          <table:table-cell office:value-type="float" office:value="145" calcext:value-type="float">
            <text:p>145</text:p>
          </table:table-cell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2025-11-21 17:20:08</text:p>
          </table:table-cell>
          <table:table-cell office:value-type="string" calcext:value-type="string">
            <text:p>2025-11-21 18:09:2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16" calcext:value-type="float">
            <text:p>116</text:p>
          </table:table-cell>
          <table:table-cell office:value-type="float" office:value="53" calcext:value-type="float">
            <text:p>53</text:p>
          </table:table-cell>
          <table:table-cell office:value-type="float" office:value="0.620457768440247" calcext:value-type="float">
            <text:p>0.620457768440247</text:p>
          </table:table-cell>
          <table:table-cell office:value-type="float" office:value="0.694999992847443" calcext:value-type="float">
            <text:p>0.694999992847443</text:p>
          </table:table-cell>
          <table:table-cell office:value-type="float" office:value="0.572076857089996" calcext:value-type="float">
            <text:p>0.572076857089996</text:p>
          </table:table-cell>
          <table:table-cell table:style-name="ce1" office:value-type="string" calcext:value-type="string">
            <text:p>2025-11-21 17:35:38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2025-11-21 17:20:08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53" calcext:value-type="float">
            <text:p>53</text:p>
          </table:table-cell>
          <table:table-cell office:value-type="float" office:value="145" calcext:value-type="float">
            <text:p>145</text:p>
          </table:table-cell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2025-11-21 17:20:08</text:p>
          </table:table-cell>
          <table:table-cell office:value-type="string" calcext:value-type="string">
            <text:p>2025-11-21 18:09:2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19" calcext:value-type="float">
            <text:p>119</text:p>
          </table:table-cell>
          <table:table-cell office:value-type="float" office:value="53" calcext:value-type="float">
            <text:p>53</text:p>
          </table:table-cell>
          <table:table-cell office:value-type="float" office:value="0.621597051620483" calcext:value-type="float">
            <text:p>0.621597051620483</text:p>
          </table:table-cell>
          <table:table-cell office:value-type="float" office:value="0.694999992847443" calcext:value-type="float">
            <text:p>0.694999992847443</text:p>
          </table:table-cell>
          <table:table-cell office:value-type="float" office:value="0.575937867164612" calcext:value-type="float">
            <text:p>0.575937867164612</text:p>
          </table:table-cell>
          <table:table-cell table:style-name="ce1" office:value-type="string" calcext:value-type="string">
            <text:p>2025-11-21 17:59:54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2025_11_8_experiments</text:p>
          </table:table-cell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2025-11-21 17:20:08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b4e024be627dcc277feb06390063aab95370d7e</text:p>
            <text:p/>
          </table:table-cell>
          <table:table-cell office:value-type="float" office:value="53" calcext:value-type="float">
            <text:p>53</text:p>
          </table:table-cell>
          <table:table-cell office:value-type="float" office:value="145" calcext:value-type="float">
            <text:p>145</text:p>
          </table:table-cell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2025-11-21 17:20:08</text:p>
          </table:table-cell>
          <table:table-cell office:value-type="string" calcext:value-type="string">
            <text:p>2025-11-21 18:09:2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0.621240437030792" calcext:value-type="float">
            <text:p>0.621240437030792</text:p>
          </table:table-cell>
          <table:table-cell office:value-type="float" office:value="0.689999997615814" calcext:value-type="float">
            <text:p>0.689999997615814</text:p>
          </table:table-cell>
          <table:table-cell office:value-type="float" office:value="0.5915806889534" calcext:value-type="float">
            <text:p>0.5915806889534</text:p>
          </table:table-cell>
          <table:table-cell table:style-name="ce1" office:value-type="string" calcext:value-type="string">
            <text:p>2025-11-21 18:09:29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2025-11-18 08:19:38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if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74" calcext:value-type="float">
            <text:p>174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2025-11-18 08:19:38</text:p>
          </table:table-cell>
          <table:table-cell office:value-type="string" calcext:value-type="string">
            <text:p>2025-11-18 08:55:2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36" calcext:value-type="float">
            <text:p>436</text:p>
          </table:table-cell>
          <table:table-cell office:value-type="float" office:value="174" calcext:value-type="float">
            <text:p>174</text:p>
          </table:table-cell>
          <table:table-cell office:value-type="float" office:value="0.695168554782867" calcext:value-type="float">
            <text:p>0.695168554782867</text:p>
          </table:table-cell>
          <table:table-cell office:value-type="float" office:value="0.550000011920929" calcext:value-type="float">
            <text:p>0.550000011920929</text:p>
          </table:table-cell>
          <table:table-cell office:value-type="float" office:value="0.685625910758972" calcext:value-type="float">
            <text:p>0.685625910758972</text:p>
          </table:table-cell>
          <table:table-cell table:style-name="ce1" office:value-type="string" calcext:value-type="string">
            <text:p>2025-11-18 08:31:19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2025-11-18 08:19:38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if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74" calcext:value-type="float">
            <text:p>174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2025-11-18 08:19:38</text:p>
          </table:table-cell>
          <table:table-cell office:value-type="string" calcext:value-type="string">
            <text:p>2025-11-18 08:55:2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37" calcext:value-type="float">
            <text:p>437</text:p>
          </table:table-cell>
          <table:table-cell office:value-type="float" office:value="174" calcext:value-type="float">
            <text:p>174</text:p>
          </table:table-cell>
          <table:table-cell office:value-type="float" office:value="0.696548521518707" calcext:value-type="float">
            <text:p>0.696548521518707</text:p>
          </table:table-cell>
          <table:table-cell office:value-type="float" office:value="0.545000016689301" calcext:value-type="float">
            <text:p>0.545000016689301</text:p>
          </table:table-cell>
          <table:table-cell office:value-type="float" office:value="0.689203321933746" calcext:value-type="float">
            <text:p>0.689203321933746</text:p>
          </table:table-cell>
          <table:table-cell table:style-name="ce1" office:value-type="string" calcext:value-type="string">
            <text:p>2025-11-18 08:43:31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2025-11-18 08:19:38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if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74" calcext:value-type="float">
            <text:p>174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2025-11-18 08:19:38</text:p>
          </table:table-cell>
          <table:table-cell office:value-type="string" calcext:value-type="string">
            <text:p>2025-11-18 08:55:2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38" calcext:value-type="float">
            <text:p>438</text:p>
          </table:table-cell>
          <table:table-cell office:value-type="float" office:value="174" calcext:value-type="float">
            <text:p>174</text:p>
          </table:table-cell>
          <table:table-cell office:value-type="float" office:value="0.691367626190186" calcext:value-type="float">
            <text:p>0.691367626190186</text:p>
          </table:table-cell>
          <table:table-cell office:value-type="float" office:value="0.540000021457672" calcext:value-type="float">
            <text:p>0.540000021457672</text:p>
          </table:table-cell>
          <table:table-cell office:value-type="float" office:value="0.686775386333466" calcext:value-type="float">
            <text:p>0.686775386333466</text:p>
          </table:table-cell>
          <table:table-cell table:style-name="ce1" office:value-type="string" calcext:value-type="string">
            <text:p>2025-11-18 08:55:27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2025-11-18 08:55:37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if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75" calcext:value-type="float">
            <text:p>17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2025-11-18 08:55:37</text:p>
          </table:table-cell>
          <table:table-cell office:value-type="string" calcext:value-type="string">
            <text:p>2025-11-18 09:01:55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39" calcext:value-type="float">
            <text:p>439</text:p>
          </table:table-cell>
          <table:table-cell office:value-type="float" office:value="175" calcext:value-type="float">
            <text:p>175</text:p>
          </table:table-cell>
          <table:table-cell office:value-type="float" office:value="0.691193342208862" calcext:value-type="float">
            <text:p>0.691193342208862</text:p>
          </table:table-cell>
          <table:table-cell office:value-type="float" office:value="0.435000002384186" calcext:value-type="float">
            <text:p>0.435000002384186</text:p>
          </table:table-cell>
          <table:table-cell office:value-type="float" office:value="0.703216552734375" calcext:value-type="float">
            <text:p>0.703216552734375</text:p>
          </table:table-cell>
          <table:table-cell table:style-name="ce1" office:value-type="string" calcext:value-type="string">
            <text:p>2025-11-18 08:57:43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2025-11-18 08:55:37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if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75" calcext:value-type="float">
            <text:p>17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2025-11-18 08:55:37</text:p>
          </table:table-cell>
          <table:table-cell office:value-type="string" calcext:value-type="string">
            <text:p>2025-11-18 09:01:55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40" calcext:value-type="float">
            <text:p>440</text:p>
          </table:table-cell>
          <table:table-cell office:value-type="float" office:value="175" calcext:value-type="float">
            <text:p>175</text:p>
          </table:table-cell>
          <table:table-cell office:value-type="float" office:value="0.694968044757843" calcext:value-type="float">
            <text:p>0.694968044757843</text:p>
          </table:table-cell>
          <table:table-cell office:value-type="float" office:value="0.5" calcext:value-type="float">
            <text:p>0.5</text:p>
          </table:table-cell>
          <table:table-cell office:value-type="float" office:value="0.693490147590637" calcext:value-type="float">
            <text:p>0.693490147590637</text:p>
          </table:table-cell>
          <table:table-cell table:style-name="ce1" office:value-type="string" calcext:value-type="string">
            <text:p>2025-11-18 08:59:48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2025-11-18 08:55:37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if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75" calcext:value-type="float">
            <text:p>17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2025-11-18 08:55:37</text:p>
          </table:table-cell>
          <table:table-cell office:value-type="string" calcext:value-type="string">
            <text:p>2025-11-18 09:01:55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41" calcext:value-type="float">
            <text:p>441</text:p>
          </table:table-cell>
          <table:table-cell office:value-type="float" office:value="175" calcext:value-type="float">
            <text:p>175</text:p>
          </table:table-cell>
          <table:table-cell office:value-type="float" office:value="0.693644464015961" calcext:value-type="float">
            <text:p>0.693644464015961</text:p>
          </table:table-cell>
          <table:table-cell office:value-type="float" office:value="0.5" calcext:value-type="float">
            <text:p>0.5</text:p>
          </table:table-cell>
          <table:table-cell office:value-type="float" office:value="0.693801045417786" calcext:value-type="float">
            <text:p>0.693801045417786</text:p>
          </table:table-cell>
          <table:table-cell table:style-name="ce1" office:value-type="string" calcext:value-type="string">
            <text:p>2025-11-18 09:01:55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2025-11-18 09:02:02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if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76" calcext:value-type="float">
            <text:p>17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2025-11-18 09:02:02</text:p>
          </table:table-cell>
          <table:table-cell office:value-type="string" calcext:value-type="string">
            <text:p>2025-11-18 09:12:4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42" calcext:value-type="float">
            <text:p>442</text:p>
          </table:table-cell>
          <table:table-cell office:value-type="float" office:value="176" calcext:value-type="float">
            <text:p>176</text:p>
          </table:table-cell>
          <table:table-cell office:value-type="float" office:value="0.683847427368164" calcext:value-type="float">
            <text:p>0.683847427368164</text:p>
          </table:table-cell>
          <table:table-cell office:value-type="float" office:value="0.425000011920929" calcext:value-type="float">
            <text:p>0.425000011920929</text:p>
          </table:table-cell>
          <table:table-cell office:value-type="float" office:value="0.739162683486939" calcext:value-type="float">
            <text:p>0.739162683486939</text:p>
          </table:table-cell>
          <table:table-cell table:style-name="ce1" office:value-type="string" calcext:value-type="string">
            <text:p>2025-11-18 09:05:34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2025-11-18 09:02:02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if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76" calcext:value-type="float">
            <text:p>17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2025-11-18 09:02:02</text:p>
          </table:table-cell>
          <table:table-cell office:value-type="string" calcext:value-type="string">
            <text:p>2025-11-18 09:12:4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43" calcext:value-type="float">
            <text:p>443</text:p>
          </table:table-cell>
          <table:table-cell office:value-type="float" office:value="176" calcext:value-type="float">
            <text:p>176</text:p>
          </table:table-cell>
          <table:table-cell office:value-type="float" office:value="0.683421790599823" calcext:value-type="float">
            <text:p>0.683421790599823</text:p>
          </table:table-cell>
          <table:table-cell office:value-type="float" office:value="0.455000013113022" calcext:value-type="float">
            <text:p>0.455000013113022</text:p>
          </table:table-cell>
          <table:table-cell office:value-type="float" office:value="0.729368984699249" calcext:value-type="float">
            <text:p>0.729368984699249</text:p>
          </table:table-cell>
          <table:table-cell table:style-name="ce1" office:value-type="string" calcext:value-type="string">
            <text:p>2025-11-18 09:09:09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2025-11-18 09:02:02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if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76" calcext:value-type="float">
            <text:p>17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2025-11-18 09:02:02</text:p>
          </table:table-cell>
          <table:table-cell office:value-type="string" calcext:value-type="string">
            <text:p>2025-11-18 09:12:4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44" calcext:value-type="float">
            <text:p>444</text:p>
          </table:table-cell>
          <table:table-cell office:value-type="float" office:value="176" calcext:value-type="float">
            <text:p>176</text:p>
          </table:table-cell>
          <table:table-cell office:value-type="float" office:value="0.684433341026306" calcext:value-type="float">
            <text:p>0.684433341026306</text:p>
          </table:table-cell>
          <table:table-cell office:value-type="float" office:value="0.430000007152557" calcext:value-type="float">
            <text:p>0.430000007152557</text:p>
          </table:table-cell>
          <table:table-cell office:value-type="float" office:value="0.730615317821503" calcext:value-type="float">
            <text:p>0.730615317821503</text:p>
          </table:table-cell>
          <table:table-cell table:style-name="ce1" office:value-type="string" calcext:value-type="string">
            <text:p>2025-11-18 09:12:42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2025-11-18 09:12:4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if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77" calcext:value-type="float">
            <text:p>17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2025-11-18 09:12:49</text:p>
          </table:table-cell>
          <table:table-cell office:value-type="string" calcext:value-type="string">
            <text:p>2025-11-18 09:20:4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45" calcext:value-type="float">
            <text:p>445</text:p>
          </table:table-cell>
          <table:table-cell office:value-type="float" office:value="177" calcext:value-type="float">
            <text:p>177</text:p>
          </table:table-cell>
          <table:table-cell office:value-type="float" office:value="0.686417758464813" calcext:value-type="float">
            <text:p>0.686417758464813</text:p>
          </table:table-cell>
          <table:table-cell office:value-type="float" office:value="0.409999996423721" calcext:value-type="float">
            <text:p>0.409999996423721</text:p>
          </table:table-cell>
          <table:table-cell office:value-type="float" office:value="0.695829570293427" calcext:value-type="float">
            <text:p>0.695829570293427</text:p>
          </table:table-cell>
          <table:table-cell table:style-name="ce1" office:value-type="string" calcext:value-type="string">
            <text:p>2025-11-18 09:15:26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2025-11-18 09:12:4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if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77" calcext:value-type="float">
            <text:p>17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2025-11-18 09:12:49</text:p>
          </table:table-cell>
          <table:table-cell office:value-type="string" calcext:value-type="string">
            <text:p>2025-11-18 09:20:4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46" calcext:value-type="float">
            <text:p>446</text:p>
          </table:table-cell>
          <table:table-cell office:value-type="float" office:value="177" calcext:value-type="float">
            <text:p>177</text:p>
          </table:table-cell>
          <table:table-cell office:value-type="float" office:value="0.689224898815155" calcext:value-type="float">
            <text:p>0.689224898815155</text:p>
          </table:table-cell>
          <table:table-cell office:value-type="float" office:value="0.395000010728836" calcext:value-type="float">
            <text:p>0.395000010728836</text:p>
          </table:table-cell>
          <table:table-cell office:value-type="float" office:value="0.699080884456635" calcext:value-type="float">
            <text:p>0.699080884456635</text:p>
          </table:table-cell>
          <table:table-cell table:style-name="ce1" office:value-type="string" calcext:value-type="string">
            <text:p>2025-11-18 09:18:03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2025-11-18 09:12:4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if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77" calcext:value-type="float">
            <text:p>17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2025-11-18 09:12:49</text:p>
          </table:table-cell>
          <table:table-cell office:value-type="string" calcext:value-type="string">
            <text:p>2025-11-18 09:20:4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47" calcext:value-type="float">
            <text:p>447</text:p>
          </table:table-cell>
          <table:table-cell office:value-type="float" office:value="177" calcext:value-type="float">
            <text:p>177</text:p>
          </table:table-cell>
          <table:table-cell office:value-type="float" office:value="0.687546193599701" calcext:value-type="float">
            <text:p>0.687546193599701</text:p>
          </table:table-cell>
          <table:table-cell office:value-type="float" office:value="0.429999947547913" calcext:value-type="float">
            <text:p>0.429999947547913</text:p>
          </table:table-cell>
          <table:table-cell office:value-type="float" office:value="0.705804347991943" calcext:value-type="float">
            <text:p>0.705804347991943</text:p>
          </table:table-cell>
          <table:table-cell table:style-name="ce1" office:value-type="string" calcext:value-type="string">
            <text:p>2025-11-18 09:20:41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2025-11-18 09:15:47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78" calcext:value-type="float">
            <text:p>178</text:p>
          </table:table-cell>
          <table:table-cell office:value-type="float" office:value="106" calcext:value-type="float">
            <text:p>106</text:p>
          </table:table-cell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2025-11-18 09:15:47</text:p>
          </table:table-cell>
          <table:table-cell office:value-type="string" calcext:value-type="string">
            <text:p>2025-11-18 09:49:53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53" calcext:value-type="float">
            <text:p>453</text:p>
          </table:table-cell>
          <table:table-cell office:value-type="float" office:value="178" calcext:value-type="float">
            <text:p>178</text:p>
          </table:table-cell>
          <table:table-cell office:value-type="float" office:value="0.694710314273834" calcext:value-type="float">
            <text:p>0.694710314273834</text:p>
          </table:table-cell>
          <table:table-cell office:value-type="float" office:value="0.569999992847443" calcext:value-type="float">
            <text:p>0.569999992847443</text:p>
          </table:table-cell>
          <table:table-cell office:value-type="float" office:value="0.672707378864288" calcext:value-type="float">
            <text:p>0.672707378864288</text:p>
          </table:table-cell>
          <table:table-cell table:style-name="ce1" office:value-type="string" calcext:value-type="string">
            <text:p>2025-11-18 09:27:18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2025-11-18 09:15:47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78" calcext:value-type="float">
            <text:p>178</text:p>
          </table:table-cell>
          <table:table-cell office:value-type="float" office:value="106" calcext:value-type="float">
            <text:p>106</text:p>
          </table:table-cell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2025-11-18 09:15:47</text:p>
          </table:table-cell>
          <table:table-cell office:value-type="string" calcext:value-type="string">
            <text:p>2025-11-18 09:49:53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57" calcext:value-type="float">
            <text:p>457</text:p>
          </table:table-cell>
          <table:table-cell office:value-type="float" office:value="178" calcext:value-type="float">
            <text:p>178</text:p>
          </table:table-cell>
          <table:table-cell office:value-type="float" office:value="0.693342924118042" calcext:value-type="float">
            <text:p>0.693342924118042</text:p>
          </table:table-cell>
          <table:table-cell office:value-type="float" office:value="0.469999998807907" calcext:value-type="float">
            <text:p>0.469999998807907</text:p>
          </table:table-cell>
          <table:table-cell office:value-type="float" office:value="0.702323377132416" calcext:value-type="float">
            <text:p>0.702323377132416</text:p>
          </table:table-cell>
          <table:table-cell table:style-name="ce1" office:value-type="string" calcext:value-type="string">
            <text:p>2025-11-18 09:38:42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2025-11-18 09:15:47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78" calcext:value-type="float">
            <text:p>178</text:p>
          </table:table-cell>
          <table:table-cell office:value-type="float" office:value="106" calcext:value-type="float">
            <text:p>106</text:p>
          </table:table-cell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2025-11-18 09:15:47</text:p>
          </table:table-cell>
          <table:table-cell office:value-type="string" calcext:value-type="string">
            <text:p>2025-11-18 09:49:53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63" calcext:value-type="float">
            <text:p>463</text:p>
          </table:table-cell>
          <table:table-cell office:value-type="float" office:value="178" calcext:value-type="float">
            <text:p>178</text:p>
          </table:table-cell>
          <table:table-cell office:value-type="float" office:value="0.693698525428772" calcext:value-type="float">
            <text:p>0.693698525428772</text:p>
          </table:table-cell>
          <table:table-cell office:value-type="float" office:value="0.540000021457672" calcext:value-type="float">
            <text:p>0.540000021457672</text:p>
          </table:table-cell>
          <table:table-cell office:value-type="float" office:value="0.686415910720825" calcext:value-type="float">
            <text:p>0.686415910720825</text:p>
          </table:table-cell>
          <table:table-cell table:style-name="ce1" office:value-type="string" calcext:value-type="string">
            <text:p>2025-11-18 09:49:53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2025-11-18 09:17:1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79" calcext:value-type="float">
            <text:p>179</text:p>
          </table:table-cell>
          <table:table-cell office:value-type="float" office:value="141" calcext:value-type="float">
            <text:p>141</text:p>
          </table:table-cell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2025-11-18 09:17:19</text:p>
          </table:table-cell>
          <table:table-cell office:value-type="string" calcext:value-type="string">
            <text:p>2025-11-18 09:45:1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52" calcext:value-type="float">
            <text:p>452</text:p>
          </table:table-cell>
          <table:table-cell office:value-type="float" office:value="179" calcext:value-type="float">
            <text:p>179</text:p>
          </table:table-cell>
          <table:table-cell office:value-type="float" office:value="0.697429060935974" calcext:value-type="float">
            <text:p>0.697429060935974</text:p>
          </table:table-cell>
          <table:table-cell office:value-type="float" office:value="0.504999995231628" calcext:value-type="float">
            <text:p>0.504999995231628</text:p>
          </table:table-cell>
          <table:table-cell office:value-type="float" office:value="0.694745421409607" calcext:value-type="float">
            <text:p>0.694745421409607</text:p>
          </table:table-cell>
          <table:table-cell table:style-name="ce1" office:value-type="string" calcext:value-type="string">
            <text:p>2025-11-18 09:26:38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2025-11-18 09:17:1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79" calcext:value-type="float">
            <text:p>179</text:p>
          </table:table-cell>
          <table:table-cell office:value-type="float" office:value="141" calcext:value-type="float">
            <text:p>141</text:p>
          </table:table-cell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2025-11-18 09:17:19</text:p>
          </table:table-cell>
          <table:table-cell office:value-type="string" calcext:value-type="string">
            <text:p>2025-11-18 09:45:1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55" calcext:value-type="float">
            <text:p>455</text:p>
          </table:table-cell>
          <table:table-cell office:value-type="float" office:value="179" calcext:value-type="float">
            <text:p>179</text:p>
          </table:table-cell>
          <table:table-cell office:value-type="float" office:value="0.695109903812408" calcext:value-type="float">
            <text:p>0.695109903812408</text:p>
          </table:table-cell>
          <table:table-cell office:value-type="float" office:value="0.465000003576279" calcext:value-type="float">
            <text:p>0.465000003576279</text:p>
          </table:table-cell>
          <table:table-cell office:value-type="float" office:value="0.713245749473572" calcext:value-type="float">
            <text:p>0.713245749473572</text:p>
          </table:table-cell>
          <table:table-cell table:style-name="ce1" office:value-type="string" calcext:value-type="string">
            <text:p>2025-11-18 09:35:57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2025-11-18 09:17:1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79" calcext:value-type="float">
            <text:p>179</text:p>
          </table:table-cell>
          <table:table-cell office:value-type="float" office:value="141" calcext:value-type="float">
            <text:p>141</text:p>
          </table:table-cell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2025-11-18 09:17:19</text:p>
          </table:table-cell>
          <table:table-cell office:value-type="string" calcext:value-type="string">
            <text:p>2025-11-18 09:45:1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61" calcext:value-type="float">
            <text:p>461</text:p>
          </table:table-cell>
          <table:table-cell office:value-type="float" office:value="179" calcext:value-type="float">
            <text:p>179</text:p>
          </table:table-cell>
          <table:table-cell office:value-type="float" office:value="0.694761157035828" calcext:value-type="float">
            <text:p>0.694761157035828</text:p>
          </table:table-cell>
          <table:table-cell office:value-type="float" office:value="0.524999976158142" calcext:value-type="float">
            <text:p>0.524999976158142</text:p>
          </table:table-cell>
          <table:table-cell office:value-type="float" office:value="0.694768130779266" calcext:value-type="float">
            <text:p>0.694768130779266</text:p>
          </table:table-cell>
          <table:table-cell table:style-name="ce1" office:value-type="string" calcext:value-type="string">
            <text:p>2025-11-18 09:45:16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2025-11-18 09:18:07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ub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80" calcext:value-type="float">
            <text:p>180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2025-11-18 09:18:07</text:p>
          </table:table-cell>
          <table:table-cell office:value-type="string" calcext:value-type="string">
            <text:p>2025-11-18 09:36:43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50" calcext:value-type="float">
            <text:p>450</text:p>
          </table:table-cell>
          <table:table-cell office:value-type="float" office:value="180" calcext:value-type="float">
            <text:p>180</text:p>
          </table:table-cell>
          <table:table-cell office:value-type="float" office:value="0.696277737617493" calcext:value-type="float">
            <text:p>0.696277737617493</text:p>
          </table:table-cell>
          <table:table-cell office:value-type="float" office:value="0.504999995231628" calcext:value-type="float">
            <text:p>0.504999995231628</text:p>
          </table:table-cell>
          <table:table-cell office:value-type="float" office:value="0.668156981468201" calcext:value-type="float">
            <text:p>0.668156981468201</text:p>
          </table:table-cell>
          <table:table-cell table:style-name="ce1" office:value-type="string" calcext:value-type="string">
            <text:p>2025-11-18 09:24:24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2025-11-18 09:18:07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ub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80" calcext:value-type="float">
            <text:p>180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2025-11-18 09:18:07</text:p>
          </table:table-cell>
          <table:table-cell office:value-type="string" calcext:value-type="string">
            <text:p>2025-11-18 09:36:43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54" calcext:value-type="float">
            <text:p>454</text:p>
          </table:table-cell>
          <table:table-cell office:value-type="float" office:value="180" calcext:value-type="float">
            <text:p>180</text:p>
          </table:table-cell>
          <table:table-cell office:value-type="float" office:value="0.700213372707367" calcext:value-type="float">
            <text:p>0.700213372707367</text:p>
          </table:table-cell>
          <table:table-cell office:value-type="float" office:value="0.469999998807907" calcext:value-type="float">
            <text:p>0.469999998807907</text:p>
          </table:table-cell>
          <table:table-cell office:value-type="float" office:value="0.710345983505249" calcext:value-type="float">
            <text:p>0.710345983505249</text:p>
          </table:table-cell>
          <table:table-cell table:style-name="ce1" office:value-type="string" calcext:value-type="string">
            <text:p>2025-11-18 09:30:32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2025-11-18 09:18:07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ub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80" calcext:value-type="float">
            <text:p>180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2025-11-18 09:18:07</text:p>
          </table:table-cell>
          <table:table-cell office:value-type="string" calcext:value-type="string">
            <text:p>2025-11-18 09:36:43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56" calcext:value-type="float">
            <text:p>456</text:p>
          </table:table-cell>
          <table:table-cell office:value-type="float" office:value="180" calcext:value-type="float">
            <text:p>180</text:p>
          </table:table-cell>
          <table:table-cell office:value-type="float" office:value="0.694753050804138" calcext:value-type="float">
            <text:p>0.694753050804138</text:p>
          </table:table-cell>
          <table:table-cell office:value-type="float" office:value="0.409999996423721" calcext:value-type="float">
            <text:p>0.409999996423721</text:p>
          </table:table-cell>
          <table:table-cell office:value-type="float" office:value="0.704315721988678" calcext:value-type="float">
            <text:p>0.704315721988678</text:p>
          </table:table-cell>
          <table:table-cell table:style-name="ce1" office:value-type="string" calcext:value-type="string">
            <text:p>2025-11-18 09:36:43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2025-11-18 09:20:48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if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81" calcext:value-type="float">
            <text:p>18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2025-11-18 09:20:48</text:p>
          </table:table-cell>
          <table:table-cell office:value-type="string" calcext:value-type="string">
            <text:p>2025-11-18 09:25:2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48" calcext:value-type="float">
            <text:p>448</text:p>
          </table:table-cell>
          <table:table-cell office:value-type="float" office:value="181" calcext:value-type="float">
            <text:p>181</text:p>
          </table:table-cell>
          <table:table-cell office:value-type="float" office:value="0.689742565155029" calcext:value-type="float">
            <text:p>0.689742565155029</text:p>
          </table:table-cell>
          <table:table-cell office:value-type="float" office:value="0.465000003576279" calcext:value-type="float">
            <text:p>0.465000003576279</text:p>
          </table:table-cell>
          <table:table-cell office:value-type="float" office:value="0.712652444839478" calcext:value-type="float">
            <text:p>0.712652444839478</text:p>
          </table:table-cell>
          <table:table-cell table:style-name="ce1" office:value-type="string" calcext:value-type="string">
            <text:p>2025-11-18 09:22:19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2025-11-18 09:20:48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if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81" calcext:value-type="float">
            <text:p>18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2025-11-18 09:20:48</text:p>
          </table:table-cell>
          <table:table-cell office:value-type="string" calcext:value-type="string">
            <text:p>2025-11-18 09:25:2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49" calcext:value-type="float">
            <text:p>449</text:p>
          </table:table-cell>
          <table:table-cell office:value-type="float" office:value="181" calcext:value-type="float">
            <text:p>181</text:p>
          </table:table-cell>
          <table:table-cell office:value-type="float" office:value="0.68889719247818" calcext:value-type="float">
            <text:p>0.68889719247818</text:p>
          </table:table-cell>
          <table:table-cell office:value-type="float" office:value="0.490000009536743" calcext:value-type="float">
            <text:p>0.490000009536743</text:p>
          </table:table-cell>
          <table:table-cell office:value-type="float" office:value="0.703001081943512" calcext:value-type="float">
            <text:p>0.703001081943512</text:p>
          </table:table-cell>
          <table:table-cell table:style-name="ce1" office:value-type="string" calcext:value-type="string">
            <text:p>2025-11-18 09:23:51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2025-11-18 09:20:48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if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81" calcext:value-type="float">
            <text:p>18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2025-11-18 09:20:48</text:p>
          </table:table-cell>
          <table:table-cell office:value-type="string" calcext:value-type="string">
            <text:p>2025-11-18 09:25:2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51" calcext:value-type="float">
            <text:p>451</text:p>
          </table:table-cell>
          <table:table-cell office:value-type="float" office:value="181" calcext:value-type="float">
            <text:p>181</text:p>
          </table:table-cell>
          <table:table-cell office:value-type="float" office:value="0.69002777338028" calcext:value-type="float">
            <text:p>0.69002777338028</text:p>
          </table:table-cell>
          <table:table-cell office:value-type="float" office:value="0.519999980926514" calcext:value-type="float">
            <text:p>0.519999980926514</text:p>
          </table:table-cell>
          <table:table-cell office:value-type="float" office:value="0.700959444046021" calcext:value-type="float">
            <text:p>0.700959444046021</text:p>
          </table:table-cell>
          <table:table-cell table:style-name="ce1" office:value-type="string" calcext:value-type="string">
            <text:p>2025-11-18 09:25:24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2025-11-18 09:36:50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ub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82" calcext:value-type="float">
            <text:p>182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2025-11-18 09:36:50</text:p>
          </table:table-cell>
          <table:table-cell office:value-type="string" calcext:value-type="string">
            <text:p>2025-11-18 09:44:2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58" calcext:value-type="float">
            <text:p>458</text:p>
          </table:table-cell>
          <table:table-cell office:value-type="float" office:value="182" calcext:value-type="float">
            <text:p>182</text:p>
          </table:table-cell>
          <table:table-cell office:value-type="float" office:value="0.691419005393982" calcext:value-type="float">
            <text:p>0.691419005393982</text:p>
          </table:table-cell>
          <table:table-cell office:value-type="float" office:value="0.474999994039536" calcext:value-type="float">
            <text:p>0.474999994039536</text:p>
          </table:table-cell>
          <table:table-cell office:value-type="float" office:value="0.705791413784027" calcext:value-type="float">
            <text:p>0.705791413784027</text:p>
          </table:table-cell>
          <table:table-cell table:style-name="ce1" office:value-type="string" calcext:value-type="string">
            <text:p>2025-11-18 09:39:19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2025-11-18 09:36:50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ub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82" calcext:value-type="float">
            <text:p>182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2025-11-18 09:36:50</text:p>
          </table:table-cell>
          <table:table-cell office:value-type="string" calcext:value-type="string">
            <text:p>2025-11-18 09:44:2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59" calcext:value-type="float">
            <text:p>459</text:p>
          </table:table-cell>
          <table:table-cell office:value-type="float" office:value="182" calcext:value-type="float">
            <text:p>182</text:p>
          </table:table-cell>
          <table:table-cell office:value-type="float" office:value="0.692806303501129" calcext:value-type="float">
            <text:p>0.692806303501129</text:p>
          </table:table-cell>
          <table:table-cell office:value-type="float" office:value="0.5" calcext:value-type="float">
            <text:p>0.5</text:p>
          </table:table-cell>
          <table:table-cell office:value-type="float" office:value="0.693918406963348" calcext:value-type="float">
            <text:p>0.693918406963348</text:p>
          </table:table-cell>
          <table:table-cell table:style-name="ce1" office:value-type="string" calcext:value-type="string">
            <text:p>2025-11-18 09:41:48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2025-11-18 09:36:50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ub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82" calcext:value-type="float">
            <text:p>182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2025-11-18 09:36:50</text:p>
          </table:table-cell>
          <table:table-cell office:value-type="string" calcext:value-type="string">
            <text:p>2025-11-18 09:44:2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60" calcext:value-type="float">
            <text:p>460</text:p>
          </table:table-cell>
          <table:table-cell office:value-type="float" office:value="182" calcext:value-type="float">
            <text:p>182</text:p>
          </table:table-cell>
          <table:table-cell office:value-type="float" office:value="0.692089915275574" calcext:value-type="float">
            <text:p>0.692089915275574</text:p>
          </table:table-cell>
          <table:table-cell office:value-type="float" office:value="0.5" calcext:value-type="float">
            <text:p>0.5</text:p>
          </table:table-cell>
          <table:table-cell office:value-type="float" office:value="0.694697439670563" calcext:value-type="float">
            <text:p>0.694697439670563</text:p>
          </table:table-cell>
          <table:table-cell table:style-name="ce1" office:value-type="string" calcext:value-type="string">
            <text:p>2025-11-18 09:44:20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2025-11-18 09:43:22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o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86" calcext:value-type="float">
            <text:p>186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2025-11-18 09:43:22</text:p>
          </table:table-cell>
          <table:table-cell office:value-type="string" calcext:value-type="string">
            <text:p>2025-11-18 10:04:3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64" calcext:value-type="float">
            <text:p>464</text:p>
          </table:table-cell>
          <table:table-cell office:value-type="float" office:value="186" calcext:value-type="float">
            <text:p>186</text:p>
          </table:table-cell>
          <table:table-cell office:value-type="float" office:value="0.692055284976959" calcext:value-type="float">
            <text:p>0.692055284976959</text:p>
          </table:table-cell>
          <table:table-cell office:value-type="float" office:value="0.574999988079071" calcext:value-type="float">
            <text:p>0.574999988079071</text:p>
          </table:table-cell>
          <table:table-cell office:value-type="float" office:value="0.673807322978973" calcext:value-type="float">
            <text:p>0.673807322978973</text:p>
          </table:table-cell>
          <table:table-cell table:style-name="ce1" office:value-type="string" calcext:value-type="string">
            <text:p>2025-11-18 09:50:22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2025-11-18 09:43:22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o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86" calcext:value-type="float">
            <text:p>186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2025-11-18 09:43:22</text:p>
          </table:table-cell>
          <table:table-cell office:value-type="string" calcext:value-type="string">
            <text:p>2025-11-18 10:04:3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69" calcext:value-type="float">
            <text:p>469</text:p>
          </table:table-cell>
          <table:table-cell office:value-type="float" office:value="186" calcext:value-type="float">
            <text:p>186</text:p>
          </table:table-cell>
          <table:table-cell office:value-type="float" office:value="0.68879508972168" calcext:value-type="float">
            <text:p>0.68879508972168</text:p>
          </table:table-cell>
          <table:table-cell office:value-type="float" office:value="0.560000002384186" calcext:value-type="float">
            <text:p>0.560000002384186</text:p>
          </table:table-cell>
          <table:table-cell office:value-type="float" office:value="0.691020250320435" calcext:value-type="float">
            <text:p>0.691020250320435</text:p>
          </table:table-cell>
          <table:table-cell table:style-name="ce1" office:value-type="string" calcext:value-type="string">
            <text:p>2025-11-18 09:57:27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2025-11-18 09:43:22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o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86" calcext:value-type="float">
            <text:p>186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2025-11-18 09:43:22</text:p>
          </table:table-cell>
          <table:table-cell office:value-type="string" calcext:value-type="string">
            <text:p>2025-11-18 10:04:3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77" calcext:value-type="float">
            <text:p>477</text:p>
          </table:table-cell>
          <table:table-cell office:value-type="float" office:value="186" calcext:value-type="float">
            <text:p>186</text:p>
          </table:table-cell>
          <table:table-cell office:value-type="float" office:value="0.692217469215393" calcext:value-type="float">
            <text:p>0.692217469215393</text:p>
          </table:table-cell>
          <table:table-cell office:value-type="float" office:value="0.46000000834465" calcext:value-type="float">
            <text:p>0.46000000834465</text:p>
          </table:table-cell>
          <table:table-cell office:value-type="float" office:value="0.710400521755219" calcext:value-type="float">
            <text:p>0.710400521755219</text:p>
          </table:table-cell>
          <table:table-cell table:style-name="ce1" office:value-type="string" calcext:value-type="string">
            <text:p>2025-11-18 10:04:37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2025-11-18 09:44:27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ub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87" calcext:value-type="float">
            <text:p>187</text:p>
          </table:table-cell>
          <table:table-cell office:value-type="float" office:value="163" calcext:value-type="float">
            <text:p>16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2025-11-18 09:44:27</text:p>
          </table:table-cell>
          <table:table-cell office:value-type="string" calcext:value-type="string">
            <text:p>2025-11-18 09:59:4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62" calcext:value-type="float">
            <text:p>462</text:p>
          </table:table-cell>
          <table:table-cell office:value-type="float" office:value="187" calcext:value-type="float">
            <text:p>187</text:p>
          </table:table-cell>
          <table:table-cell office:value-type="float" office:value="0.661041915416718" calcext:value-type="float">
            <text:p>0.661041915416718</text:p>
          </table:table-cell>
          <table:table-cell office:value-type="float" office:value="0.465000003576279" calcext:value-type="float">
            <text:p>0.465000003576279</text:p>
          </table:table-cell>
          <table:table-cell office:value-type="float" office:value="0.747892558574677" calcext:value-type="float">
            <text:p>0.747892558574677</text:p>
          </table:table-cell>
          <table:table-cell table:style-name="ce1" office:value-type="string" calcext:value-type="string">
            <text:p>2025-11-18 09:49:26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2025-11-18 09:44:27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ub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87" calcext:value-type="float">
            <text:p>187</text:p>
          </table:table-cell>
          <table:table-cell office:value-type="float" office:value="163" calcext:value-type="float">
            <text:p>16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2025-11-18 09:44:27</text:p>
          </table:table-cell>
          <table:table-cell office:value-type="string" calcext:value-type="string">
            <text:p>2025-11-18 09:59:4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office:value-type="float" office:value="187" calcext:value-type="float">
            <text:p>187</text:p>
          </table:table-cell>
          <table:table-cell office:value-type="float" office:value="0.646428167819977" calcext:value-type="float">
            <text:p>0.646428167819977</text:p>
          </table:table-cell>
          <table:table-cell office:value-type="float" office:value="0.504999995231628" calcext:value-type="float">
            <text:p>0.504999995231628</text:p>
          </table:table-cell>
          <table:table-cell office:value-type="float" office:value="0.825608432292938" calcext:value-type="float">
            <text:p>0.825608432292938</text:p>
          </table:table-cell>
          <table:table-cell table:style-name="ce1" office:value-type="string" calcext:value-type="string">
            <text:p>2025-11-18 09:54:32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2025-11-18 09:44:27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ub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87" calcext:value-type="float">
            <text:p>187</text:p>
          </table:table-cell>
          <table:table-cell office:value-type="float" office:value="163" calcext:value-type="float">
            <text:p>16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2025-11-18 09:44:27</text:p>
          </table:table-cell>
          <table:table-cell office:value-type="string" calcext:value-type="string">
            <text:p>2025-11-18 09:59:4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71" calcext:value-type="float">
            <text:p>471</text:p>
          </table:table-cell>
          <table:table-cell office:value-type="float" office:value="187" calcext:value-type="float">
            <text:p>187</text:p>
          </table:table-cell>
          <table:table-cell office:value-type="float" office:value="0.640249609947205" calcext:value-type="float">
            <text:p>0.640249609947205</text:p>
          </table:table-cell>
          <table:table-cell office:value-type="float" office:value="0.465000003576279" calcext:value-type="float">
            <text:p>0.465000003576279</text:p>
          </table:table-cell>
          <table:table-cell office:value-type="float" office:value="0.775466084480286" calcext:value-type="float">
            <text:p>0.775466084480286</text:p>
          </table:table-cell>
          <table:table-cell table:style-name="ce1" office:value-type="string" calcext:value-type="string">
            <text:p>2025-11-18 09:59:40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2025-11-18 09:45:22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88" calcext:value-type="float">
            <text:p>188</text:p>
          </table:table-cell>
          <table:table-cell office:value-type="float" office:value="142" calcext:value-type="float">
            <text:p>142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2025-11-18 09:45:22</text:p>
          </table:table-cell>
          <table:table-cell office:value-type="string" calcext:value-type="string">
            <text:p>2025-11-18 10:11:53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66" calcext:value-type="float">
            <text:p>466</text:p>
          </table:table-cell>
          <table:table-cell office:value-type="float" office:value="188" calcext:value-type="float">
            <text:p>188</text:p>
          </table:table-cell>
          <table:table-cell office:value-type="float" office:value="0.692402839660645" calcext:value-type="float">
            <text:p>0.692402839660645</text:p>
          </table:table-cell>
          <table:table-cell office:value-type="float" office:value="0.465000003576279" calcext:value-type="float">
            <text:p>0.465000003576279</text:p>
          </table:table-cell>
          <table:table-cell office:value-type="float" office:value="0.703062891960144" calcext:value-type="float">
            <text:p>0.703062891960144</text:p>
          </table:table-cell>
          <table:table-cell table:style-name="ce1" office:value-type="string" calcext:value-type="string">
            <text:p>2025-11-18 09:53:11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2025-11-18 09:45:22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88" calcext:value-type="float">
            <text:p>188</text:p>
          </table:table-cell>
          <table:table-cell office:value-type="float" office:value="142" calcext:value-type="float">
            <text:p>142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2025-11-18 09:45:22</text:p>
          </table:table-cell>
          <table:table-cell office:value-type="string" calcext:value-type="string">
            <text:p>2025-11-18 10:11:53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75" calcext:value-type="float">
            <text:p>475</text:p>
          </table:table-cell>
          <table:table-cell office:value-type="float" office:value="188" calcext:value-type="float">
            <text:p>188</text:p>
          </table:table-cell>
          <table:table-cell office:value-type="float" office:value="0.693430721759796" calcext:value-type="float">
            <text:p>0.693430721759796</text:p>
          </table:table-cell>
          <table:table-cell office:value-type="float" office:value="0.5" calcext:value-type="float">
            <text:p>0.5</text:p>
          </table:table-cell>
          <table:table-cell office:value-type="float" office:value="0.693646371364594" calcext:value-type="float">
            <text:p>0.693646371364594</text:p>
          </table:table-cell>
          <table:table-cell table:style-name="ce1" office:value-type="string" calcext:value-type="string">
            <text:p>2025-11-18 10:03:26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2025-11-18 09:45:22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88" calcext:value-type="float">
            <text:p>188</text:p>
          </table:table-cell>
          <table:table-cell office:value-type="float" office:value="142" calcext:value-type="float">
            <text:p>142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2025-11-18 09:45:22</text:p>
          </table:table-cell>
          <table:table-cell office:value-type="string" calcext:value-type="string">
            <text:p>2025-11-18 10:11:53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88" calcext:value-type="float">
            <text:p>488</text:p>
          </table:table-cell>
          <table:table-cell office:value-type="float" office:value="188" calcext:value-type="float">
            <text:p>188</text:p>
          </table:table-cell>
          <table:table-cell office:value-type="float" office:value="0.692430138587952" calcext:value-type="float">
            <text:p>0.692430138587952</text:p>
          </table:table-cell>
          <table:table-cell office:value-type="float" office:value="0.455000013113022" calcext:value-type="float">
            <text:p>0.455000013113022</text:p>
          </table:table-cell>
          <table:table-cell office:value-type="float" office:value="0.69890159368515" calcext:value-type="float">
            <text:p>0.69890159368515</text:p>
          </table:table-cell>
          <table:table-cell table:style-name="ce1" office:value-type="string" calcext:value-type="string">
            <text:p>2025-11-18 10:11:53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2025-11-18 09:50:00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89" calcext:value-type="float">
            <text:p>189</text:p>
          </table:table-cell>
          <table:table-cell office:value-type="float" office:value="107" calcext:value-type="float">
            <text:p>107</text:p>
          </table:table-cell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2025-11-18 09:50:00</text:p>
          </table:table-cell>
          <table:table-cell office:value-type="string" calcext:value-type="string">
            <text:p>2025-11-18 09:57:4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65" calcext:value-type="float">
            <text:p>465</text:p>
          </table:table-cell>
          <table:table-cell office:value-type="float" office:value="189" calcext:value-type="float">
            <text:p>189</text:p>
          </table:table-cell>
          <table:table-cell office:value-type="float" office:value="0.693253040313721" calcext:value-type="float">
            <text:p>0.693253040313721</text:p>
          </table:table-cell>
          <table:table-cell office:value-type="float" office:value="0.5" calcext:value-type="float">
            <text:p>0.5</text:p>
          </table:table-cell>
          <table:table-cell office:value-type="float" office:value="0.693240582942963" calcext:value-type="float">
            <text:p>0.693240582942963</text:p>
          </table:table-cell>
          <table:table-cell table:style-name="ce1" office:value-type="string" calcext:value-type="string">
            <text:p>2025-11-18 09:52:33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2025-11-18 09:50:00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89" calcext:value-type="float">
            <text:p>189</text:p>
          </table:table-cell>
          <table:table-cell office:value-type="float" office:value="107" calcext:value-type="float">
            <text:p>107</text:p>
          </table:table-cell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2025-11-18 09:50:00</text:p>
          </table:table-cell>
          <table:table-cell office:value-type="string" calcext:value-type="string">
            <text:p>2025-11-18 09:57:4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68" calcext:value-type="float">
            <text:p>468</text:p>
          </table:table-cell>
          <table:table-cell office:value-type="float" office:value="189" calcext:value-type="float">
            <text:p>189</text:p>
          </table:table-cell>
          <table:table-cell office:value-type="float" office:value="0.692437529563904" calcext:value-type="float">
            <text:p>0.692437529563904</text:p>
          </table:table-cell>
          <table:table-cell office:value-type="float" office:value="0.354999989271164" calcext:value-type="float">
            <text:p>0.354999989271164</text:p>
          </table:table-cell>
          <table:table-cell office:value-type="float" office:value="0.711606085300446" calcext:value-type="float">
            <text:p>0.711606085300446</text:p>
          </table:table-cell>
          <table:table-cell table:style-name="ce1" office:value-type="string" calcext:value-type="string">
            <text:p>2025-11-18 09:55:06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2025-11-18 09:50:00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89" calcext:value-type="float">
            <text:p>189</text:p>
          </table:table-cell>
          <table:table-cell office:value-type="float" office:value="107" calcext:value-type="float">
            <text:p>107</text:p>
          </table:table-cell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2025-11-18 09:50:00</text:p>
          </table:table-cell>
          <table:table-cell office:value-type="string" calcext:value-type="string">
            <text:p>2025-11-18 09:57:4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70" calcext:value-type="float">
            <text:p>470</text:p>
          </table:table-cell>
          <table:table-cell office:value-type="float" office:value="189" calcext:value-type="float">
            <text:p>189</text:p>
          </table:table-cell>
          <table:table-cell office:value-type="float" office:value="0.692325592041016" calcext:value-type="float">
            <text:p>0.692325592041016</text:p>
          </table:table-cell>
          <table:table-cell office:value-type="float" office:value="0.375" calcext:value-type="float">
            <text:p>0.375</text:p>
          </table:table-cell>
          <table:table-cell office:value-type="float" office:value="0.712880373001099" calcext:value-type="float">
            <text:p>0.712880373001099</text:p>
          </table:table-cell>
          <table:table-cell table:style-name="ce1" office:value-type="string" calcext:value-type="string">
            <text:p>2025-11-18 09:57:39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2025-11-18 09:57:46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90" calcext:value-type="float">
            <text:p>190</text:p>
          </table:table-cell>
          <table:table-cell office:value-type="float" office:value="108" calcext:value-type="float">
            <text:p>108</text:p>
          </table:table-cell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2025-11-18 09:57:46</text:p>
          </table:table-cell>
          <table:table-cell office:value-type="string" calcext:value-type="string">
            <text:p>2025-11-18 10:04:4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72" calcext:value-type="float">
            <text:p>472</text:p>
          </table:table-cell>
          <table:table-cell office:value-type="float" office:value="190" calcext:value-type="float">
            <text:p>190</text:p>
          </table:table-cell>
          <table:table-cell office:value-type="float" office:value="0.680815041065216" calcext:value-type="float">
            <text:p>0.680815041065216</text:p>
          </table:table-cell>
          <table:table-cell office:value-type="float" office:value="0.425000011920929" calcext:value-type="float">
            <text:p>0.425000011920929</text:p>
          </table:table-cell>
          <table:table-cell office:value-type="float" office:value="0.715044498443604" calcext:value-type="float">
            <text:p>0.715044498443604</text:p>
          </table:table-cell>
          <table:table-cell table:style-name="ce1" office:value-type="string" calcext:value-type="string">
            <text:p>2025-11-18 10:00:05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2025-11-18 09:57:46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90" calcext:value-type="float">
            <text:p>190</text:p>
          </table:table-cell>
          <table:table-cell office:value-type="float" office:value="108" calcext:value-type="float">
            <text:p>108</text:p>
          </table:table-cell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2025-11-18 09:57:46</text:p>
          </table:table-cell>
          <table:table-cell office:value-type="string" calcext:value-type="string">
            <text:p>2025-11-18 10:04:4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74" calcext:value-type="float">
            <text:p>474</text:p>
          </table:table-cell>
          <table:table-cell office:value-type="float" office:value="190" calcext:value-type="float">
            <text:p>190</text:p>
          </table:table-cell>
          <table:table-cell office:value-type="float" office:value="0.680077850818634" calcext:value-type="float">
            <text:p>0.680077850818634</text:p>
          </table:table-cell>
          <table:table-cell office:value-type="float" office:value="0.495000004768372" calcext:value-type="float">
            <text:p>0.495000004768372</text:p>
          </table:table-cell>
          <table:table-cell office:value-type="float" office:value="0.716926753520966" calcext:value-type="float">
            <text:p>0.716926753520966</text:p>
          </table:table-cell>
          <table:table-cell table:style-name="ce1" office:value-type="string" calcext:value-type="string">
            <text:p>2025-11-18 10:02:24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2025-11-18 09:57:46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90" calcext:value-type="float">
            <text:p>190</text:p>
          </table:table-cell>
          <table:table-cell office:value-type="float" office:value="108" calcext:value-type="float">
            <text:p>108</text:p>
          </table:table-cell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2025-11-18 09:57:46</text:p>
          </table:table-cell>
          <table:table-cell office:value-type="string" calcext:value-type="string">
            <text:p>2025-11-18 10:04:4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78" calcext:value-type="float">
            <text:p>478</text:p>
          </table:table-cell>
          <table:table-cell office:value-type="float" office:value="190" calcext:value-type="float">
            <text:p>190</text:p>
          </table:table-cell>
          <table:table-cell office:value-type="float" office:value="0.687807142734528" calcext:value-type="float">
            <text:p>0.687807142734528</text:p>
          </table:table-cell>
          <table:table-cell office:value-type="float" office:value="0.389999985694885" calcext:value-type="float">
            <text:p>0.389999985694885</text:p>
          </table:table-cell>
          <table:table-cell office:value-type="float" office:value="0.73299515247345" calcext:value-type="float">
            <text:p>0.73299515247345</text:p>
          </table:table-cell>
          <table:table-cell table:style-name="ce1" office:value-type="string" calcext:value-type="string">
            <text:p>2025-11-18 10:04:42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2025-11-18 09:59:48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ub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91" calcext:value-type="float">
            <text:p>191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2025-11-18 09:59:48</text:p>
          </table:table-cell>
          <table:table-cell office:value-type="string" calcext:value-type="string">
            <text:p>2025-11-18 10:06:4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 office:value-type="float" office:value="0.684520125389099" calcext:value-type="float">
            <text:p>0.684520125389099</text:p>
          </table:table-cell>
          <table:table-cell office:value-type="float" office:value="0.474999994039536" calcext:value-type="float">
            <text:p>0.474999994039536</text:p>
          </table:table-cell>
          <table:table-cell office:value-type="float" office:value="0.696926295757294" calcext:value-type="float">
            <text:p>0.696926295757294</text:p>
          </table:table-cell>
          <table:table-cell table:style-name="ce1" office:value-type="string" calcext:value-type="string">
            <text:p>2025-11-18 10:02:06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2025-11-18 09:59:48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ub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91" calcext:value-type="float">
            <text:p>191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2025-11-18 09:59:48</text:p>
          </table:table-cell>
          <table:table-cell office:value-type="string" calcext:value-type="string">
            <text:p>2025-11-18 10:06:4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76" calcext:value-type="float">
            <text:p>476</text:p>
          </table:table-cell>
          <table:table-cell office:value-type="float" office:value="191" calcext:value-type="float">
            <text:p>191</text:p>
          </table:table-cell>
          <table:table-cell office:value-type="float" office:value="0.68511688709259" calcext:value-type="float">
            <text:p>0.68511688709259</text:p>
          </table:table-cell>
          <table:table-cell office:value-type="float" office:value="0.425000011920929" calcext:value-type="float">
            <text:p>0.425000011920929</text:p>
          </table:table-cell>
          <table:table-cell office:value-type="float" office:value="0.714895606040955" calcext:value-type="float">
            <text:p>0.714895606040955</text:p>
          </table:table-cell>
          <table:table-cell table:style-name="ce1" office:value-type="string" calcext:value-type="string">
            <text:p>2025-11-18 10:04:28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2025-11-18 09:59:48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ub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91" calcext:value-type="float">
            <text:p>191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2025-11-18 09:59:48</text:p>
          </table:table-cell>
          <table:table-cell office:value-type="string" calcext:value-type="string">
            <text:p>2025-11-18 10:06:4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79" calcext:value-type="float">
            <text:p>479</text:p>
          </table:table-cell>
          <table:table-cell office:value-type="float" office:value="191" calcext:value-type="float">
            <text:p>191</text:p>
          </table:table-cell>
          <table:table-cell office:value-type="float" office:value="0.686667621135712" calcext:value-type="float">
            <text:p>0.686667621135712</text:p>
          </table:table-cell>
          <table:table-cell office:value-type="float" office:value="0.435000002384186" calcext:value-type="float">
            <text:p>0.435000002384186</text:p>
          </table:table-cell>
          <table:table-cell office:value-type="float" office:value="0.696318209171295" calcext:value-type="float">
            <text:p>0.696318209171295</text:p>
          </table:table-cell>
          <table:table-cell table:style-name="ce1" office:value-type="string" calcext:value-type="string">
            <text:p>2025-11-18 10:06:49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2025-11-18 10:04:44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o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92" calcext:value-type="float">
            <text:p>192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2025-11-18 10:04:44</text:p>
          </table:table-cell>
          <table:table-cell office:value-type="string" calcext:value-type="string">
            <text:p>2025-11-18 10:11:2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80" calcext:value-type="float">
            <text:p>480</text:p>
          </table:table-cell>
          <table:table-cell office:value-type="float" office:value="192" calcext:value-type="float">
            <text:p>192</text:p>
          </table:table-cell>
          <table:table-cell office:value-type="float" office:value="0.69110518693924" calcext:value-type="float">
            <text:p>0.69110518693924</text:p>
          </table:table-cell>
          <table:table-cell office:value-type="float" office:value="0.455000013113022" calcext:value-type="float">
            <text:p>0.455000013113022</text:p>
          </table:table-cell>
          <table:table-cell office:value-type="float" office:value="0.696816384792328" calcext:value-type="float">
            <text:p>0.696816384792328</text:p>
          </table:table-cell>
          <table:table-cell table:style-name="ce1" office:value-type="string" calcext:value-type="string">
            <text:p>2025-11-18 10:06:58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2025-11-18 10:04:44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o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92" calcext:value-type="float">
            <text:p>192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2025-11-18 10:04:44</text:p>
          </table:table-cell>
          <table:table-cell office:value-type="string" calcext:value-type="string">
            <text:p>2025-11-18 10:11:2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84" calcext:value-type="float">
            <text:p>484</text:p>
          </table:table-cell>
          <table:table-cell office:value-type="float" office:value="192" calcext:value-type="float">
            <text:p>192</text:p>
          </table:table-cell>
          <table:table-cell office:value-type="float" office:value="0.690271615982056" calcext:value-type="float">
            <text:p>0.690271615982056</text:p>
          </table:table-cell>
          <table:table-cell office:value-type="float" office:value="0.444999992847443" calcext:value-type="float">
            <text:p>0.444999992847443</text:p>
          </table:table-cell>
          <table:table-cell office:value-type="float" office:value="0.704955279827118" calcext:value-type="float">
            <text:p>0.704955279827118</text:p>
          </table:table-cell>
          <table:table-cell table:style-name="ce1" office:value-type="string" calcext:value-type="string">
            <text:p>2025-11-18 10:09:13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2025-11-18 10:04:44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o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92" calcext:value-type="float">
            <text:p>192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2025-11-18 10:04:44</text:p>
          </table:table-cell>
          <table:table-cell office:value-type="string" calcext:value-type="string">
            <text:p>2025-11-18 10:11:2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87" calcext:value-type="float">
            <text:p>487</text:p>
          </table:table-cell>
          <table:table-cell office:value-type="float" office:value="192" calcext:value-type="float">
            <text:p>192</text:p>
          </table:table-cell>
          <table:table-cell office:value-type="float" office:value="0.691584527492523" calcext:value-type="float">
            <text:p>0.691584527492523</text:p>
          </table:table-cell>
          <table:table-cell office:value-type="float" office:value="0.455000013113022" calcext:value-type="float">
            <text:p>0.455000013113022</text:p>
          </table:table-cell>
          <table:table-cell office:value-type="float" office:value="0.701121807098389" calcext:value-type="float">
            <text:p>0.701121807098389</text:p>
          </table:table-cell>
          <table:table-cell table:style-name="ce1" office:value-type="string" calcext:value-type="string">
            <text:p>2025-11-18 10:11:27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2025-11-18 10:04:4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93" calcext:value-type="float">
            <text:p>193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2025-11-18 10:04:49</text:p>
          </table:table-cell>
          <table:table-cell office:value-type="string" calcext:value-type="string">
            <text:p>2025-11-18 10:12:0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81" calcext:value-type="float">
            <text:p>481</text:p>
          </table:table-cell>
          <table:table-cell office:value-type="float" office:value="193" calcext:value-type="float">
            <text:p>193</text:p>
          </table:table-cell>
          <table:table-cell office:value-type="float" office:value="0.690398335456848" calcext:value-type="float">
            <text:p>0.690398335456848</text:p>
          </table:table-cell>
          <table:table-cell office:value-type="float" office:value="0.594999969005585" calcext:value-type="float">
            <text:p>0.594999969005585</text:p>
          </table:table-cell>
          <table:table-cell office:value-type="float" office:value="0.693512141704559" calcext:value-type="float">
            <text:p>0.693512141704559</text:p>
          </table:table-cell>
          <table:table-cell table:style-name="ce1" office:value-type="string" calcext:value-type="string">
            <text:p>2025-11-18 10:07:15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2025-11-18 10:04:4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93" calcext:value-type="float">
            <text:p>193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2025-11-18 10:04:49</text:p>
          </table:table-cell>
          <table:table-cell office:value-type="string" calcext:value-type="string">
            <text:p>2025-11-18 10:12:0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85" calcext:value-type="float">
            <text:p>485</text:p>
          </table:table-cell>
          <table:table-cell office:value-type="float" office:value="193" calcext:value-type="float">
            <text:p>193</text:p>
          </table:table-cell>
          <table:table-cell office:value-type="float" office:value="0.692354083061218" calcext:value-type="float">
            <text:p>0.692354083061218</text:p>
          </table:table-cell>
          <table:table-cell office:value-type="float" office:value="0.370000004768372" calcext:value-type="float">
            <text:p>0.370000004768372</text:p>
          </table:table-cell>
          <table:table-cell office:value-type="float" office:value="0.711328566074371" calcext:value-type="float">
            <text:p>0.711328566074371</text:p>
          </table:table-cell>
          <table:table-cell table:style-name="ce1" office:value-type="string" calcext:value-type="string">
            <text:p>2025-11-18 10:09:42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2025-11-18 10:04:4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93" calcext:value-type="float">
            <text:p>193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2025-11-18 10:04:49</text:p>
          </table:table-cell>
          <table:table-cell office:value-type="string" calcext:value-type="string">
            <text:p>2025-11-18 10:12:0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89" calcext:value-type="float">
            <text:p>489</text:p>
          </table:table-cell>
          <table:table-cell office:value-type="float" office:value="193" calcext:value-type="float">
            <text:p>193</text:p>
          </table:table-cell>
          <table:table-cell office:value-type="float" office:value="0.690528035163879" calcext:value-type="float">
            <text:p>0.690528035163879</text:p>
          </table:table-cell>
          <table:table-cell office:value-type="float" office:value="0.399999976158142" calcext:value-type="float">
            <text:p>0.399999976158142</text:p>
          </table:table-cell>
          <table:table-cell office:value-type="float" office:value="0.711481809616089" calcext:value-type="float">
            <text:p>0.711481809616089</text:p>
          </table:table-cell>
          <table:table-cell table:style-name="ce1" office:value-type="string" calcext:value-type="string">
            <text:p>2025-11-18 10:12:08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2025-11-18 10:06:56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ub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94" calcext:value-type="float">
            <text:p>194</text:p>
          </table:table-cell>
          <table:table-cell office:value-type="float" office:value="164" calcext:value-type="float">
            <text:p>164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2025-11-18 10:06:56</text:p>
          </table:table-cell>
          <table:table-cell office:value-type="string" calcext:value-type="string">
            <text:p>2025-11-18 10:10:0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82" calcext:value-type="float">
            <text:p>482</text:p>
          </table:table-cell>
          <table:table-cell office:value-type="float" office:value="194" calcext:value-type="float">
            <text:p>194</text:p>
          </table:table-cell>
          <table:table-cell office:value-type="float" office:value="0.689570486545563" calcext:value-type="float">
            <text:p>0.689570486545563</text:p>
          </table:table-cell>
          <table:table-cell office:value-type="float" office:value="0.540000021457672" calcext:value-type="float">
            <text:p>0.540000021457672</text:p>
          </table:table-cell>
          <table:table-cell office:value-type="float" office:value="0.688336610794067" calcext:value-type="float">
            <text:p>0.688336610794067</text:p>
          </table:table-cell>
          <table:table-cell table:style-name="ce1" office:value-type="string" calcext:value-type="string">
            <text:p>2025-11-18 10:07:59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2025-11-18 10:06:56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ub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94" calcext:value-type="float">
            <text:p>194</text:p>
          </table:table-cell>
          <table:table-cell office:value-type="float" office:value="164" calcext:value-type="float">
            <text:p>164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2025-11-18 10:06:56</text:p>
          </table:table-cell>
          <table:table-cell office:value-type="string" calcext:value-type="string">
            <text:p>2025-11-18 10:10:0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83" calcext:value-type="float">
            <text:p>483</text:p>
          </table:table-cell>
          <table:table-cell office:value-type="float" office:value="194" calcext:value-type="float">
            <text:p>194</text:p>
          </table:table-cell>
          <table:table-cell office:value-type="float" office:value="0.691624939441681" calcext:value-type="float">
            <text:p>0.691624939441681</text:p>
          </table:table-cell>
          <table:table-cell office:value-type="float" office:value="0.479999989271164" calcext:value-type="float">
            <text:p>0.479999989271164</text:p>
          </table:table-cell>
          <table:table-cell office:value-type="float" office:value="0.738082647323608" calcext:value-type="float">
            <text:p>0.738082647323608</text:p>
          </table:table-cell>
          <table:table-cell table:style-name="ce1" office:value-type="string" calcext:value-type="string">
            <text:p>2025-11-18 10:08:59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2025-11-18 10:06:56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ub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94" calcext:value-type="float">
            <text:p>194</text:p>
          </table:table-cell>
          <table:table-cell office:value-type="float" office:value="164" calcext:value-type="float">
            <text:p>164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2025-11-18 10:06:56</text:p>
          </table:table-cell>
          <table:table-cell office:value-type="string" calcext:value-type="string">
            <text:p>2025-11-18 10:10:0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86" calcext:value-type="float">
            <text:p>486</text:p>
          </table:table-cell>
          <table:table-cell office:value-type="float" office:value="194" calcext:value-type="float">
            <text:p>194</text:p>
          </table:table-cell>
          <table:table-cell office:value-type="float" office:value="0.688861072063446" calcext:value-type="float">
            <text:p>0.688861072063446</text:p>
          </table:table-cell>
          <table:table-cell office:value-type="float" office:value="0.46000000834465" calcext:value-type="float">
            <text:p>0.46000000834465</text:p>
          </table:table-cell>
          <table:table-cell office:value-type="float" office:value="0.751747846603394" calcext:value-type="float">
            <text:p>0.751747846603394</text:p>
          </table:table-cell>
          <table:table-cell table:style-name="ce1" office:value-type="string" calcext:value-type="string">
            <text:p>2025-11-18 10:10:02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2025-11-18 10:11:34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o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95" calcext:value-type="float">
            <text:p>19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2025-11-18 10:11:34</text:p>
          </table:table-cell>
          <table:table-cell office:value-type="string" calcext:value-type="string">
            <text:p>2025-11-18 10:21:4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93" calcext:value-type="float">
            <text:p>493</text:p>
          </table:table-cell>
          <table:table-cell office:value-type="float" office:value="195" calcext:value-type="float">
            <text:p>195</text:p>
          </table:table-cell>
          <table:table-cell office:value-type="float" office:value="0.682025372982025" calcext:value-type="float">
            <text:p>0.682025372982025</text:p>
          </table:table-cell>
          <table:table-cell office:value-type="float" office:value="0.409999996423721" calcext:value-type="float">
            <text:p>0.409999996423721</text:p>
          </table:table-cell>
          <table:table-cell office:value-type="float" office:value="0.719809472560883" calcext:value-type="float">
            <text:p>0.719809472560883</text:p>
          </table:table-cell>
          <table:table-cell table:style-name="ce1" office:value-type="string" calcext:value-type="string">
            <text:p>2025-11-18 10:14:58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2025-11-18 10:11:34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o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95" calcext:value-type="float">
            <text:p>19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2025-11-18 10:11:34</text:p>
          </table:table-cell>
          <table:table-cell office:value-type="string" calcext:value-type="string">
            <text:p>2025-11-18 10:21:4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94" calcext:value-type="float">
            <text:p>494</text:p>
          </table:table-cell>
          <table:table-cell office:value-type="float" office:value="195" calcext:value-type="float">
            <text:p>195</text:p>
          </table:table-cell>
          <table:table-cell office:value-type="float" office:value="0.68967878818512" calcext:value-type="float">
            <text:p>0.68967878818512</text:p>
          </table:table-cell>
          <table:table-cell office:value-type="float" office:value="0.474999994039536" calcext:value-type="float">
            <text:p>0.474999994039536</text:p>
          </table:table-cell>
          <table:table-cell office:value-type="float" office:value="0.714020371437073" calcext:value-type="float">
            <text:p>0.714020371437073</text:p>
          </table:table-cell>
          <table:table-cell table:style-name="ce1" office:value-type="string" calcext:value-type="string">
            <text:p>2025-11-18 10:18:22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2025-11-18 10:11:34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o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95" calcext:value-type="float">
            <text:p>19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2025-11-18 10:11:34</text:p>
          </table:table-cell>
          <table:table-cell office:value-type="string" calcext:value-type="string">
            <text:p>2025-11-18 10:21:4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96" calcext:value-type="float">
            <text:p>496</text:p>
          </table:table-cell>
          <table:table-cell office:value-type="float" office:value="195" calcext:value-type="float">
            <text:p>195</text:p>
          </table:table-cell>
          <table:table-cell office:value-type="float" office:value="0.664854228496552" calcext:value-type="float">
            <text:p>0.664854228496552</text:p>
          </table:table-cell>
          <table:table-cell office:value-type="float" office:value="0.444999992847443" calcext:value-type="float">
            <text:p>0.444999992847443</text:p>
          </table:table-cell>
          <table:table-cell office:value-type="float" office:value="0.738919913768768" calcext:value-type="float">
            <text:p>0.738919913768768</text:p>
          </table:table-cell>
          <table:table-cell table:style-name="ce1" office:value-type="string" calcext:value-type="string">
            <text:p>2025-11-18 10:21:46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2025-11-18 10:11:5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96" calcext:value-type="float">
            <text:p>196</text:p>
          </table:table-cell>
          <table:table-cell office:value-type="float" office:value="143" calcext:value-type="float">
            <text:p>143</text:p>
          </table:table-cell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2025-11-18 10:11:59</text:p>
          </table:table-cell>
          <table:table-cell office:value-type="string" calcext:value-type="string">
            <text:p>2025-11-18 10:37:0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95" calcext:value-type="float">
            <text:p>495</text:p>
          </table:table-cell>
          <table:table-cell office:value-type="float" office:value="196" calcext:value-type="float">
            <text:p>196</text:p>
          </table:table-cell>
          <table:table-cell office:value-type="float" office:value="0.68693333864212" calcext:value-type="float">
            <text:p>0.68693333864212</text:p>
          </table:table-cell>
          <table:table-cell office:value-type="float" office:value="0.439999997615814" calcext:value-type="float">
            <text:p>0.439999997615814</text:p>
          </table:table-cell>
          <table:table-cell office:value-type="float" office:value="0.702451109886169" calcext:value-type="float">
            <text:p>0.702451109886169</text:p>
          </table:table-cell>
          <table:table-cell table:style-name="ce1" office:value-type="string" calcext:value-type="string">
            <text:p>2025-11-18 10:21:27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2025-11-18 10:11:5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96" calcext:value-type="float">
            <text:p>196</text:p>
          </table:table-cell>
          <table:table-cell office:value-type="float" office:value="143" calcext:value-type="float">
            <text:p>143</text:p>
          </table:table-cell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2025-11-18 10:11:59</text:p>
          </table:table-cell>
          <table:table-cell office:value-type="string" calcext:value-type="string">
            <text:p>2025-11-18 10:37:0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500" calcext:value-type="float">
            <text:p>500</text:p>
          </table:table-cell>
          <table:table-cell office:value-type="float" office:value="196" calcext:value-type="float">
            <text:p>196</text:p>
          </table:table-cell>
          <table:table-cell office:value-type="float" office:value="0.683195412158966" calcext:value-type="float">
            <text:p>0.683195412158966</text:p>
          </table:table-cell>
          <table:table-cell office:value-type="float" office:value="0.430000007152557" calcext:value-type="float">
            <text:p>0.430000007152557</text:p>
          </table:table-cell>
          <table:table-cell office:value-type="float" office:value="0.711016833782196" calcext:value-type="float">
            <text:p>0.711016833782196</text:p>
          </table:table-cell>
          <table:table-cell table:style-name="ce1" office:value-type="string" calcext:value-type="string">
            <text:p>2025-11-18 10:28:58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2025-11-18 10:11:5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96" calcext:value-type="float">
            <text:p>196</text:p>
          </table:table-cell>
          <table:table-cell office:value-type="float" office:value="143" calcext:value-type="float">
            <text:p>143</text:p>
          </table:table-cell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2025-11-18 10:11:59</text:p>
          </table:table-cell>
          <table:table-cell office:value-type="string" calcext:value-type="string">
            <text:p>2025-11-18 10:37:0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504" calcext:value-type="float">
            <text:p>504</text:p>
          </table:table-cell>
          <table:table-cell office:value-type="float" office:value="196" calcext:value-type="float">
            <text:p>196</text:p>
          </table:table-cell>
          <table:table-cell office:value-type="float" office:value="0.680097341537476" calcext:value-type="float">
            <text:p>0.680097341537476</text:p>
          </table:table-cell>
          <table:table-cell office:value-type="float" office:value="0.455000013113022" calcext:value-type="float">
            <text:p>0.455000013113022</text:p>
          </table:table-cell>
          <table:table-cell office:value-type="float" office:value="0.740202724933624" calcext:value-type="float">
            <text:p>0.740202724933624</text:p>
          </table:table-cell>
          <table:table-cell table:style-name="ce1" office:value-type="string" calcext:value-type="string">
            <text:p>2025-11-18 10:37:00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2025-11-18 10:12:15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97" calcext:value-type="float">
            <text:p>197</text:p>
          </table:table-cell>
          <table:table-cell office:value-type="float" office:value="110" calcext:value-type="float">
            <text:p>110</text:p>
          </table:table-cell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2025-11-18 10:12:15</text:p>
          </table:table-cell>
          <table:table-cell office:value-type="string" calcext:value-type="string">
            <text:p>2025-11-18 10:14:5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90" calcext:value-type="float">
            <text:p>490</text:p>
          </table:table-cell>
          <table:table-cell office:value-type="float" office:value="197" calcext:value-type="float">
            <text:p>197</text:p>
          </table:table-cell>
          <table:table-cell office:value-type="float" office:value="0.690378785133362" calcext:value-type="float">
            <text:p>0.690378785133362</text:p>
          </table:table-cell>
          <table:table-cell office:value-type="float" office:value="0.435000002384186" calcext:value-type="float">
            <text:p>0.435000002384186</text:p>
          </table:table-cell>
          <table:table-cell office:value-type="float" office:value="0.714457452297211" calcext:value-type="float">
            <text:p>0.714457452297211</text:p>
          </table:table-cell>
          <table:table-cell table:style-name="ce1" office:value-type="string" calcext:value-type="string">
            <text:p>2025-11-18 10:13:08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2025-11-18 10:12:15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97" calcext:value-type="float">
            <text:p>197</text:p>
          </table:table-cell>
          <table:table-cell office:value-type="float" office:value="110" calcext:value-type="float">
            <text:p>110</text:p>
          </table:table-cell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2025-11-18 10:12:15</text:p>
          </table:table-cell>
          <table:table-cell office:value-type="string" calcext:value-type="string">
            <text:p>2025-11-18 10:14:5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91" calcext:value-type="float">
            <text:p>491</text:p>
          </table:table-cell>
          <table:table-cell office:value-type="float" office:value="197" calcext:value-type="float">
            <text:p>197</text:p>
          </table:table-cell>
          <table:table-cell office:value-type="float" office:value="0.693334460258484" calcext:value-type="float">
            <text:p>0.693334460258484</text:p>
          </table:table-cell>
          <table:table-cell office:value-type="float" office:value="0.455000013113022" calcext:value-type="float">
            <text:p>0.455000013113022</text:p>
          </table:table-cell>
          <table:table-cell office:value-type="float" office:value="0.700787782669067" calcext:value-type="float">
            <text:p>0.700787782669067</text:p>
          </table:table-cell>
          <table:table-cell table:style-name="ce1" office:value-type="string" calcext:value-type="string">
            <text:p>2025-11-18 10:14:01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2025-11-18 10:12:15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97" calcext:value-type="float">
            <text:p>197</text:p>
          </table:table-cell>
          <table:table-cell office:value-type="float" office:value="110" calcext:value-type="float">
            <text:p>110</text:p>
          </table:table-cell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2025-11-18 10:12:15</text:p>
          </table:table-cell>
          <table:table-cell office:value-type="string" calcext:value-type="string">
            <text:p>2025-11-18 10:14:5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92" calcext:value-type="float">
            <text:p>492</text:p>
          </table:table-cell>
          <table:table-cell office:value-type="float" office:value="197" calcext:value-type="float">
            <text:p>197</text:p>
          </table:table-cell>
          <table:table-cell office:value-type="float" office:value="0.692261159420013" calcext:value-type="float">
            <text:p>0.692261159420013</text:p>
          </table:table-cell>
          <table:table-cell office:value-type="float" office:value="0.425000011920929" calcext:value-type="float">
            <text:p>0.425000011920929</text:p>
          </table:table-cell>
          <table:table-cell office:value-type="float" office:value="0.708423316478729" calcext:value-type="float">
            <text:p>0.708423316478729</text:p>
          </table:table-cell>
          <table:table-cell table:style-name="ce1" office:value-type="string" calcext:value-type="string">
            <text:p>2025-11-18 10:14:54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2025-11-18 10:21:53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o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2025-11-18 10:21:53</text:p>
          </table:table-cell>
          <table:table-cell office:value-type="string" calcext:value-type="string">
            <text:p>2025-11-18 10:28:5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97" calcext:value-type="float">
            <text:p>497</text:p>
          </table:table-cell>
          <table:table-cell office:value-type="float" office:value="198" calcext:value-type="float">
            <text:p>198</text:p>
          </table:table-cell>
          <table:table-cell office:value-type="float" office:value="0.682800054550171" calcext:value-type="float">
            <text:p>0.682800054550171</text:p>
          </table:table-cell>
          <table:table-cell office:value-type="float" office:value="0.455000013113022" calcext:value-type="float">
            <text:p>0.455000013113022</text:p>
          </table:table-cell>
          <table:table-cell office:value-type="float" office:value="0.709057748317719" calcext:value-type="float">
            <text:p>0.709057748317719</text:p>
          </table:table-cell>
          <table:table-cell table:style-name="ce1" office:value-type="string" calcext:value-type="string">
            <text:p>2025-11-18 10:24:12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2025-11-18 10:21:53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o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2025-11-18 10:21:53</text:p>
          </table:table-cell>
          <table:table-cell office:value-type="string" calcext:value-type="string">
            <text:p>2025-11-18 10:28:5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98" calcext:value-type="float">
            <text:p>498</text:p>
          </table:table-cell>
          <table:table-cell office:value-type="float" office:value="198" calcext:value-type="float">
            <text:p>198</text:p>
          </table:table-cell>
          <table:table-cell office:value-type="float" office:value="0.682367503643036" calcext:value-type="float">
            <text:p>0.682367503643036</text:p>
          </table:table-cell>
          <table:table-cell office:value-type="float" office:value="0.444999992847443" calcext:value-type="float">
            <text:p>0.444999992847443</text:p>
          </table:table-cell>
          <table:table-cell office:value-type="float" office:value="0.707893073558807" calcext:value-type="float">
            <text:p>0.707893073558807</text:p>
          </table:table-cell>
          <table:table-cell table:style-name="ce1" office:value-type="string" calcext:value-type="string">
            <text:p>2025-11-18 10:26:31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2025-11-18 10:21:53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o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2025-11-18 10:21:53</text:p>
          </table:table-cell>
          <table:table-cell office:value-type="string" calcext:value-type="string">
            <text:p>2025-11-18 10:28:5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99" calcext:value-type="float">
            <text:p>499</text:p>
          </table:table-cell>
          <table:table-cell office:value-type="float" office:value="198" calcext:value-type="float">
            <text:p>198</text:p>
          </table:table-cell>
          <table:table-cell office:value-type="float" office:value="0.682425677776337" calcext:value-type="float">
            <text:p>0.682425677776337</text:p>
          </table:table-cell>
          <table:table-cell office:value-type="float" office:value="0.439999997615814" calcext:value-type="float">
            <text:p>0.439999997615814</text:p>
          </table:table-cell>
          <table:table-cell office:value-type="float" office:value="0.695025682449341" calcext:value-type="float">
            <text:p>0.695025682449341</text:p>
          </table:table-cell>
          <table:table-cell table:style-name="ce1" office:value-type="string" calcext:value-type="string">
            <text:p>2025-11-18 10:28:51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2025-11-18 10:28:5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o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2025-11-18 10:28:59</text:p>
          </table:table-cell>
          <table:table-cell office:value-type="string" calcext:value-type="string">
            <text:p>2025-11-18 10:34:2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501" calcext:value-type="float">
            <text:p>501</text:p>
          </table:table-cell>
          <table:table-cell office:value-type="float" office:value="199" calcext:value-type="float">
            <text:p>199</text:p>
          </table:table-cell>
          <table:table-cell office:value-type="float" office:value="0.690298676490784" calcext:value-type="float">
            <text:p>0.690298676490784</text:p>
          </table:table-cell>
          <table:table-cell office:value-type="float" office:value="0.474999994039536" calcext:value-type="float">
            <text:p>0.474999994039536</text:p>
          </table:table-cell>
          <table:table-cell office:value-type="float" office:value="0.736715793609619" calcext:value-type="float">
            <text:p>0.736715793609619</text:p>
          </table:table-cell>
          <table:table-cell table:style-name="ce1" office:value-type="string" calcext:value-type="string">
            <text:p>2025-11-18 10:30:46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2025-11-18 10:28:5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o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2025-11-18 10:28:59</text:p>
          </table:table-cell>
          <table:table-cell office:value-type="string" calcext:value-type="string">
            <text:p>2025-11-18 10:34:2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502" calcext:value-type="float">
            <text:p>502</text:p>
          </table:table-cell>
          <table:table-cell office:value-type="float" office:value="199" calcext:value-type="float">
            <text:p>199</text:p>
          </table:table-cell>
          <table:table-cell office:value-type="float" office:value="0.690550804138184" calcext:value-type="float">
            <text:p>0.690550804138184</text:p>
          </table:table-cell>
          <table:table-cell office:value-type="float" office:value="0.5" calcext:value-type="float">
            <text:p>0.5</text:p>
          </table:table-cell>
          <table:table-cell office:value-type="float" office:value="0.798870801925659" calcext:value-type="float">
            <text:p>0.798870801925659</text:p>
          </table:table-cell>
          <table:table-cell table:style-name="ce1" office:value-type="string" calcext:value-type="string">
            <text:p>2025-11-18 10:32:34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2025-11-18 10:28:5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o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2025-11-18 10:28:59</text:p>
          </table:table-cell>
          <table:table-cell office:value-type="string" calcext:value-type="string">
            <text:p>2025-11-18 10:34:2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503" calcext:value-type="float">
            <text:p>503</text:p>
          </table:table-cell>
          <table:table-cell office:value-type="float" office:value="199" calcext:value-type="float">
            <text:p>199</text:p>
          </table:table-cell>
          <table:table-cell office:value-type="float" office:value="0.692072570323944" calcext:value-type="float">
            <text:p>0.692072570323944</text:p>
          </table:table-cell>
          <table:table-cell office:value-type="float" office:value="0.514999985694885" calcext:value-type="float">
            <text:p>0.514999985694885</text:p>
          </table:table-cell>
          <table:table-cell office:value-type="float" office:value="0.680443823337555" calcext:value-type="float">
            <text:p>0.680443823337555</text:p>
          </table:table-cell>
          <table:table-cell table:style-name="ce1" office:value-type="string" calcext:value-type="string">
            <text:p>2025-11-18 10:34:24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2025-11-18 10:37:05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2025-11-18 10:37:05</text:p>
          </table:table-cell>
          <table:table-cell office:value-type="string" calcext:value-type="string">
            <text:p>2025-11-18 10:52:4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office:value-type="float" office:value="200" calcext:value-type="float">
            <text:p>200</text:p>
          </table:table-cell>
          <table:table-cell office:value-type="float" office:value="0.689153015613556" calcext:value-type="float">
            <text:p>0.689153015613556</text:p>
          </table:table-cell>
          <table:table-cell office:value-type="float" office:value="0.560000002384186" calcext:value-type="float">
            <text:p>0.560000002384186</text:p>
          </table:table-cell>
          <table:table-cell office:value-type="float" office:value="0.696942746639252" calcext:value-type="float">
            <text:p>0.696942746639252</text:p>
          </table:table-cell>
          <table:table-cell table:style-name="ce1" office:value-type="string" calcext:value-type="string">
            <text:p>2025-11-18 10:44:14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2025-11-18 10:37:05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2025-11-18 10:37:05</text:p>
          </table:table-cell>
          <table:table-cell office:value-type="string" calcext:value-type="string">
            <text:p>2025-11-18 10:52:4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506" calcext:value-type="float">
            <text:p>506</text:p>
          </table:table-cell>
          <table:table-cell office:value-type="float" office:value="200" calcext:value-type="float">
            <text:p>200</text:p>
          </table:table-cell>
          <table:table-cell office:value-type="float" office:value="0.688002526760101" calcext:value-type="float">
            <text:p>0.688002526760101</text:p>
          </table:table-cell>
          <table:table-cell office:value-type="float" office:value="0.564999997615814" calcext:value-type="float">
            <text:p>0.564999997615814</text:p>
          </table:table-cell>
          <table:table-cell office:value-type="float" office:value="0.686168849468231" calcext:value-type="float">
            <text:p>0.686168849468231</text:p>
          </table:table-cell>
          <table:table-cell table:style-name="ce1" office:value-type="string" calcext:value-type="string">
            <text:p>2025-11-18 10:49:07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2025-11-18 10:37:05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2025-11-18 10:37:05</text:p>
          </table:table-cell>
          <table:table-cell office:value-type="string" calcext:value-type="string">
            <text:p>2025-11-18 10:52:4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507" calcext:value-type="float">
            <text:p>507</text:p>
          </table:table-cell>
          <table:table-cell office:value-type="float" office:value="200" calcext:value-type="float">
            <text:p>200</text:p>
          </table:table-cell>
          <table:table-cell office:value-type="float" office:value="0.688793957233429" calcext:value-type="float">
            <text:p>0.688793957233429</text:p>
          </table:table-cell>
          <table:table-cell office:value-type="float" office:value="0.594999969005585" calcext:value-type="float">
            <text:p>0.594999969005585</text:p>
          </table:table-cell>
          <table:table-cell office:value-type="float" office:value="0.697164177894592" calcext:value-type="float">
            <text:p>0.697164177894592</text:p>
          </table:table-cell>
          <table:table-cell table:style-name="ce1" office:value-type="string" calcext:value-type="string">
            <text:p>2025-11-18 10:52:41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2025-11-18 10:52:47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01" calcext:value-type="float">
            <text:p>201</text:p>
          </table:table-cell>
          <table:table-cell office:value-type="float" office:value="145" calcext:value-type="float">
            <text:p>145</text:p>
          </table:table-cell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2025-11-18 10:52:47</text:p>
          </table:table-cell>
          <table:table-cell office:value-type="string" calcext:value-type="string">
            <text:p>2025-11-18 11:15:4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508" calcext:value-type="float">
            <text:p>508</text:p>
          </table:table-cell>
          <table:table-cell office:value-type="float" office:value="201" calcext:value-type="float">
            <text:p>201</text:p>
          </table:table-cell>
          <table:table-cell office:value-type="float" office:value="0.690043151378632" calcext:value-type="float">
            <text:p>0.690043151378632</text:p>
          </table:table-cell>
          <table:table-cell office:value-type="float" office:value="0.474999994039536" calcext:value-type="float">
            <text:p>0.474999994039536</text:p>
          </table:table-cell>
          <table:table-cell office:value-type="float" office:value="0.710647523403168" calcext:value-type="float">
            <text:p>0.710647523403168</text:p>
          </table:table-cell>
          <table:table-cell table:style-name="ce1" office:value-type="string" calcext:value-type="string">
            <text:p>2025-11-18 10:57:11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2025-11-18 10:52:47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01" calcext:value-type="float">
            <text:p>201</text:p>
          </table:table-cell>
          <table:table-cell office:value-type="float" office:value="145" calcext:value-type="float">
            <text:p>145</text:p>
          </table:table-cell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2025-11-18 10:52:47</text:p>
          </table:table-cell>
          <table:table-cell office:value-type="string" calcext:value-type="string">
            <text:p>2025-11-18 11:15:4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509" calcext:value-type="float">
            <text:p>509</text:p>
          </table:table-cell>
          <table:table-cell office:value-type="float" office:value="201" calcext:value-type="float">
            <text:p>201</text:p>
          </table:table-cell>
          <table:table-cell office:value-type="float" office:value="0.68916666507721" calcext:value-type="float">
            <text:p>0.68916666507721</text:p>
          </table:table-cell>
          <table:table-cell office:value-type="float" office:value="0.435000002384186" calcext:value-type="float">
            <text:p>0.435000002384186</text:p>
          </table:table-cell>
          <table:table-cell office:value-type="float" office:value="0.716654181480408" calcext:value-type="float">
            <text:p>0.716654181480408</text:p>
          </table:table-cell>
          <table:table-cell table:style-name="ce1" office:value-type="string" calcext:value-type="string">
            <text:p>2025-11-18 11:06:27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2025-11-18 10:52:47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01" calcext:value-type="float">
            <text:p>201</text:p>
          </table:table-cell>
          <table:table-cell office:value-type="float" office:value="145" calcext:value-type="float">
            <text:p>145</text:p>
          </table:table-cell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2025-11-18 10:52:47</text:p>
          </table:table-cell>
          <table:table-cell office:value-type="string" calcext:value-type="string">
            <text:p>2025-11-18 11:15:4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510" calcext:value-type="float">
            <text:p>510</text:p>
          </table:table-cell>
          <table:table-cell office:value-type="float" office:value="201" calcext:value-type="float">
            <text:p>201</text:p>
          </table:table-cell>
          <table:table-cell office:value-type="float" office:value="0.68648087978363" calcext:value-type="float">
            <text:p>0.68648087978363</text:p>
          </table:table-cell>
          <table:table-cell office:value-type="float" office:value="0.419999986886978" calcext:value-type="float">
            <text:p>0.419999986886978</text:p>
          </table:table-cell>
          <table:table-cell office:value-type="float" office:value="0.730689942836762" calcext:value-type="float">
            <text:p>0.730689942836762</text:p>
          </table:table-cell>
          <table:table-cell table:style-name="ce1" office:value-type="string" calcext:value-type="string">
            <text:p>2025-11-18 11:15:42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2025-11-18 11:17:37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d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02" calcext:value-type="float">
            <text:p>202</text:p>
          </table:table-cell>
          <table:table-cell office:value-type="float" office:value="101" calcext:value-type="float">
            <text:p>101</text:p>
          </table:table-cell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2025-11-18 11:17:37</text:p>
          </table:table-cell>
          <table:table-cell office:value-type="string" calcext:value-type="string">
            <text:p>2025-11-18 11:57:4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511" calcext:value-type="float">
            <text:p>511</text:p>
          </table:table-cell>
          <table:table-cell office:value-type="float" office:value="202" calcext:value-type="float">
            <text:p>202</text:p>
          </table:table-cell>
          <table:table-cell office:value-type="float" office:value="0.598444640636444" calcext:value-type="float">
            <text:p>0.598444640636444</text:p>
          </table:table-cell>
          <table:table-cell office:value-type="float" office:value="0.430000007152557" calcext:value-type="float">
            <text:p>0.430000007152557</text:p>
          </table:table-cell>
          <table:table-cell office:value-type="float" office:value="0.886345982551575" calcext:value-type="float">
            <text:p>0.886345982551575</text:p>
          </table:table-cell>
          <table:table-cell table:style-name="ce1" office:value-type="string" calcext:value-type="string">
            <text:p>2025-11-18 11:31:02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2025-11-18 11:17:37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d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02" calcext:value-type="float">
            <text:p>202</text:p>
          </table:table-cell>
          <table:table-cell office:value-type="float" office:value="101" calcext:value-type="float">
            <text:p>101</text:p>
          </table:table-cell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2025-11-18 11:17:37</text:p>
          </table:table-cell>
          <table:table-cell office:value-type="string" calcext:value-type="string">
            <text:p>2025-11-18 11:57:4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512" calcext:value-type="float">
            <text:p>512</text:p>
          </table:table-cell>
          <table:table-cell office:value-type="float" office:value="202" calcext:value-type="float">
            <text:p>202</text:p>
          </table:table-cell>
          <table:table-cell office:value-type="float" office:value="0.598990082740784" calcext:value-type="float">
            <text:p>0.598990082740784</text:p>
          </table:table-cell>
          <table:table-cell office:value-type="float" office:value="0.439999997615814" calcext:value-type="float">
            <text:p>0.439999997615814</text:p>
          </table:table-cell>
          <table:table-cell office:value-type="float" office:value="0.870135188102722" calcext:value-type="float">
            <text:p>0.870135188102722</text:p>
          </table:table-cell>
          <table:table-cell table:style-name="ce1" office:value-type="string" calcext:value-type="string">
            <text:p>2025-11-18 11:44:25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2025-11-18 11:17:37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d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02" calcext:value-type="float">
            <text:p>202</text:p>
          </table:table-cell>
          <table:table-cell office:value-type="float" office:value="101" calcext:value-type="float">
            <text:p>101</text:p>
          </table:table-cell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2025-11-18 11:17:37</text:p>
          </table:table-cell>
          <table:table-cell office:value-type="string" calcext:value-type="string">
            <text:p>2025-11-18 11:57:4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513" calcext:value-type="float">
            <text:p>513</text:p>
          </table:table-cell>
          <table:table-cell office:value-type="float" office:value="202" calcext:value-type="float">
            <text:p>202</text:p>
          </table:table-cell>
          <table:table-cell office:value-type="float" office:value="0.601932644844055" calcext:value-type="float">
            <text:p>0.601932644844055</text:p>
          </table:table-cell>
          <table:table-cell office:value-type="float" office:value="0.469999998807907" calcext:value-type="float">
            <text:p>0.469999998807907</text:p>
          </table:table-cell>
          <table:table-cell office:value-type="float" office:value="0.866793811321259" calcext:value-type="float">
            <text:p>0.866793811321259</text:p>
          </table:table-cell>
          <table:table-cell table:style-name="ce1" office:value-type="string" calcext:value-type="string">
            <text:p>2025-11-18 11:57:44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2025-11-18 11:57:52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d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03" calcext:value-type="float">
            <text:p>203</text:p>
          </table:table-cell>
          <table:table-cell office:value-type="float" office:value="102" calcext:value-type="float">
            <text:p>102</text:p>
          </table:table-cell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2025-11-18 11:57:52</text:p>
          </table:table-cell>
          <table:table-cell office:value-type="string" calcext:value-type="string">
            <text:p>2025-11-18 12:01:13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14" calcext:value-type="float">
            <text:p>514</text:p>
          </table:table-cell>
          <table:table-cell office:value-type="float" office:value="203" calcext:value-type="float">
            <text:p>203</text:p>
          </table:table-cell>
          <table:table-cell office:value-type="float" office:value="0.644552171230316" calcext:value-type="float">
            <text:p>0.644552171230316</text:p>
          </table:table-cell>
          <table:table-cell office:value-type="float" office:value="0.409999996423721" calcext:value-type="float">
            <text:p>0.409999996423721</text:p>
          </table:table-cell>
          <table:table-cell office:value-type="float" office:value="0.784216225147247" calcext:value-type="float">
            <text:p>0.784216225147247</text:p>
          </table:table-cell>
          <table:table-cell table:style-name="ce1" office:value-type="string" calcext:value-type="string">
            <text:p>2025-11-18 11:58:59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2025-11-18 11:57:52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d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03" calcext:value-type="float">
            <text:p>203</text:p>
          </table:table-cell>
          <table:table-cell office:value-type="float" office:value="102" calcext:value-type="float">
            <text:p>102</text:p>
          </table:table-cell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2025-11-18 11:57:52</text:p>
          </table:table-cell>
          <table:table-cell office:value-type="string" calcext:value-type="string">
            <text:p>2025-11-18 12:01:13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15" calcext:value-type="float">
            <text:p>515</text:p>
          </table:table-cell>
          <table:table-cell office:value-type="float" office:value="203" calcext:value-type="float">
            <text:p>203</text:p>
          </table:table-cell>
          <table:table-cell office:value-type="float" office:value="0.647563338279724" calcext:value-type="float">
            <text:p>0.647563338279724</text:p>
          </table:table-cell>
          <table:table-cell office:value-type="float" office:value="0.375" calcext:value-type="float">
            <text:p>0.375</text:p>
          </table:table-cell>
          <table:table-cell office:value-type="float" office:value="0.754568457603455" calcext:value-type="float">
            <text:p>0.754568457603455</text:p>
          </table:table-cell>
          <table:table-cell table:style-name="ce1" office:value-type="string" calcext:value-type="string">
            <text:p>2025-11-18 12:00:06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2025-11-18 11:57:52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d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03" calcext:value-type="float">
            <text:p>203</text:p>
          </table:table-cell>
          <table:table-cell office:value-type="float" office:value="102" calcext:value-type="float">
            <text:p>102</text:p>
          </table:table-cell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2025-11-18 11:57:52</text:p>
          </table:table-cell>
          <table:table-cell office:value-type="string" calcext:value-type="string">
            <text:p>2025-11-18 12:01:13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16" calcext:value-type="float">
            <text:p>516</text:p>
          </table:table-cell>
          <table:table-cell office:value-type="float" office:value="203" calcext:value-type="float">
            <text:p>203</text:p>
          </table:table-cell>
          <table:table-cell office:value-type="float" office:value="0.684646129608154" calcext:value-type="float">
            <text:p>0.684646129608154</text:p>
          </table:table-cell>
          <table:table-cell office:value-type="float" office:value="0.5" calcext:value-type="float">
            <text:p>0.5</text:p>
          </table:table-cell>
          <table:table-cell office:value-type="float" office:value="0.699928522109985" calcext:value-type="float">
            <text:p>0.699928522109985</text:p>
          </table:table-cell>
          <table:table-cell table:style-name="ce1" office:value-type="string" calcext:value-type="string">
            <text:p>2025-11-18 12:01:13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2025-11-18 12:01:20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d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04" calcext:value-type="float">
            <text:p>204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2025-11-18 12:01:20</text:p>
          </table:table-cell>
          <table:table-cell office:value-type="string" calcext:value-type="string">
            <text:p>2025-11-18 12:11:1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517" calcext:value-type="float">
            <text:p>517</text:p>
          </table:table-cell>
          <table:table-cell office:value-type="float" office:value="204" calcext:value-type="float">
            <text:p>204</text:p>
          </table:table-cell>
          <table:table-cell office:value-type="float" office:value="0.531351089477539" calcext:value-type="float">
            <text:p>0.531351089477539</text:p>
          </table:table-cell>
          <table:table-cell office:value-type="float" office:value="0.495000004768372" calcext:value-type="float">
            <text:p>0.495000004768372</text:p>
          </table:table-cell>
          <table:table-cell office:value-type="float" office:value="0.834276378154755" calcext:value-type="float">
            <text:p>0.834276378154755</text:p>
          </table:table-cell>
          <table:table-cell table:style-name="ce1" office:value-type="string" calcext:value-type="string">
            <text:p>2025-11-18 12:04:38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2025-11-18 12:01:20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d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04" calcext:value-type="float">
            <text:p>204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2025-11-18 12:01:20</text:p>
          </table:table-cell>
          <table:table-cell office:value-type="string" calcext:value-type="string">
            <text:p>2025-11-18 12:11:1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518" calcext:value-type="float">
            <text:p>518</text:p>
          </table:table-cell>
          <table:table-cell office:value-type="float" office:value="204" calcext:value-type="float">
            <text:p>204</text:p>
          </table:table-cell>
          <table:table-cell office:value-type="float" office:value="0.525014340877533" calcext:value-type="float">
            <text:p>0.525014340877533</text:p>
          </table:table-cell>
          <table:table-cell office:value-type="float" office:value="0.479999989271164" calcext:value-type="float">
            <text:p>0.479999989271164</text:p>
          </table:table-cell>
          <table:table-cell office:value-type="float" office:value="0.819918811321259" calcext:value-type="float">
            <text:p>0.819918811321259</text:p>
          </table:table-cell>
          <table:table-cell table:style-name="ce1" office:value-type="string" calcext:value-type="string">
            <text:p>2025-11-18 12:07:54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2025-11-18 12:01:20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d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04" calcext:value-type="float">
            <text:p>204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2025-11-18 12:01:20</text:p>
          </table:table-cell>
          <table:table-cell office:value-type="string" calcext:value-type="string">
            <text:p>2025-11-18 12:11:1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519" calcext:value-type="float">
            <text:p>519</text:p>
          </table:table-cell>
          <table:table-cell office:value-type="float" office:value="204" calcext:value-type="float">
            <text:p>204</text:p>
          </table:table-cell>
          <table:table-cell office:value-type="float" office:value="0.500405073165894" calcext:value-type="float">
            <text:p>0.500405073165894</text:p>
          </table:table-cell>
          <table:table-cell office:value-type="float" office:value="0.46000000834465" calcext:value-type="float">
            <text:p>0.46000000834465</text:p>
          </table:table-cell>
          <table:table-cell office:value-type="float" office:value="0.907436192035675" calcext:value-type="float">
            <text:p>0.907436192035675</text:p>
          </table:table-cell>
          <table:table-cell table:style-name="ce1" office:value-type="string" calcext:value-type="string">
            <text:p>2025-11-18 12:11:12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2025-11-18 12:11:1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d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05" calcext:value-type="float">
            <text:p>205</text:p>
          </table:table-cell>
          <table:table-cell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2025-11-18 12:11:19</text:p>
          </table:table-cell>
          <table:table-cell office:value-type="string" calcext:value-type="string">
            <text:p>2025-11-18 12:16:1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520" calcext:value-type="float">
            <text:p>520</text:p>
          </table:table-cell>
          <table:table-cell office:value-type="float" office:value="205" calcext:value-type="float">
            <text:p>205</text:p>
          </table:table-cell>
          <table:table-cell office:value-type="float" office:value="0.60138475894928" calcext:value-type="float">
            <text:p>0.60138475894928</text:p>
          </table:table-cell>
          <table:table-cell office:value-type="float" office:value="0.509999990463257" calcext:value-type="float">
            <text:p>0.509999990463257</text:p>
          </table:table-cell>
          <table:table-cell office:value-type="float" office:value="0.712419033050537" calcext:value-type="float">
            <text:p>0.712419033050537</text:p>
          </table:table-cell>
          <table:table-cell table:style-name="ce1" office:value-type="string" calcext:value-type="string">
            <text:p>2025-11-18 12:12:55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2025-11-18 12:11:1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d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05" calcext:value-type="float">
            <text:p>205</text:p>
          </table:table-cell>
          <table:table-cell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2025-11-18 12:11:19</text:p>
          </table:table-cell>
          <table:table-cell office:value-type="string" calcext:value-type="string">
            <text:p>2025-11-18 12:16:1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521" calcext:value-type="float">
            <text:p>521</text:p>
          </table:table-cell>
          <table:table-cell office:value-type="float" office:value="205" calcext:value-type="float">
            <text:p>205</text:p>
          </table:table-cell>
          <table:table-cell office:value-type="float" office:value="0.602372944355011" calcext:value-type="float">
            <text:p>0.602372944355011</text:p>
          </table:table-cell>
          <table:table-cell office:value-type="float" office:value="0.5" calcext:value-type="float">
            <text:p>0.5</text:p>
          </table:table-cell>
          <table:table-cell office:value-type="float" office:value="0.692962348461151" calcext:value-type="float">
            <text:p>0.692962348461151</text:p>
          </table:table-cell>
          <table:table-cell table:style-name="ce1" office:value-type="string" calcext:value-type="string">
            <text:p>2025-11-18 12:14:36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2025-11-18 12:11:1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d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05" calcext:value-type="float">
            <text:p>205</text:p>
          </table:table-cell>
          <table:table-cell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2025-11-18 12:11:19</text:p>
          </table:table-cell>
          <table:table-cell office:value-type="string" calcext:value-type="string">
            <text:p>2025-11-18 12:16:1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522" calcext:value-type="float">
            <text:p>522</text:p>
          </table:table-cell>
          <table:table-cell office:value-type="float" office:value="205" calcext:value-type="float">
            <text:p>205</text:p>
          </table:table-cell>
          <table:table-cell office:value-type="float" office:value="0.598014175891876" calcext:value-type="float">
            <text:p>0.598014175891876</text:p>
          </table:table-cell>
          <table:table-cell office:value-type="float" office:value="0.564999997615814" calcext:value-type="float">
            <text:p>0.564999997615814</text:p>
          </table:table-cell>
          <table:table-cell office:value-type="float" office:value="0.709744095802307" calcext:value-type="float">
            <text:p>0.709744095802307</text:p>
          </table:table-cell>
          <table:table-cell table:style-name="ce1" office:value-type="string" calcext:value-type="string">
            <text:p>2025-11-18 12:16:14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73" calcext:value-type="float">
            <text:p>73</text:p>
          </table:table-cell>
          <table:table-cell table:style-name="ce1" office:value-type="string" calcext:value-type="string">
            <text:p>2025-11-18 12:16:21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d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06" calcext:value-type="float">
            <text:p>206</text:p>
          </table:table-cell>
          <table:table-cell office:value-type="float" office:value="105" calcext:value-type="float">
            <text:p>105</text:p>
          </table:table-cell>
          <table:table-cell office:value-type="float" office:value="73" calcext:value-type="float">
            <text:p>73</text:p>
          </table:table-cell>
          <table:table-cell table:style-name="ce1" office:value-type="string" calcext:value-type="string">
            <text:p>2025-11-18 12:16:21</text:p>
          </table:table-cell>
          <table:table-cell office:value-type="string" calcext:value-type="string">
            <text:p>2025-11-18 12:18:25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523" calcext:value-type="float">
            <text:p>523</text:p>
          </table:table-cell>
          <table:table-cell office:value-type="float" office:value="206" calcext:value-type="float">
            <text:p>206</text:p>
          </table:table-cell>
          <table:table-cell office:value-type="float" office:value="0.533403635025024" calcext:value-type="float">
            <text:p>0.533403635025024</text:p>
          </table:table-cell>
          <table:table-cell office:value-type="float" office:value="0.435000002384186" calcext:value-type="float">
            <text:p>0.435000002384186</text:p>
          </table:table-cell>
          <table:table-cell office:value-type="float" office:value="0.801879584789276" calcext:value-type="float">
            <text:p>0.801879584789276</text:p>
          </table:table-cell>
          <table:table-cell table:style-name="ce1" office:value-type="string" calcext:value-type="string">
            <text:p>2025-11-18 12:17:03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73" calcext:value-type="float">
            <text:p>73</text:p>
          </table:table-cell>
          <table:table-cell table:style-name="ce1" office:value-type="string" calcext:value-type="string">
            <text:p>2025-11-18 12:16:21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d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06" calcext:value-type="float">
            <text:p>206</text:p>
          </table:table-cell>
          <table:table-cell office:value-type="float" office:value="105" calcext:value-type="float">
            <text:p>105</text:p>
          </table:table-cell>
          <table:table-cell office:value-type="float" office:value="73" calcext:value-type="float">
            <text:p>73</text:p>
          </table:table-cell>
          <table:table-cell table:style-name="ce1" office:value-type="string" calcext:value-type="string">
            <text:p>2025-11-18 12:16:21</text:p>
          </table:table-cell>
          <table:table-cell office:value-type="string" calcext:value-type="string">
            <text:p>2025-11-18 12:18:25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524" calcext:value-type="float">
            <text:p>524</text:p>
          </table:table-cell>
          <table:table-cell office:value-type="float" office:value="206" calcext:value-type="float">
            <text:p>206</text:p>
          </table:table-cell>
          <table:table-cell office:value-type="float" office:value="0.554944753646851" calcext:value-type="float">
            <text:p>0.554944753646851</text:p>
          </table:table-cell>
          <table:table-cell office:value-type="float" office:value="0.444999992847443" calcext:value-type="float">
            <text:p>0.444999992847443</text:p>
          </table:table-cell>
          <table:table-cell office:value-type="float" office:value="0.786348819732666" calcext:value-type="float">
            <text:p>0.786348819732666</text:p>
          </table:table-cell>
          <table:table-cell table:style-name="ce1" office:value-type="string" calcext:value-type="string">
            <text:p>2025-11-18 12:17:43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73" calcext:value-type="float">
            <text:p>73</text:p>
          </table:table-cell>
          <table:table-cell table:style-name="ce1" office:value-type="string" calcext:value-type="string">
            <text:p>2025-11-18 12:16:21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d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06" calcext:value-type="float">
            <text:p>206</text:p>
          </table:table-cell>
          <table:table-cell office:value-type="float" office:value="105" calcext:value-type="float">
            <text:p>105</text:p>
          </table:table-cell>
          <table:table-cell office:value-type="float" office:value="73" calcext:value-type="float">
            <text:p>73</text:p>
          </table:table-cell>
          <table:table-cell table:style-name="ce1" office:value-type="string" calcext:value-type="string">
            <text:p>2025-11-18 12:16:21</text:p>
          </table:table-cell>
          <table:table-cell office:value-type="string" calcext:value-type="string">
            <text:p>2025-11-18 12:18:25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525" calcext:value-type="float">
            <text:p>525</text:p>
          </table:table-cell>
          <table:table-cell office:value-type="float" office:value="206" calcext:value-type="float">
            <text:p>206</text:p>
          </table:table-cell>
          <table:table-cell office:value-type="float" office:value="0.542791545391083" calcext:value-type="float">
            <text:p>0.542791545391083</text:p>
          </table:table-cell>
          <table:table-cell office:value-type="float" office:value="0.569999992847443" calcext:value-type="float">
            <text:p>0.569999992847443</text:p>
          </table:table-cell>
          <table:table-cell office:value-type="float" office:value="0.766165852546692" calcext:value-type="float">
            <text:p>0.766165852546692</text:p>
          </table:table-cell>
          <table:table-cell table:style-name="ce1" office:value-type="string" calcext:value-type="string">
            <text:p>2025-11-18 12:18:25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74" calcext:value-type="float">
            <text:p>74</text:p>
          </table:table-cell>
          <table:table-cell table:style-name="ce1" office:value-type="string" calcext:value-type="string">
            <text:p>2025-11-18 15:59:41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emb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07" calcext:value-type="float">
            <text:p>207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table:style-name="ce1" office:value-type="string" calcext:value-type="string">
            <text:p>2025-11-18 15:59:41</text:p>
          </table:table-cell>
          <table:table-cell office:value-type="string" calcext:value-type="string">
            <text:p>2025-11-18 16:19:0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526" calcext:value-type="float">
            <text:p>526</text:p>
          </table:table-cell>
          <table:table-cell office:value-type="float" office:value="207" calcext:value-type="float">
            <text:p>207</text:p>
          </table:table-cell>
          <table:table-cell office:value-type="float" office:value="0.709944307804108" calcext:value-type="float">
            <text:p>0.709944307804108</text:p>
          </table:table-cell>
          <table:table-cell office:value-type="float" office:value="0.5799999833107" calcext:value-type="float">
            <text:p>0.5799999833107</text:p>
          </table:table-cell>
          <table:table-cell office:value-type="float" office:value="0.654448628425598" calcext:value-type="float">
            <text:p>0.654448628425598</text:p>
          </table:table-cell>
          <table:table-cell table:style-name="ce1" office:value-type="string" calcext:value-type="string">
            <text:p>2025-11-18 16:06:18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74" calcext:value-type="float">
            <text:p>74</text:p>
          </table:table-cell>
          <table:table-cell table:style-name="ce1" office:value-type="string" calcext:value-type="string">
            <text:p>2025-11-18 15:59:41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emb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07" calcext:value-type="float">
            <text:p>207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table:style-name="ce1" office:value-type="string" calcext:value-type="string">
            <text:p>2025-11-18 15:59:41</text:p>
          </table:table-cell>
          <table:table-cell office:value-type="string" calcext:value-type="string">
            <text:p>2025-11-18 16:19:0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527" calcext:value-type="float">
            <text:p>527</text:p>
          </table:table-cell>
          <table:table-cell office:value-type="float" office:value="207" calcext:value-type="float">
            <text:p>207</text:p>
          </table:table-cell>
          <table:table-cell office:value-type="float" office:value="0.705729722976685" calcext:value-type="float">
            <text:p>0.705729722976685</text:p>
          </table:table-cell>
          <table:table-cell office:value-type="float" office:value="0.46000000834465" calcext:value-type="float">
            <text:p>0.46000000834465</text:p>
          </table:table-cell>
          <table:table-cell office:value-type="float" office:value="0.708796918392181" calcext:value-type="float">
            <text:p>0.708796918392181</text:p>
          </table:table-cell>
          <table:table-cell table:style-name="ce1" office:value-type="string" calcext:value-type="string">
            <text:p>2025-11-18 16:12:45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74" calcext:value-type="float">
            <text:p>74</text:p>
          </table:table-cell>
          <table:table-cell table:style-name="ce1" office:value-type="string" calcext:value-type="string">
            <text:p>2025-11-18 15:59:41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emb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07" calcext:value-type="float">
            <text:p>207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table:style-name="ce1" office:value-type="string" calcext:value-type="string">
            <text:p>2025-11-18 15:59:41</text:p>
          </table:table-cell>
          <table:table-cell office:value-type="string" calcext:value-type="string">
            <text:p>2025-11-18 16:19:0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528" calcext:value-type="float">
            <text:p>528</text:p>
          </table:table-cell>
          <table:table-cell office:value-type="float" office:value="207" calcext:value-type="float">
            <text:p>207</text:p>
          </table:table-cell>
          <table:table-cell office:value-type="float" office:value="0.700463175773621" calcext:value-type="float">
            <text:p>0.700463175773621</text:p>
          </table:table-cell>
          <table:table-cell office:value-type="float" office:value="0.490000009536743" calcext:value-type="float">
            <text:p>0.490000009536743</text:p>
          </table:table-cell>
          <table:table-cell office:value-type="float" office:value="0.728492140769959" calcext:value-type="float">
            <text:p>0.728492140769959</text:p>
          </table:table-cell>
          <table:table-cell table:style-name="ce1" office:value-type="string" calcext:value-type="string">
            <text:p>2025-11-18 16:19:06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2025-11-18 16:19:12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emb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08" calcext:value-type="float">
            <text:p>208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2025-11-18 16:19:12</text:p>
          </table:table-cell>
          <table:table-cell office:value-type="string" calcext:value-type="string">
            <text:p>2025-11-18 16:22:5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29" calcext:value-type="float">
            <text:p>529</text:p>
          </table:table-cell>
          <table:table-cell office:value-type="float" office:value="208" calcext:value-type="float">
            <text:p>208</text:p>
          </table:table-cell>
          <table:table-cell office:value-type="float" office:value="0.692253351211548" calcext:value-type="float">
            <text:p>0.692253351211548</text:p>
          </table:table-cell>
          <table:table-cell office:value-type="float" office:value="0.524999976158142" calcext:value-type="float">
            <text:p>0.524999976158142</text:p>
          </table:table-cell>
          <table:table-cell office:value-type="float" office:value="0.709683775901794" calcext:value-type="float">
            <text:p>0.709683775901794</text:p>
          </table:table-cell>
          <table:table-cell table:style-name="ce1" office:value-type="string" calcext:value-type="string">
            <text:p>2025-11-18 16:20:27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2025-11-18 16:19:12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emb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08" calcext:value-type="float">
            <text:p>208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2025-11-18 16:19:12</text:p>
          </table:table-cell>
          <table:table-cell office:value-type="string" calcext:value-type="string">
            <text:p>2025-11-18 16:22:5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30" calcext:value-type="float">
            <text:p>530</text:p>
          </table:table-cell>
          <table:table-cell office:value-type="float" office:value="208" calcext:value-type="float">
            <text:p>208</text:p>
          </table:table-cell>
          <table:table-cell office:value-type="float" office:value="0.695407390594482" calcext:value-type="float">
            <text:p>0.695407390594482</text:p>
          </table:table-cell>
          <table:table-cell office:value-type="float" office:value="0.5" calcext:value-type="float">
            <text:p>0.5</text:p>
          </table:table-cell>
          <table:table-cell office:value-type="float" office:value="0.693410575389862" calcext:value-type="float">
            <text:p>0.693410575389862</text:p>
          </table:table-cell>
          <table:table-cell table:style-name="ce1" office:value-type="string" calcext:value-type="string">
            <text:p>2025-11-18 16:21:42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2025-11-18 16:19:12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emb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08" calcext:value-type="float">
            <text:p>208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2025-11-18 16:19:12</text:p>
          </table:table-cell>
          <table:table-cell office:value-type="string" calcext:value-type="string">
            <text:p>2025-11-18 16:22:5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0.692334175109863" calcext:value-type="float">
            <text:p>0.692334175109863</text:p>
          </table:table-cell>
          <table:table-cell office:value-type="float" office:value="0.395000010728836" calcext:value-type="float">
            <text:p>0.395000010728836</text:p>
          </table:table-cell>
          <table:table-cell office:value-type="float" office:value="0.715420007705689" calcext:value-type="float">
            <text:p>0.715420007705689</text:p>
          </table:table-cell>
          <table:table-cell table:style-name="ce1" office:value-type="string" calcext:value-type="string">
            <text:p>2025-11-18 16:22:56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76" calcext:value-type="float">
            <text:p>76</text:p>
          </table:table-cell>
          <table:table-cell table:style-name="ce1" office:value-type="string" calcext:value-type="string">
            <text:p>2025-11-18 16:23:04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emb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09" calcext:value-type="float">
            <text:p>209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table:style-name="ce1" office:value-type="string" calcext:value-type="string">
            <text:p>2025-11-18 16:23:04</text:p>
          </table:table-cell>
          <table:table-cell office:value-type="string" calcext:value-type="string">
            <text:p>2025-11-18 16:25:2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532" calcext:value-type="float">
            <text:p>532</text:p>
          </table:table-cell>
          <table:table-cell office:value-type="float" office:value="209" calcext:value-type="float">
            <text:p>209</text:p>
          </table:table-cell>
          <table:table-cell office:value-type="float" office:value="0.689386367797852" calcext:value-type="float">
            <text:p>0.689386367797852</text:p>
          </table:table-cell>
          <table:table-cell office:value-type="float" office:value="0.485000014305115" calcext:value-type="float">
            <text:p>0.485000014305115</text:p>
          </table:table-cell>
          <table:table-cell office:value-type="float" office:value="0.705414593219757" calcext:value-type="float">
            <text:p>0.705414593219757</text:p>
          </table:table-cell>
          <table:table-cell table:style-name="ce1" office:value-type="string" calcext:value-type="string">
            <text:p>2025-11-18 16:23:50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76" calcext:value-type="float">
            <text:p>76</text:p>
          </table:table-cell>
          <table:table-cell table:style-name="ce1" office:value-type="string" calcext:value-type="string">
            <text:p>2025-11-18 16:23:04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emb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09" calcext:value-type="float">
            <text:p>209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table:style-name="ce1" office:value-type="string" calcext:value-type="string">
            <text:p>2025-11-18 16:23:04</text:p>
          </table:table-cell>
          <table:table-cell office:value-type="string" calcext:value-type="string">
            <text:p>2025-11-18 16:25:2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533" calcext:value-type="float">
            <text:p>533</text:p>
          </table:table-cell>
          <table:table-cell office:value-type="float" office:value="209" calcext:value-type="float">
            <text:p>209</text:p>
          </table:table-cell>
          <table:table-cell office:value-type="float" office:value="0.686907947063446" calcext:value-type="float">
            <text:p>0.686907947063446</text:p>
          </table:table-cell>
          <table:table-cell office:value-type="float" office:value="0.5" calcext:value-type="float">
            <text:p>0.5</text:p>
          </table:table-cell>
          <table:table-cell office:value-type="float" office:value="0.712196826934815" calcext:value-type="float">
            <text:p>0.712196826934815</text:p>
          </table:table-cell>
          <table:table-cell table:style-name="ce1" office:value-type="string" calcext:value-type="string">
            <text:p>2025-11-18 16:24:35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76" calcext:value-type="float">
            <text:p>76</text:p>
          </table:table-cell>
          <table:table-cell table:style-name="ce1" office:value-type="string" calcext:value-type="string">
            <text:p>2025-11-18 16:23:04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emb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09" calcext:value-type="float">
            <text:p>209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table:style-name="ce1" office:value-type="string" calcext:value-type="string">
            <text:p>2025-11-18 16:23:04</text:p>
          </table:table-cell>
          <table:table-cell office:value-type="string" calcext:value-type="string">
            <text:p>2025-11-18 16:25:2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534" calcext:value-type="float">
            <text:p>534</text:p>
          </table:table-cell>
          <table:table-cell office:value-type="float" office:value="209" calcext:value-type="float">
            <text:p>209</text:p>
          </table:table-cell>
          <table:table-cell office:value-type="float" office:value="0.6916863322258" calcext:value-type="float">
            <text:p>0.6916863322258</text:p>
          </table:table-cell>
          <table:table-cell office:value-type="float" office:value="0.425000011920929" calcext:value-type="float">
            <text:p>0.425000011920929</text:p>
          </table:table-cell>
          <table:table-cell office:value-type="float" office:value="0.797420501708984" calcext:value-type="float">
            <text:p>0.797420501708984</text:p>
          </table:table-cell>
          <table:table-cell table:style-name="ce1" office:value-type="string" calcext:value-type="string">
            <text:p>2025-11-18 16:25:20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77" calcext:value-type="float">
            <text:p>77</text:p>
          </table:table-cell>
          <table:table-cell table:style-name="ce1" office:value-type="string" calcext:value-type="string">
            <text:p>2025-11-18 16:25:27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emb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table:style-name="ce1" office:value-type="string" calcext:value-type="string">
            <text:p>2025-11-18 16:25:27</text:p>
          </table:table-cell>
          <table:table-cell office:value-type="string" calcext:value-type="string">
            <text:p>2025-11-18 16:28:5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535" calcext:value-type="float">
            <text:p>535</text:p>
          </table:table-cell>
          <table:table-cell office:value-type="float" office:value="210" calcext:value-type="float">
            <text:p>210</text:p>
          </table:table-cell>
          <table:table-cell office:value-type="float" office:value="0.686685860157013" calcext:value-type="float">
            <text:p>0.686685860157013</text:p>
          </table:table-cell>
          <table:table-cell office:value-type="float" office:value="0.539999961853027" calcext:value-type="float">
            <text:p>0.539999961853027</text:p>
          </table:table-cell>
          <table:table-cell office:value-type="float" office:value="0.702338874340057" calcext:value-type="float">
            <text:p>0.702338874340057</text:p>
          </table:table-cell>
          <table:table-cell table:style-name="ce1" office:value-type="string" calcext:value-type="string">
            <text:p>2025-11-18 16:26:35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77" calcext:value-type="float">
            <text:p>77</text:p>
          </table:table-cell>
          <table:table-cell table:style-name="ce1" office:value-type="string" calcext:value-type="string">
            <text:p>2025-11-18 16:25:27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emb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table:style-name="ce1" office:value-type="string" calcext:value-type="string">
            <text:p>2025-11-18 16:25:27</text:p>
          </table:table-cell>
          <table:table-cell office:value-type="string" calcext:value-type="string">
            <text:p>2025-11-18 16:28:5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536" calcext:value-type="float">
            <text:p>536</text:p>
          </table:table-cell>
          <table:table-cell office:value-type="float" office:value="210" calcext:value-type="float">
            <text:p>210</text:p>
          </table:table-cell>
          <table:table-cell office:value-type="float" office:value="0.677786111831665" calcext:value-type="float">
            <text:p>0.677786111831665</text:p>
          </table:table-cell>
          <table:table-cell office:value-type="float" office:value="0.545000016689301" calcext:value-type="float">
            <text:p>0.545000016689301</text:p>
          </table:table-cell>
          <table:table-cell office:value-type="float" office:value="0.697558999061585" calcext:value-type="float">
            <text:p>0.697558999061585</text:p>
          </table:table-cell>
          <table:table-cell table:style-name="ce1" office:value-type="string" calcext:value-type="string">
            <text:p>2025-11-18 16:27:43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77" calcext:value-type="float">
            <text:p>77</text:p>
          </table:table-cell>
          <table:table-cell table:style-name="ce1" office:value-type="string" calcext:value-type="string">
            <text:p>2025-11-18 16:25:27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emb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table:style-name="ce1" office:value-type="string" calcext:value-type="string">
            <text:p>2025-11-18 16:25:27</text:p>
          </table:table-cell>
          <table:table-cell office:value-type="string" calcext:value-type="string">
            <text:p>2025-11-18 16:28:5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537" calcext:value-type="float">
            <text:p>537</text:p>
          </table:table-cell>
          <table:table-cell office:value-type="float" office:value="210" calcext:value-type="float">
            <text:p>210</text:p>
          </table:table-cell>
          <table:table-cell office:value-type="float" office:value="0.68661642074585" calcext:value-type="float">
            <text:p>0.68661642074585</text:p>
          </table:table-cell>
          <table:table-cell office:value-type="float" office:value="0.474999994039536" calcext:value-type="float">
            <text:p>0.474999994039536</text:p>
          </table:table-cell>
          <table:table-cell office:value-type="float" office:value="0.701477944850922" calcext:value-type="float">
            <text:p>0.701477944850922</text:p>
          </table:table-cell>
          <table:table-cell table:style-name="ce1" office:value-type="string" calcext:value-type="string">
            <text:p>2025-11-18 16:28:51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2025-11-18 16:28:5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emb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11" calcext:value-type="float">
            <text:p>211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2025-11-18 16:28:59</text:p>
          </table:table-cell>
          <table:table-cell office:value-type="string" calcext:value-type="string">
            <text:p>2025-11-18 16:30:0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538" calcext:value-type="float">
            <text:p>538</text:p>
          </table:table-cell>
          <table:table-cell office:value-type="float" office:value="211" calcext:value-type="float">
            <text:p>211</text:p>
          </table:table-cell>
          <table:table-cell office:value-type="float" office:value="0.69075208902359" calcext:value-type="float">
            <text:p>0.69075208902359</text:p>
          </table:table-cell>
          <table:table-cell office:value-type="float" office:value="0.485000014305115" calcext:value-type="float">
            <text:p>0.485000014305115</text:p>
          </table:table-cell>
          <table:table-cell office:value-type="float" office:value="0.722702503204346" calcext:value-type="float">
            <text:p>0.722702503204346</text:p>
          </table:table-cell>
          <table:table-cell table:style-name="ce1" office:value-type="string" calcext:value-type="string">
            <text:p>2025-11-18 16:29:22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2025-11-18 16:28:5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emb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11" calcext:value-type="float">
            <text:p>211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2025-11-18 16:28:59</text:p>
          </table:table-cell>
          <table:table-cell office:value-type="string" calcext:value-type="string">
            <text:p>2025-11-18 16:30:0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539" calcext:value-type="float">
            <text:p>539</text:p>
          </table:table-cell>
          <table:table-cell office:value-type="float" office:value="211" calcext:value-type="float">
            <text:p>211</text:p>
          </table:table-cell>
          <table:table-cell office:value-type="float" office:value="0.695443451404572" calcext:value-type="float">
            <text:p>0.695443451404572</text:p>
          </table:table-cell>
          <table:table-cell office:value-type="float" office:value="0.375" calcext:value-type="float">
            <text:p>0.375</text:p>
          </table:table-cell>
          <table:table-cell office:value-type="float" office:value="0.74766343832016" calcext:value-type="float">
            <text:p>0.74766343832016</text:p>
          </table:table-cell>
          <table:table-cell table:style-name="ce1" office:value-type="string" calcext:value-type="string">
            <text:p>2025-11-18 16:29:44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3_experiments</text:p>
          </table:table-cell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2025-11-18 16:28:5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emb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11" calcext:value-type="float">
            <text:p>211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2025-11-18 16:28:59</text:p>
          </table:table-cell>
          <table:table-cell office:value-type="string" calcext:value-type="string">
            <text:p>2025-11-18 16:30:0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540" calcext:value-type="float">
            <text:p>540</text:p>
          </table:table-cell>
          <table:table-cell office:value-type="float" office:value="211" calcext:value-type="float">
            <text:p>211</text:p>
          </table:table-cell>
          <table:table-cell office:value-type="float" office:value="0.692590415477753" calcext:value-type="float">
            <text:p>0.692590415477753</text:p>
          </table:table-cell>
          <table:table-cell office:value-type="float" office:value="0.469999998807907" calcext:value-type="float">
            <text:p>0.469999998807907</text:p>
          </table:table-cell>
          <table:table-cell office:value-type="float" office:value="0.761248707771301" calcext:value-type="float">
            <text:p>0.761248707771301</text:p>
          </table:table-cell>
          <table:table-cell table:style-name="ce1" office:value-type="string" calcext:value-type="string">
            <text:p>2025-11-18 16:30:07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2025-11-17 17:08:01</text:p>
          </table:table-cell>
          <table:table-cell table:style-name="Default" office:value-type="string" calcext:value-type="string">
            <text:p>GCN</text:p>
          </table:table-cell>
          <table:table-cell office:value-type="string" calcext:value-type="string">
            <text:p>IMDB-MULTI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2025-11-17 17:08:01</text:p>
          </table:table-cell>
          <table:table-cell office:value-type="string" calcext:value-type="string">
            <text:p>2025-11-17 17:52:5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81" calcext:value-type="float">
            <text:p>181</text:p>
          </table:table-cell>
          <table:table-cell office:value-type="float" office:value="62" calcext:value-type="float">
            <text:p>62</text:p>
          </table:table-cell>
          <table:table-cell office:value-type="float" office:value="1.0945543050766" calcext:value-type="float">
            <text:p>1.0945543050766</text:p>
          </table:table-cell>
          <table:table-cell office:value-type="float" office:value="0.333333343267441" calcext:value-type="float">
            <text:p>0.333333343267441</text:p>
          </table:table-cell>
          <table:table-cell office:value-type="float" office:value="1.23095953464508" calcext:value-type="float">
            <text:p>1.23095953464508</text:p>
          </table:table-cell>
          <table:table-cell table:style-name="ce1" office:value-type="string" calcext:value-type="string">
            <text:p>2025-11-17 17:22:54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2025-11-17 17:08:01</text:p>
          </table:table-cell>
          <table:table-cell table:style-name="Default" office:value-type="string" calcext:value-type="string">
            <text:p>GCN</text:p>
          </table:table-cell>
          <table:table-cell office:value-type="string" calcext:value-type="string">
            <text:p>IMDB-MULTI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2025-11-17 17:08:01</text:p>
          </table:table-cell>
          <table:table-cell office:value-type="string" calcext:value-type="string">
            <text:p>2025-11-17 17:52:5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84" calcext:value-type="float">
            <text:p>184</text:p>
          </table:table-cell>
          <table:table-cell office:value-type="float" office:value="62" calcext:value-type="float">
            <text:p>62</text:p>
          </table:table-cell>
          <table:table-cell office:value-type="float" office:value="1.09296774864197" calcext:value-type="float">
            <text:p>1.09296774864197</text:p>
          </table:table-cell>
          <table:table-cell office:value-type="float" office:value="0.333333343267441" calcext:value-type="float">
            <text:p>0.333333343267441</text:p>
          </table:table-cell>
          <table:table-cell office:value-type="float" office:value="1.77626991271973" calcext:value-type="float">
            <text:p>1.77626991271973</text:p>
          </table:table-cell>
          <table:table-cell table:style-name="ce1" office:value-type="string" calcext:value-type="string">
            <text:p>2025-11-17 17:37:55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2025-11-17 17:08:01</text:p>
          </table:table-cell>
          <table:table-cell table:style-name="Default" office:value-type="string" calcext:value-type="string">
            <text:p>GCN</text:p>
          </table:table-cell>
          <table:table-cell office:value-type="string" calcext:value-type="string">
            <text:p>IMDB-MULTI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2025-11-17 17:08:01</text:p>
          </table:table-cell>
          <table:table-cell office:value-type="string" calcext:value-type="string">
            <text:p>2025-11-17 17:52:5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91" calcext:value-type="float">
            <text:p>191</text:p>
          </table:table-cell>
          <table:table-cell office:value-type="float" office:value="62" calcext:value-type="float">
            <text:p>62</text:p>
          </table:table-cell>
          <table:table-cell office:value-type="float" office:value="1.09409463405609" calcext:value-type="float">
            <text:p>1.09409463405609</text:p>
          </table:table-cell>
          <table:table-cell office:value-type="float" office:value="0.403333336114883" calcext:value-type="float">
            <text:p>0.403333336114883</text:p>
          </table:table-cell>
          <table:table-cell office:value-type="float" office:value="1.10863971710205" calcext:value-type="float">
            <text:p>1.10863971710205</text:p>
          </table:table-cell>
          <table:table-cell table:style-name="ce1" office:value-type="string" calcext:value-type="string">
            <text:p>2025-11-17 17:52:57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2025-11-17 17:32:21</text:p>
          </table:table-cell>
          <table:table-cell table:style-name="Default" office:value-type="string" calcext:value-type="string">
            <text:p>GCN</text:p>
          </table:table-cell>
          <table:table-cell office:value-type="string" calcext:value-type="string">
            <text:p>IMDB-MULTI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2025-11-17 17:32:21</text:p>
          </table:table-cell>
          <table:table-cell office:value-type="string" calcext:value-type="string">
            <text:p>2025-11-17 17:50:0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85" calcext:value-type="float">
            <text:p>185</text:p>
          </table:table-cell>
          <table:table-cell office:value-type="float" office:value="63" calcext:value-type="float">
            <text:p>63</text:p>
          </table:table-cell>
          <table:table-cell office:value-type="float" office:value="1.09852361679077" calcext:value-type="float">
            <text:p>1.09852361679077</text:p>
          </table:table-cell>
          <table:table-cell office:value-type="float" office:value="0.333333343267441" calcext:value-type="float">
            <text:p>0.333333343267441</text:p>
          </table:table-cell>
          <table:table-cell office:value-type="float" office:value="1.09764420986176" calcext:value-type="float">
            <text:p>1.09764420986176</text:p>
          </table:table-cell>
          <table:table-cell table:style-name="ce1" office:value-type="string" calcext:value-type="string">
            <text:p>2025-11-17 17:38:22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2025-11-17 17:32:21</text:p>
          </table:table-cell>
          <table:table-cell table:style-name="Default" office:value-type="string" calcext:value-type="string">
            <text:p>GCN</text:p>
          </table:table-cell>
          <table:table-cell office:value-type="string" calcext:value-type="string">
            <text:p>IMDB-MULTI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2025-11-17 17:32:21</text:p>
          </table:table-cell>
          <table:table-cell office:value-type="string" calcext:value-type="string">
            <text:p>2025-11-17 17:50:0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87" calcext:value-type="float">
            <text:p>187</text:p>
          </table:table-cell>
          <table:table-cell office:value-type="float" office:value="63" calcext:value-type="float">
            <text:p>63</text:p>
          </table:table-cell>
          <table:table-cell office:value-type="float" office:value="1.09856247901917" calcext:value-type="float">
            <text:p>1.09856247901917</text:p>
          </table:table-cell>
          <table:table-cell office:value-type="float" office:value="0.333333343267441" calcext:value-type="float">
            <text:p>0.333333343267441</text:p>
          </table:table-cell>
          <table:table-cell office:value-type="float" office:value="1.09821331501007" calcext:value-type="float">
            <text:p>1.09821331501007</text:p>
          </table:table-cell>
          <table:table-cell table:style-name="ce1" office:value-type="string" calcext:value-type="string">
            <text:p>2025-11-17 17:44:16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2025-11-17 17:32:21</text:p>
          </table:table-cell>
          <table:table-cell table:style-name="Default" office:value-type="string" calcext:value-type="string">
            <text:p>GCN</text:p>
          </table:table-cell>
          <table:table-cell office:value-type="string" calcext:value-type="string">
            <text:p>IMDB-MULTI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2025-11-17 17:32:21</text:p>
          </table:table-cell>
          <table:table-cell office:value-type="string" calcext:value-type="string">
            <text:p>2025-11-17 17:50:0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1.09824216365814" calcext:value-type="float">
            <text:p>1.09824216365814</text:p>
          </table:table-cell>
          <table:table-cell office:value-type="float" office:value="0.403333336114883" calcext:value-type="float">
            <text:p>0.403333336114883</text:p>
          </table:table-cell>
          <table:table-cell office:value-type="float" office:value="1.09535992145538" calcext:value-type="float">
            <text:p>1.09535992145538</text:p>
          </table:table-cell>
          <table:table-cell table:style-name="ce1" office:value-type="string" calcext:value-type="string">
            <text:p>2025-11-17 17:50:09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025-11-17 17:35:30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MULTI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025-11-17 17:35:30</text:p>
          </table:table-cell>
          <table:table-cell office:value-type="string" calcext:value-type="string">
            <text:p>2025-11-17 17:39:05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82" calcext:value-type="float">
            <text:p>182</text:p>
          </table:table-cell>
          <table:table-cell office:value-type="float" office:value="64" calcext:value-type="float">
            <text:p>64</text:p>
          </table:table-cell>
          <table:table-cell office:value-type="float" office:value="1.08492600917816" calcext:value-type="float">
            <text:p>1.08492600917816</text:p>
          </table:table-cell>
          <table:table-cell office:value-type="float" office:value="0.466666668653488" calcext:value-type="float">
            <text:p>0.466666668653488</text:p>
          </table:table-cell>
          <table:table-cell office:value-type="float" office:value="1.06892228126526" calcext:value-type="float">
            <text:p>1.06892228126526</text:p>
          </table:table-cell>
          <table:table-cell table:style-name="ce1" office:value-type="string" calcext:value-type="string">
            <text:p>2025-11-17 17:36:42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025-11-17 17:35:30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MULTI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025-11-17 17:35:30</text:p>
          </table:table-cell>
          <table:table-cell office:value-type="string" calcext:value-type="string">
            <text:p>2025-11-17 17:39:05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83" calcext:value-type="float">
            <text:p>183</text:p>
          </table:table-cell>
          <table:table-cell office:value-type="float" office:value="64" calcext:value-type="float">
            <text:p>64</text:p>
          </table:table-cell>
          <table:table-cell office:value-type="float" office:value="1.09202146530151" calcext:value-type="float">
            <text:p>1.09202146530151</text:p>
          </table:table-cell>
          <table:table-cell office:value-type="float" office:value="0.443333327770233" calcext:value-type="float">
            <text:p>0.443333327770233</text:p>
          </table:table-cell>
          <table:table-cell office:value-type="float" office:value="1.07540833950043" calcext:value-type="float">
            <text:p>1.07540833950043</text:p>
          </table:table-cell>
          <table:table-cell table:style-name="ce1" office:value-type="string" calcext:value-type="string">
            <text:p>2025-11-17 17:37:53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025-11-17 17:35:30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MULTI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025-11-17 17:35:30</text:p>
          </table:table-cell>
          <table:table-cell office:value-type="string" calcext:value-type="string">
            <text:p>2025-11-17 17:39:05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86" calcext:value-type="float">
            <text:p>186</text:p>
          </table:table-cell>
          <table:table-cell office:value-type="float" office:value="64" calcext:value-type="float">
            <text:p>64</text:p>
          </table:table-cell>
          <table:table-cell office:value-type="float" office:value="1.08742952346802" calcext:value-type="float">
            <text:p>1.08742952346802</text:p>
          </table:table-cell>
          <table:table-cell office:value-type="float" office:value="0.493333339691162" calcext:value-type="float">
            <text:p>0.493333339691162</text:p>
          </table:table-cell>
          <table:table-cell office:value-type="float" office:value="1.05592060089111" calcext:value-type="float">
            <text:p>1.05592060089111</text:p>
          </table:table-cell>
          <table:table-cell table:style-name="ce1" office:value-type="string" calcext:value-type="string">
            <text:p>2025-11-17 17:39:05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2025-11-17 17:40:12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MULTI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2025-11-17 17:40:12</text:p>
          </table:table-cell>
          <table:table-cell office:value-type="string" calcext:value-type="string">
            <text:p>2025-11-17 18:09:3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88" calcext:value-type="float">
            <text:p>188</text:p>
          </table:table-cell>
          <table:table-cell office:value-type="float" office:value="65" calcext:value-type="float">
            <text:p>65</text:p>
          </table:table-cell>
          <table:table-cell office:value-type="float" office:value="1.05543255805969" calcext:value-type="float">
            <text:p>1.05543255805969</text:p>
          </table:table-cell>
          <table:table-cell office:value-type="float" office:value="0.443333327770233" calcext:value-type="float">
            <text:p>0.443333327770233</text:p>
          </table:table-cell>
          <table:table-cell office:value-type="float" office:value="1.17729127407074" calcext:value-type="float">
            <text:p>1.17729127407074</text:p>
          </table:table-cell>
          <table:table-cell table:style-name="ce1" office:value-type="string" calcext:value-type="string">
            <text:p>2025-11-17 17:49:59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2025-11-17 17:40:12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MULTI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2025-11-17 17:40:12</text:p>
          </table:table-cell>
          <table:table-cell office:value-type="string" calcext:value-type="string">
            <text:p>2025-11-17 18:09:3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95" calcext:value-type="float">
            <text:p>195</text:p>
          </table:table-cell>
          <table:table-cell office:value-type="float" office:value="65" calcext:value-type="float">
            <text:p>65</text:p>
          </table:table-cell>
          <table:table-cell office:value-type="float" office:value="1.04414308071136" calcext:value-type="float">
            <text:p>1.04414308071136</text:p>
          </table:table-cell>
          <table:table-cell office:value-type="float" office:value="0.426666676998138" calcext:value-type="float">
            <text:p>0.426666676998138</text:p>
          </table:table-cell>
          <table:table-cell office:value-type="float" office:value="1.19641613960266" calcext:value-type="float">
            <text:p>1.19641613960266</text:p>
          </table:table-cell>
          <table:table-cell table:style-name="ce1" office:value-type="string" calcext:value-type="string">
            <text:p>2025-11-17 17:59:48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2025-11-17 17:40:12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MULTI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2025-11-17 17:40:12</text:p>
          </table:table-cell>
          <table:table-cell office:value-type="string" calcext:value-type="string">
            <text:p>2025-11-17 18:09:3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98" calcext:value-type="float">
            <text:p>198</text:p>
          </table:table-cell>
          <table:table-cell office:value-type="float" office:value="65" calcext:value-type="float">
            <text:p>65</text:p>
          </table:table-cell>
          <table:table-cell office:value-type="float" office:value="1.03432464599609" calcext:value-type="float">
            <text:p>1.03432464599609</text:p>
          </table:table-cell>
          <table:table-cell office:value-type="float" office:value="0.436666667461395" calcext:value-type="float">
            <text:p>0.436666667461395</text:p>
          </table:table-cell>
          <table:table-cell office:value-type="float" office:value="1.21817696094513" calcext:value-type="float">
            <text:p>1.21817696094513</text:p>
          </table:table-cell>
          <table:table-cell table:style-name="ce1" office:value-type="string" calcext:value-type="string">
            <text:p>2025-11-17 18:09:38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2025-11-17 17:51:15</text:p>
          </table:table-cell>
          <table:table-cell table:style-name="Default" office:value-type="string" calcext:value-type="string">
            <text:p>GCN</text:p>
          </table:table-cell>
          <table:table-cell office:value-type="string" calcext:value-type="string">
            <text:p>IMDB-MULTI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2025-11-17 17:51:15</text:p>
          </table:table-cell>
          <table:table-cell office:value-type="string" calcext:value-type="string">
            <text:p>2025-11-17 17:56:1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90" calcext:value-type="float">
            <text:p>190</text:p>
          </table:table-cell>
          <table:table-cell office:value-type="float" office:value="66" calcext:value-type="float">
            <text:p>66</text:p>
          </table:table-cell>
          <table:table-cell office:value-type="float" office:value="1.09750211238861" calcext:value-type="float">
            <text:p>1.09750211238861</text:p>
          </table:table-cell>
          <table:table-cell office:value-type="float" office:value="0.333333343267441" calcext:value-type="float">
            <text:p>0.333333343267441</text:p>
          </table:table-cell>
          <table:table-cell office:value-type="float" office:value="4.29110813140869" calcext:value-type="float">
            <text:p>4.29110813140869</text:p>
          </table:table-cell>
          <table:table-cell table:style-name="ce1" office:value-type="string" calcext:value-type="string">
            <text:p>2025-11-17 17:52:56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2025-11-17 17:51:15</text:p>
          </table:table-cell>
          <table:table-cell table:style-name="Default" office:value-type="string" calcext:value-type="string">
            <text:p>GCN</text:p>
          </table:table-cell>
          <table:table-cell office:value-type="string" calcext:value-type="string">
            <text:p>IMDB-MULTI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2025-11-17 17:51:15</text:p>
          </table:table-cell>
          <table:table-cell office:value-type="string" calcext:value-type="string">
            <text:p>2025-11-17 17:56:1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92" calcext:value-type="float">
            <text:p>192</text:p>
          </table:table-cell>
          <table:table-cell office:value-type="float" office:value="66" calcext:value-type="float">
            <text:p>66</text:p>
          </table:table-cell>
          <table:table-cell office:value-type="float" office:value="1.09662866592407" calcext:value-type="float">
            <text:p>1.09662866592407</text:p>
          </table:table-cell>
          <table:table-cell office:value-type="float" office:value="0.333333343267441" calcext:value-type="float">
            <text:p>0.333333343267441</text:p>
          </table:table-cell>
          <table:table-cell office:value-type="float" office:value="9.16090106964111" calcext:value-type="float">
            <text:p>9.16090106964111</text:p>
          </table:table-cell>
          <table:table-cell table:style-name="ce1" office:value-type="string" calcext:value-type="string">
            <text:p>2025-11-17 17:54:36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2025-11-17 17:51:15</text:p>
          </table:table-cell>
          <table:table-cell table:style-name="Default" office:value-type="string" calcext:value-type="string">
            <text:p>GCN</text:p>
          </table:table-cell>
          <table:table-cell office:value-type="string" calcext:value-type="string">
            <text:p>IMDB-MULTI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2025-11-17 17:51:15</text:p>
          </table:table-cell>
          <table:table-cell office:value-type="string" calcext:value-type="string">
            <text:p>2025-11-17 17:56:1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93" calcext:value-type="float">
            <text:p>193</text:p>
          </table:table-cell>
          <table:table-cell office:value-type="float" office:value="66" calcext:value-type="float">
            <text:p>66</text:p>
          </table:table-cell>
          <table:table-cell office:value-type="float" office:value="1.09642744064331" calcext:value-type="float">
            <text:p>1.09642744064331</text:p>
          </table:table-cell>
          <table:table-cell office:value-type="float" office:value="0.333333343267441" calcext:value-type="float">
            <text:p>0.333333343267441</text:p>
          </table:table-cell>
          <table:table-cell office:value-type="float" office:value="1.29887938499451" calcext:value-type="float">
            <text:p>1.29887938499451</text:p>
          </table:table-cell>
          <table:table-cell table:style-name="ce1" office:value-type="string" calcext:value-type="string">
            <text:p>2025-11-17 17:56:17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2025-11-17 17:57:23</text:p>
          </table:table-cell>
          <table:table-cell table:style-name="Default" office:value-type="string" calcext:value-type="string">
            <text:p>GCN</text:p>
          </table:table-cell>
          <table:table-cell office:value-type="string" calcext:value-type="string">
            <text:p>IMDB-MULTI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2025-11-17 17:57:23</text:p>
          </table:table-cell>
          <table:table-cell office:value-type="string" calcext:value-type="string">
            <text:p>2025-11-17 18:02:53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94" calcext:value-type="float">
            <text:p>194</text:p>
          </table:table-cell>
          <table:table-cell office:value-type="float" office:value="67" calcext:value-type="float">
            <text:p>67</text:p>
          </table:table-cell>
          <table:table-cell office:value-type="float" office:value="1.07278156280518" calcext:value-type="float">
            <text:p>1.07278156280518</text:p>
          </table:table-cell>
          <table:table-cell office:value-type="float" office:value="0.319999992847443" calcext:value-type="float">
            <text:p>0.319999992847443</text:p>
          </table:table-cell>
          <table:table-cell office:value-type="float" office:value="1.5600391626358" calcext:value-type="float">
            <text:p>1.5600391626358</text:p>
          </table:table-cell>
          <table:table-cell table:style-name="ce1" office:value-type="string" calcext:value-type="string">
            <text:p>2025-11-17 17:59:13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2025-11-17 17:57:23</text:p>
          </table:table-cell>
          <table:table-cell table:style-name="Default" office:value-type="string" calcext:value-type="string">
            <text:p>GCN</text:p>
          </table:table-cell>
          <table:table-cell office:value-type="string" calcext:value-type="string">
            <text:p>IMDB-MULTI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2025-11-17 17:57:23</text:p>
          </table:table-cell>
          <table:table-cell office:value-type="string" calcext:value-type="string">
            <text:p>2025-11-17 18:02:53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96" calcext:value-type="float">
            <text:p>196</text:p>
          </table:table-cell>
          <table:table-cell office:value-type="float" office:value="67" calcext:value-type="float">
            <text:p>67</text:p>
          </table:table-cell>
          <table:table-cell office:value-type="float" office:value="1.06459033489227" calcext:value-type="float">
            <text:p>1.06459033489227</text:p>
          </table:table-cell>
          <table:table-cell office:value-type="float" office:value="0.330000013113022" calcext:value-type="float">
            <text:p>0.330000013113022</text:p>
          </table:table-cell>
          <table:table-cell office:value-type="float" office:value="7.40115213394165" calcext:value-type="float">
            <text:p>7.40115213394165</text:p>
          </table:table-cell>
          <table:table-cell table:style-name="ce1" office:value-type="string" calcext:value-type="string">
            <text:p>2025-11-17 18:01:03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2025-11-17 17:57:23</text:p>
          </table:table-cell>
          <table:table-cell table:style-name="Default" office:value-type="string" calcext:value-type="string">
            <text:p>GCN</text:p>
          </table:table-cell>
          <table:table-cell office:value-type="string" calcext:value-type="string">
            <text:p>IMDB-MULTI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2025-11-17 17:57:23</text:p>
          </table:table-cell>
          <table:table-cell office:value-type="string" calcext:value-type="string">
            <text:p>2025-11-17 18:02:53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97" calcext:value-type="float">
            <text:p>197</text:p>
          </table:table-cell>
          <table:table-cell office:value-type="float" office:value="67" calcext:value-type="float">
            <text:p>67</text:p>
          </table:table-cell>
          <table:table-cell office:value-type="float" office:value="1.06367778778076" calcext:value-type="float">
            <text:p>1.06367778778076</text:p>
          </table:table-cell>
          <table:table-cell office:value-type="float" office:value="0.28999999165535" calcext:value-type="float">
            <text:p>0.28999999165535</text:p>
          </table:table-cell>
          <table:table-cell office:value-type="float" office:value="1.17335081100464" calcext:value-type="float">
            <text:p>1.17335081100464</text:p>
          </table:table-cell>
          <table:table-cell table:style-name="ce1" office:value-type="string" calcext:value-type="string">
            <text:p>2025-11-17 18:02:53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2025-11-17 18:03:59</text:p>
          </table:table-cell>
          <table:table-cell table:style-name="Default" office:value-type="string" calcext:value-type="string">
            <text:p>GCN</text:p>
          </table:table-cell>
          <table:table-cell office:value-type="string" calcext:value-type="string">
            <text:p>IMDB-MULTI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2025-11-17 18:03:59</text:p>
          </table:table-cell>
          <table:table-cell office:value-type="string" calcext:value-type="string">
            <text:p>2025-11-17 18:41:0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00" calcext:value-type="float">
            <text:p>200</text:p>
          </table:table-cell>
          <table:table-cell office:value-type="float" office:value="68" calcext:value-type="float">
            <text:p>68</text:p>
          </table:table-cell>
          <table:table-cell office:value-type="float" office:value="1.09390652179718" calcext:value-type="float">
            <text:p>1.09390652179718</text:p>
          </table:table-cell>
          <table:table-cell office:value-type="float" office:value="0.379999995231628" calcext:value-type="float">
            <text:p>0.379999995231628</text:p>
          </table:table-cell>
          <table:table-cell office:value-type="float" office:value="1.09713447093964" calcext:value-type="float">
            <text:p>1.09713447093964</text:p>
          </table:table-cell>
          <table:table-cell table:style-name="ce1" office:value-type="string" calcext:value-type="string">
            <text:p>2025-11-17 18:16:14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2025-11-17 18:03:59</text:p>
          </table:table-cell>
          <table:table-cell table:style-name="Default" office:value-type="string" calcext:value-type="string">
            <text:p>GCN</text:p>
          </table:table-cell>
          <table:table-cell office:value-type="string" calcext:value-type="string">
            <text:p>IMDB-MULTI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2025-11-17 18:03:59</text:p>
          </table:table-cell>
          <table:table-cell office:value-type="string" calcext:value-type="string">
            <text:p>2025-11-17 18:41:0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04" calcext:value-type="float">
            <text:p>204</text:p>
          </table:table-cell>
          <table:table-cell office:value-type="float" office:value="68" calcext:value-type="float">
            <text:p>68</text:p>
          </table:table-cell>
          <table:table-cell office:value-type="float" office:value="1.09454667568207" calcext:value-type="float">
            <text:p>1.09454667568207</text:p>
          </table:table-cell>
          <table:table-cell office:value-type="float" office:value="0.343333333730698" calcext:value-type="float">
            <text:p>0.343333333730698</text:p>
          </table:table-cell>
          <table:table-cell office:value-type="float" office:value="1.09808874130249" calcext:value-type="float">
            <text:p>1.09808874130249</text:p>
          </table:table-cell>
          <table:table-cell table:style-name="ce1" office:value-type="string" calcext:value-type="string">
            <text:p>2025-11-17 18:28:30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2025-11-17 18:03:59</text:p>
          </table:table-cell>
          <table:table-cell table:style-name="Default" office:value-type="string" calcext:value-type="string">
            <text:p>GCN</text:p>
          </table:table-cell>
          <table:table-cell office:value-type="string" calcext:value-type="string">
            <text:p>IMDB-MULTI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2025-11-17 18:03:59</text:p>
          </table:table-cell>
          <table:table-cell office:value-type="string" calcext:value-type="string">
            <text:p>2025-11-17 18:41:0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11" calcext:value-type="float">
            <text:p>211</text:p>
          </table:table-cell>
          <table:table-cell office:value-type="float" office:value="68" calcext:value-type="float">
            <text:p>68</text:p>
          </table:table-cell>
          <table:table-cell office:value-type="float" office:value="1.09750604629517" calcext:value-type="float">
            <text:p>1.09750604629517</text:p>
          </table:table-cell>
          <table:table-cell office:value-type="float" office:value="0.353333324193954" calcext:value-type="float">
            <text:p>0.353333324193954</text:p>
          </table:table-cell>
          <table:table-cell office:value-type="float" office:value="1.09537470340729" calcext:value-type="float">
            <text:p>1.09537470340729</text:p>
          </table:table-cell>
          <table:table-cell table:style-name="ce1" office:value-type="string" calcext:value-type="string">
            <text:p>2025-11-17 18:41:02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2025-11-17 18:10:45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MULTI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2025-11-17 18:10:45</text:p>
          </table:table-cell>
          <table:table-cell office:value-type="string" calcext:value-type="string">
            <text:p>2025-11-17 18:22:1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99" calcext:value-type="float">
            <text:p>199</text:p>
          </table:table-cell>
          <table:table-cell office:value-type="float" office:value="70" calcext:value-type="float">
            <text:p>70</text:p>
          </table:table-cell>
          <table:table-cell office:value-type="float" office:value="1.09348464012146" calcext:value-type="float">
            <text:p>1.09348464012146</text:p>
          </table:table-cell>
          <table:table-cell office:value-type="float" office:value="0.346666663885117" calcext:value-type="float">
            <text:p>0.346666663885117</text:p>
          </table:table-cell>
          <table:table-cell office:value-type="float" office:value="1.09231328964233" calcext:value-type="float">
            <text:p>1.09231328964233</text:p>
          </table:table-cell>
          <table:table-cell table:style-name="ce1" office:value-type="string" calcext:value-type="string">
            <text:p>2025-11-17 18:14:35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2025-11-17 18:10:45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MULTI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2025-11-17 18:10:45</text:p>
          </table:table-cell>
          <table:table-cell office:value-type="string" calcext:value-type="string">
            <text:p>2025-11-17 18:22:1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01" calcext:value-type="float">
            <text:p>201</text:p>
          </table:table-cell>
          <table:table-cell office:value-type="float" office:value="70" calcext:value-type="float">
            <text:p>70</text:p>
          </table:table-cell>
          <table:table-cell office:value-type="float" office:value="1.0899144411087" calcext:value-type="float">
            <text:p>1.0899144411087</text:p>
          </table:table-cell>
          <table:table-cell office:value-type="float" office:value="0.419999986886978" calcext:value-type="float">
            <text:p>0.419999986886978</text:p>
          </table:table-cell>
          <table:table-cell office:value-type="float" office:value="1.09203386306763" calcext:value-type="float">
            <text:p>1.09203386306763</text:p>
          </table:table-cell>
          <table:table-cell table:style-name="ce1" office:value-type="string" calcext:value-type="string">
            <text:p>2025-11-17 18:18:27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2025-11-17 18:10:45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MULTI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2025-11-17 18:10:45</text:p>
          </table:table-cell>
          <table:table-cell office:value-type="string" calcext:value-type="string">
            <text:p>2025-11-17 18:22:1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02" calcext:value-type="float">
            <text:p>202</text:p>
          </table:table-cell>
          <table:table-cell office:value-type="float" office:value="70" calcext:value-type="float">
            <text:p>70</text:p>
          </table:table-cell>
          <table:table-cell office:value-type="float" office:value="1.08869647979736" calcext:value-type="float">
            <text:p>1.08869647979736</text:p>
          </table:table-cell>
          <table:table-cell office:value-type="float" office:value="0.393333345651627" calcext:value-type="float">
            <text:p>0.393333345651627</text:p>
          </table:table-cell>
          <table:table-cell office:value-type="float" office:value="1.08619582653046" calcext:value-type="float">
            <text:p>1.08619582653046</text:p>
          </table:table-cell>
          <table:table-cell table:style-name="ce1" office:value-type="string" calcext:value-type="string">
            <text:p>2025-11-17 18:22:19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2025-11-17 18:17:0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2025-11-17 18:17:09</text:p>
          </table:table-cell>
          <table:table-cell office:value-type="string" calcext:value-type="string">
            <text:p>2025-11-17 18:44:1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3" calcext:value-type="float">
            <text:p>203</text:p>
          </table:table-cell>
          <table:table-cell office:value-type="float" office:value="72" calcext:value-type="float">
            <text:p>72</text:p>
          </table:table-cell>
          <table:table-cell office:value-type="float" office:value="0.706766963005066" calcext:value-type="float">
            <text:p>0.706766963005066</text:p>
          </table:table-cell>
          <table:table-cell office:value-type="float" office:value="0.584999978542328" calcext:value-type="float">
            <text:p>0.584999978542328</text:p>
          </table:table-cell>
          <table:table-cell office:value-type="float" office:value="0.66693526506424" calcext:value-type="float">
            <text:p>0.66693526506424</text:p>
          </table:table-cell>
          <table:table-cell table:style-name="ce1" office:value-type="string" calcext:value-type="string">
            <text:p>2025-11-17 18:26:05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2025-11-17 18:17:0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2025-11-17 18:17:09</text:p>
          </table:table-cell>
          <table:table-cell office:value-type="string" calcext:value-type="string">
            <text:p>2025-11-17 18:44:1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7" calcext:value-type="float">
            <text:p>207</text:p>
          </table:table-cell>
          <table:table-cell office:value-type="float" office:value="72" calcext:value-type="float">
            <text:p>72</text:p>
          </table:table-cell>
          <table:table-cell office:value-type="float" office:value="0.697995543479919" calcext:value-type="float">
            <text:p>0.697995543479919</text:p>
          </table:table-cell>
          <table:table-cell office:value-type="float" office:value="0.5" calcext:value-type="float">
            <text:p>0.5</text:p>
          </table:table-cell>
          <table:table-cell office:value-type="float" office:value="0.703593611717224" calcext:value-type="float">
            <text:p>0.703593611717224</text:p>
          </table:table-cell>
          <table:table-cell table:style-name="ce1" office:value-type="string" calcext:value-type="string">
            <text:p>2025-11-17 18:35:15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2025-11-17 18:17:0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2025-11-17 18:17:09</text:p>
          </table:table-cell>
          <table:table-cell office:value-type="string" calcext:value-type="string">
            <text:p>2025-11-17 18:44:1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14" calcext:value-type="float">
            <text:p>214</text:p>
          </table:table-cell>
          <table:table-cell office:value-type="float" office:value="72" calcext:value-type="float">
            <text:p>72</text:p>
          </table:table-cell>
          <table:table-cell office:value-type="float" office:value="0.689549624919891" calcext:value-type="float">
            <text:p>0.689549624919891</text:p>
          </table:table-cell>
          <table:table-cell office:value-type="float" office:value="0.46000000834465" calcext:value-type="float">
            <text:p>0.46000000834465</text:p>
          </table:table-cell>
          <table:table-cell office:value-type="float" office:value="0.712614357471466" calcext:value-type="float">
            <text:p>0.712614357471466</text:p>
          </table:table-cell>
          <table:table-cell table:style-name="ce1" office:value-type="string" calcext:value-type="string">
            <text:p>2025-11-17 18:44:10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2025-11-17 18:23:26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MULTI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2025-11-17 18:23:26</text:p>
          </table:table-cell>
          <table:table-cell office:value-type="string" calcext:value-type="string">
            <text:p>2025-11-17 18:39:0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05" calcext:value-type="float">
            <text:p>205</text:p>
          </table:table-cell>
          <table:table-cell office:value-type="float" office:value="73" calcext:value-type="float">
            <text:p>73</text:p>
          </table:table-cell>
          <table:table-cell office:value-type="float" office:value="1.03574764728546" calcext:value-type="float">
            <text:p>1.03574764728546</text:p>
          </table:table-cell>
          <table:table-cell office:value-type="float" office:value="0.400000005960465" calcext:value-type="float">
            <text:p>0.400000005960465</text:p>
          </table:table-cell>
          <table:table-cell office:value-type="float" office:value="44.9260749816895" calcext:value-type="float">
            <text:p>44.9260749816895</text:p>
          </table:table-cell>
          <table:table-cell table:style-name="ce1" office:value-type="string" calcext:value-type="string">
            <text:p>2025-11-17 18:28:37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2025-11-17 18:23:26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MULTI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2025-11-17 18:23:26</text:p>
          </table:table-cell>
          <table:table-cell office:value-type="string" calcext:value-type="string">
            <text:p>2025-11-17 18:39:0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06" calcext:value-type="float">
            <text:p>206</text:p>
          </table:table-cell>
          <table:table-cell office:value-type="float" office:value="73" calcext:value-type="float">
            <text:p>73</text:p>
          </table:table-cell>
          <table:table-cell office:value-type="float" office:value="1.04558396339417" calcext:value-type="float">
            <text:p>1.04558396339417</text:p>
          </table:table-cell>
          <table:table-cell office:value-type="float" office:value="0.366666674613953" calcext:value-type="float">
            <text:p>0.366666674613953</text:p>
          </table:table-cell>
          <table:table-cell office:value-type="float" office:value="1.16231727600098" calcext:value-type="float">
            <text:p>1.16231727600098</text:p>
          </table:table-cell>
          <table:table-cell table:style-name="ce1" office:value-type="string" calcext:value-type="string">
            <text:p>2025-11-17 18:33:56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2025-11-17 18:23:26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MULTI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2025-11-17 18:23:26</text:p>
          </table:table-cell>
          <table:table-cell office:value-type="string" calcext:value-type="string">
            <text:p>2025-11-17 18:39:0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09" calcext:value-type="float">
            <text:p>209</text:p>
          </table:table-cell>
          <table:table-cell office:value-type="float" office:value="73" calcext:value-type="float">
            <text:p>73</text:p>
          </table:table-cell>
          <table:table-cell office:value-type="float" office:value="1.02457344532013" calcext:value-type="float">
            <text:p>1.02457344532013</text:p>
          </table:table-cell>
          <table:table-cell office:value-type="float" office:value="0.356666654348373" calcext:value-type="float">
            <text:p>0.356666654348373</text:p>
          </table:table-cell>
          <table:table-cell office:value-type="float" office:value="5.18554019927979" calcext:value-type="float">
            <text:p>5.18554019927979</text:p>
          </table:table-cell>
          <table:table-cell table:style-name="ce1" office:value-type="string" calcext:value-type="string">
            <text:p>2025-11-17 18:39:08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2025-11-17 18:34:47</text:p>
          </table:table-cell>
          <table:table-cell table:style-name="Default" office:value-type="string" calcext:value-type="string">
            <text:p>GC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2025-11-17 18:34:47</text:p>
          </table:table-cell>
          <table:table-cell office:value-type="string" calcext:value-type="string">
            <text:p>2025-11-17 18:43:2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8" calcext:value-type="float">
            <text:p>208</text:p>
          </table:table-cell>
          <table:table-cell office:value-type="float" office:value="74" calcext:value-type="float">
            <text:p>74</text:p>
          </table:table-cell>
          <table:table-cell office:value-type="float" office:value="0.696658492088318" calcext:value-type="float">
            <text:p>0.696658492088318</text:p>
          </table:table-cell>
          <table:table-cell office:value-type="float" office:value="0.5" calcext:value-type="float">
            <text:p>0.5</text:p>
          </table:table-cell>
          <table:table-cell office:value-type="float" office:value="0.69737184047699" calcext:value-type="float">
            <text:p>0.69737184047699</text:p>
          </table:table-cell>
          <table:table-cell table:style-name="ce1" office:value-type="string" calcext:value-type="string">
            <text:p>2025-11-17 18:37:45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2025-11-17 18:34:47</text:p>
          </table:table-cell>
          <table:table-cell table:style-name="Default" office:value-type="string" calcext:value-type="string">
            <text:p>GC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2025-11-17 18:34:47</text:p>
          </table:table-cell>
          <table:table-cell office:value-type="string" calcext:value-type="string">
            <text:p>2025-11-17 18:43:2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10" calcext:value-type="float">
            <text:p>210</text:p>
          </table:table-cell>
          <table:table-cell office:value-type="float" office:value="74" calcext:value-type="float">
            <text:p>74</text:p>
          </table:table-cell>
          <table:table-cell office:value-type="float" office:value="0.693141400814056" calcext:value-type="float">
            <text:p>0.693141400814056</text:p>
          </table:table-cell>
          <table:table-cell office:value-type="float" office:value="0.5" calcext:value-type="float">
            <text:p>0.5</text:p>
          </table:table-cell>
          <table:table-cell office:value-type="float" office:value="0.693769633769989" calcext:value-type="float">
            <text:p>0.693769633769989</text:p>
          </table:table-cell>
          <table:table-cell table:style-name="ce1" office:value-type="string" calcext:value-type="string">
            <text:p>2025-11-17 18:40:37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2025-11-17 18:34:47</text:p>
          </table:table-cell>
          <table:table-cell table:style-name="Default" office:value-type="string" calcext:value-type="string">
            <text:p>GC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2025-11-17 18:34:47</text:p>
          </table:table-cell>
          <table:table-cell office:value-type="string" calcext:value-type="string">
            <text:p>2025-11-17 18:43:2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13" calcext:value-type="float">
            <text:p>213</text:p>
          </table:table-cell>
          <table:table-cell office:value-type="float" office:value="74" calcext:value-type="float">
            <text:p>74</text:p>
          </table:table-cell>
          <table:table-cell office:value-type="float" office:value="0.694970309734345" calcext:value-type="float">
            <text:p>0.694970309734345</text:p>
          </table:table-cell>
          <table:table-cell office:value-type="float" office:value="0.5" calcext:value-type="float">
            <text:p>0.5</text:p>
          </table:table-cell>
          <table:table-cell office:value-type="float" office:value="0.693164110183716" calcext:value-type="float">
            <text:p>0.693164110183716</text:p>
          </table:table-cell>
          <table:table-cell table:style-name="ce1" office:value-type="string" calcext:value-type="string">
            <text:p>2025-11-17 18:43:28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2025-11-17 18:40:15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MULTI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2025-11-17 18:40:15</text:p>
          </table:table-cell>
          <table:table-cell office:value-type="string" calcext:value-type="string">
            <text:p>2025-11-17 18:46:23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12" calcext:value-type="float">
            <text:p>212</text:p>
          </table:table-cell>
          <table:table-cell office:value-type="float" office:value="75" calcext:value-type="float">
            <text:p>75</text:p>
          </table:table-cell>
          <table:table-cell office:value-type="float" office:value="1.08927297592163" calcext:value-type="float">
            <text:p>1.08927297592163</text:p>
          </table:table-cell>
          <table:table-cell office:value-type="float" office:value="0.430000007152557" calcext:value-type="float">
            <text:p>0.430000007152557</text:p>
          </table:table-cell>
          <table:table-cell office:value-type="float" office:value="1.0750150680542" calcext:value-type="float">
            <text:p>1.0750150680542</text:p>
          </table:table-cell>
          <table:table-cell table:style-name="ce1" office:value-type="string" calcext:value-type="string">
            <text:p>2025-11-17 18:42:18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2025-11-17 18:40:15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MULTI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2025-11-17 18:40:15</text:p>
          </table:table-cell>
          <table:table-cell office:value-type="string" calcext:value-type="string">
            <text:p>2025-11-17 18:46:23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15" calcext:value-type="float">
            <text:p>215</text:p>
          </table:table-cell>
          <table:table-cell office:value-type="float" office:value="75" calcext:value-type="float">
            <text:p>75</text:p>
          </table:table-cell>
          <table:table-cell office:value-type="float" office:value="1.09338080883026" calcext:value-type="float">
            <text:p>1.09338080883026</text:p>
          </table:table-cell>
          <table:table-cell office:value-type="float" office:value="0.426666676998138" calcext:value-type="float">
            <text:p>0.426666676998138</text:p>
          </table:table-cell>
          <table:table-cell office:value-type="float" office:value="1.07946133613586" calcext:value-type="float">
            <text:p>1.07946133613586</text:p>
          </table:table-cell>
          <table:table-cell table:style-name="ce1" office:value-type="string" calcext:value-type="string">
            <text:p>2025-11-17 18:44:20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2025-11-17 18:40:15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MULTI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2025-11-17 18:40:15</text:p>
          </table:table-cell>
          <table:table-cell office:value-type="string" calcext:value-type="string">
            <text:p>2025-11-17 18:46:23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17" calcext:value-type="float">
            <text:p>217</text:p>
          </table:table-cell>
          <table:table-cell office:value-type="float" office:value="75" calcext:value-type="float">
            <text:p>75</text:p>
          </table:table-cell>
          <table:table-cell office:value-type="float" office:value="1.08756601810455" calcext:value-type="float">
            <text:p>1.08756601810455</text:p>
          </table:table-cell>
          <table:table-cell office:value-type="float" office:value="0.383333325386047" calcext:value-type="float">
            <text:p>0.383333325386047</text:p>
          </table:table-cell>
          <table:table-cell office:value-type="float" office:value="1.07203733921051" calcext:value-type="float">
            <text:p>1.07203733921051</text:p>
          </table:table-cell>
          <table:table-cell table:style-name="ce1" office:value-type="string" calcext:value-type="string">
            <text:p>2025-11-17 18:46:23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2025-11-17 18:44:36</text:p>
          </table:table-cell>
          <table:table-cell table:style-name="Default" office:value-type="string" calcext:value-type="string">
            <text:p>GC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2025-11-17 18:44:36</text:p>
          </table:table-cell>
          <table:table-cell office:value-type="string" calcext:value-type="string">
            <text:p>2025-11-17 19:20:4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23" calcext:value-type="float">
            <text:p>223</text:p>
          </table:table-cell>
          <table:table-cell office:value-type="float" office:value="76" calcext:value-type="float">
            <text:p>76</text:p>
          </table:table-cell>
          <table:table-cell office:value-type="float" office:value="0.690155267715454" calcext:value-type="float">
            <text:p>0.690155267715454</text:p>
          </table:table-cell>
          <table:table-cell office:value-type="float" office:value="0.395000010728836" calcext:value-type="float">
            <text:p>0.395000010728836</text:p>
          </table:table-cell>
          <table:table-cell office:value-type="float" office:value="0.709106922149658" calcext:value-type="float">
            <text:p>0.709106922149658</text:p>
          </table:table-cell>
          <table:table-cell table:style-name="ce1" office:value-type="string" calcext:value-type="string">
            <text:p>2025-11-17 18:56:40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2025-11-17 18:44:36</text:p>
          </table:table-cell>
          <table:table-cell table:style-name="Default" office:value-type="string" calcext:value-type="string">
            <text:p>GC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2025-11-17 18:44:36</text:p>
          </table:table-cell>
          <table:table-cell office:value-type="string" calcext:value-type="string">
            <text:p>2025-11-17 19:20:4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30" calcext:value-type="float">
            <text:p>230</text:p>
          </table:table-cell>
          <table:table-cell office:value-type="float" office:value="76" calcext:value-type="float">
            <text:p>76</text:p>
          </table:table-cell>
          <table:table-cell office:value-type="float" office:value="0.69048810005188" calcext:value-type="float">
            <text:p>0.69048810005188</text:p>
          </table:table-cell>
          <table:table-cell office:value-type="float" office:value="0.430000007152557" calcext:value-type="float">
            <text:p>0.430000007152557</text:p>
          </table:table-cell>
          <table:table-cell office:value-type="float" office:value="0.698268592357636" calcext:value-type="float">
            <text:p>0.698268592357636</text:p>
          </table:table-cell>
          <table:table-cell table:style-name="ce1" office:value-type="string" calcext:value-type="string">
            <text:p>2025-11-17 19:08:45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2025-11-17 18:44:36</text:p>
          </table:table-cell>
          <table:table-cell table:style-name="Default" office:value-type="string" calcext:value-type="string">
            <text:p>GC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2025-11-17 18:44:36</text:p>
          </table:table-cell>
          <table:table-cell office:value-type="string" calcext:value-type="string">
            <text:p>2025-11-17 19:20:4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31" calcext:value-type="float">
            <text:p>231</text:p>
          </table:table-cell>
          <table:table-cell office:value-type="float" office:value="76" calcext:value-type="float">
            <text:p>76</text:p>
          </table:table-cell>
          <table:table-cell office:value-type="float" office:value="0.684268414974213" calcext:value-type="float">
            <text:p>0.684268414974213</text:p>
          </table:table-cell>
          <table:table-cell office:value-type="float" office:value="0.379999995231628" calcext:value-type="float">
            <text:p>0.379999995231628</text:p>
          </table:table-cell>
          <table:table-cell office:value-type="float" office:value="0.709663093090057" calcext:value-type="float">
            <text:p>0.709663093090057</text:p>
          </table:table-cell>
          <table:table-cell table:style-name="ce1" office:value-type="string" calcext:value-type="string">
            <text:p>2025-11-17 19:20:48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2025-11-17 18:45:16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1" office:value-type="string" calcext:value-type="string">
            <text:p>2025-11-17 18:45:16</text:p>
          </table:table-cell>
          <table:table-cell office:value-type="string" calcext:value-type="string">
            <text:p>2025-11-17 18:48:3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16" calcext:value-type="float">
            <text:p>216</text:p>
          </table:table-cell>
          <table:table-cell office:value-type="float" office:value="77" calcext:value-type="float">
            <text:p>77</text:p>
          </table:table-cell>
          <table:table-cell office:value-type="float" office:value="0.690581500530243" calcext:value-type="float">
            <text:p>0.690581500530243</text:p>
          </table:table-cell>
          <table:table-cell office:value-type="float" office:value="0.444999992847443" calcext:value-type="float">
            <text:p>0.444999992847443</text:p>
          </table:table-cell>
          <table:table-cell office:value-type="float" office:value="0.712717890739441" calcext:value-type="float">
            <text:p>0.712717890739441</text:p>
          </table:table-cell>
          <table:table-cell table:style-name="ce1" office:value-type="string" calcext:value-type="string">
            <text:p>2025-11-17 18:46:22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2025-11-17 18:45:16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1" office:value-type="string" calcext:value-type="string">
            <text:p>2025-11-17 18:45:16</text:p>
          </table:table-cell>
          <table:table-cell office:value-type="string" calcext:value-type="string">
            <text:p>2025-11-17 18:48:3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18" calcext:value-type="float">
            <text:p>218</text:p>
          </table:table-cell>
          <table:table-cell office:value-type="float" office:value="77" calcext:value-type="float">
            <text:p>77</text:p>
          </table:table-cell>
          <table:table-cell office:value-type="float" office:value="0.691410005092621" calcext:value-type="float">
            <text:p>0.691410005092621</text:p>
          </table:table-cell>
          <table:table-cell office:value-type="float" office:value="0.319999992847443" calcext:value-type="float">
            <text:p>0.319999992847443</text:p>
          </table:table-cell>
          <table:table-cell office:value-type="float" office:value="0.713324785232544" calcext:value-type="float">
            <text:p>0.713324785232544</text:p>
          </table:table-cell>
          <table:table-cell table:style-name="ce1" office:value-type="string" calcext:value-type="string">
            <text:p>2025-11-17 18:47:28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2025-11-17 18:45:16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1" office:value-type="string" calcext:value-type="string">
            <text:p>2025-11-17 18:45:16</text:p>
          </table:table-cell>
          <table:table-cell office:value-type="string" calcext:value-type="string">
            <text:p>2025-11-17 18:48:3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19" calcext:value-type="float">
            <text:p>219</text:p>
          </table:table-cell>
          <table:table-cell office:value-type="float" office:value="77" calcext:value-type="float">
            <text:p>77</text:p>
          </table:table-cell>
          <table:table-cell office:value-type="float" office:value="0.69258040189743" calcext:value-type="float">
            <text:p>0.69258040189743</text:p>
          </table:table-cell>
          <table:table-cell office:value-type="float" office:value="0.5" calcext:value-type="float">
            <text:p>0.5</text:p>
          </table:table-cell>
          <table:table-cell office:value-type="float" office:value="0.693964898586273" calcext:value-type="float">
            <text:p>0.693964898586273</text:p>
          </table:table-cell>
          <table:table-cell table:style-name="ce1" office:value-type="string" calcext:value-type="string">
            <text:p>2025-11-17 18:48:34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2025-11-17 18:49:41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2025-11-17 18:49:41</text:p>
          </table:table-cell>
          <table:table-cell office:value-type="string" calcext:value-type="string">
            <text:p>2025-11-17 18:55:5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20" calcext:value-type="float">
            <text:p>220</text:p>
          </table:table-cell>
          <table:table-cell office:value-type="float" office:value="78" calcext:value-type="float">
            <text:p>78</text:p>
          </table:table-cell>
          <table:table-cell office:value-type="float" office:value="0.664096355438232" calcext:value-type="float">
            <text:p>0.664096355438232</text:p>
          </table:table-cell>
          <table:table-cell office:value-type="float" office:value="0.360000014305115" calcext:value-type="float">
            <text:p>0.360000014305115</text:p>
          </table:table-cell>
          <table:table-cell office:value-type="float" office:value="0.856713712215424" calcext:value-type="float">
            <text:p>0.856713712215424</text:p>
          </table:table-cell>
          <table:table-cell table:style-name="ce1" office:value-type="string" calcext:value-type="string">
            <text:p>2025-11-17 18:51:47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2025-11-17 18:49:41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2025-11-17 18:49:41</text:p>
          </table:table-cell>
          <table:table-cell office:value-type="string" calcext:value-type="string">
            <text:p>2025-11-17 18:55:5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21" calcext:value-type="float">
            <text:p>221</text:p>
          </table:table-cell>
          <table:table-cell office:value-type="float" office:value="78" calcext:value-type="float">
            <text:p>78</text:p>
          </table:table-cell>
          <table:table-cell office:value-type="float" office:value="0.653068721294403" calcext:value-type="float">
            <text:p>0.653068721294403</text:p>
          </table:table-cell>
          <table:table-cell office:value-type="float" office:value="0.59500002861023" calcext:value-type="float">
            <text:p>0.59500002861023</text:p>
          </table:table-cell>
          <table:table-cell office:value-type="float" office:value="0.666365444660187" calcext:value-type="float">
            <text:p>0.666365444660187</text:p>
          </table:table-cell>
          <table:table-cell table:style-name="ce1" office:value-type="string" calcext:value-type="string">
            <text:p>2025-11-17 18:53:51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2025-11-17 18:49:41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2025-11-17 18:49:41</text:p>
          </table:table-cell>
          <table:table-cell office:value-type="string" calcext:value-type="string">
            <text:p>2025-11-17 18:55:5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22" calcext:value-type="float">
            <text:p>222</text:p>
          </table:table-cell>
          <table:table-cell office:value-type="float" office:value="78" calcext:value-type="float">
            <text:p>78</text:p>
          </table:table-cell>
          <table:table-cell office:value-type="float" office:value="0.656071066856384" calcext:value-type="float">
            <text:p>0.656071066856384</text:p>
          </table:table-cell>
          <table:table-cell office:value-type="float" office:value="0.474999994039536" calcext:value-type="float">
            <text:p>0.474999994039536</text:p>
          </table:table-cell>
          <table:table-cell office:value-type="float" office:value="0.753209233283997" calcext:value-type="float">
            <text:p>0.753209233283997</text:p>
          </table:table-cell>
          <table:table-cell table:style-name="ce1" office:value-type="string" calcext:value-type="string">
            <text:p>2025-11-17 18:55:57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2025-11-17 18:57:04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2025-11-17 18:57:04</text:p>
          </table:table-cell>
          <table:table-cell office:value-type="string" calcext:value-type="string">
            <text:p>2025-11-17 19:00:1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24" calcext:value-type="float">
            <text:p>224</text:p>
          </table:table-cell>
          <table:table-cell office:value-type="float" office:value="79" calcext:value-type="float">
            <text:p>79</text:p>
          </table:table-cell>
          <table:table-cell office:value-type="float" office:value="0.679274559020996" calcext:value-type="float">
            <text:p>0.679274559020996</text:p>
          </table:table-cell>
          <table:table-cell office:value-type="float" office:value="0.620000004768372" calcext:value-type="float">
            <text:p>0.620000004768372</text:p>
          </table:table-cell>
          <table:table-cell office:value-type="float" office:value="0.694941580295563" calcext:value-type="float">
            <text:p>0.694941580295563</text:p>
          </table:table-cell>
          <table:table-cell table:style-name="ce1" office:value-type="string" calcext:value-type="string">
            <text:p>2025-11-17 18:58:08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2025-11-17 18:57:04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2025-11-17 18:57:04</text:p>
          </table:table-cell>
          <table:table-cell office:value-type="string" calcext:value-type="string">
            <text:p>2025-11-17 19:00:1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25" calcext:value-type="float">
            <text:p>225</text:p>
          </table:table-cell>
          <table:table-cell office:value-type="float" office:value="79" calcext:value-type="float">
            <text:p>79</text:p>
          </table:table-cell>
          <table:table-cell office:value-type="float" office:value="0.678511559963226" calcext:value-type="float">
            <text:p>0.678511559963226</text:p>
          </table:table-cell>
          <table:table-cell office:value-type="float" office:value="0.489999949932098" calcext:value-type="float">
            <text:p>0.489999949932098</text:p>
          </table:table-cell>
          <table:table-cell office:value-type="float" office:value="0.702477216720581" calcext:value-type="float">
            <text:p>0.702477216720581</text:p>
          </table:table-cell>
          <table:table-cell table:style-name="ce1" office:value-type="string" calcext:value-type="string">
            <text:p>2025-11-17 18:59:12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2025-11-17 18:57:04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2025-11-17 18:57:04</text:p>
          </table:table-cell>
          <table:table-cell office:value-type="string" calcext:value-type="string">
            <text:p>2025-11-17 19:00:1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26" calcext:value-type="float">
            <text:p>226</text:p>
          </table:table-cell>
          <table:table-cell office:value-type="float" office:value="79" calcext:value-type="float">
            <text:p>79</text:p>
          </table:table-cell>
          <table:table-cell office:value-type="float" office:value="0.69117659330368" calcext:value-type="float">
            <text:p>0.69117659330368</text:p>
          </table:table-cell>
          <table:table-cell office:value-type="float" office:value="0.529999971389771" calcext:value-type="float">
            <text:p>0.529999971389771</text:p>
          </table:table-cell>
          <table:table-cell office:value-type="float" office:value="0.704099118709564" calcext:value-type="float">
            <text:p>0.704099118709564</text:p>
          </table:table-cell>
          <table:table-cell table:style-name="ce1" office:value-type="string" calcext:value-type="string">
            <text:p>2025-11-17 19:00:16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2025-11-17 19:01:23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2025-11-17 19:01:23</text:p>
          </table:table-cell>
          <table:table-cell office:value-type="string" calcext:value-type="string">
            <text:p>2025-11-17 19:05:23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27" calcext:value-type="float">
            <text:p>227</text:p>
          </table:table-cell>
          <table:table-cell office:value-type="float" office:value="80" calcext:value-type="float">
            <text:p>80</text:p>
          </table:table-cell>
          <table:table-cell office:value-type="float" office:value="0.688431203365326" calcext:value-type="float">
            <text:p>0.688431203365326</text:p>
          </table:table-cell>
          <table:table-cell office:value-type="float" office:value="0.444999992847443" calcext:value-type="float">
            <text:p>0.444999992847443</text:p>
          </table:table-cell>
          <table:table-cell office:value-type="float" office:value="0.713425397872925" calcext:value-type="float">
            <text:p>0.713425397872925</text:p>
          </table:table-cell>
          <table:table-cell table:style-name="ce1" office:value-type="string" calcext:value-type="string">
            <text:p>2025-11-17 19:02:43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2025-11-17 19:01:23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2025-11-17 19:01:23</text:p>
          </table:table-cell>
          <table:table-cell office:value-type="string" calcext:value-type="string">
            <text:p>2025-11-17 19:05:23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28" calcext:value-type="float">
            <text:p>228</text:p>
          </table:table-cell>
          <table:table-cell office:value-type="float" office:value="80" calcext:value-type="float">
            <text:p>80</text:p>
          </table:table-cell>
          <table:table-cell office:value-type="float" office:value="0.687884330749512" calcext:value-type="float">
            <text:p>0.687884330749512</text:p>
          </table:table-cell>
          <table:table-cell office:value-type="float" office:value="0.469999998807907" calcext:value-type="float">
            <text:p>0.469999998807907</text:p>
          </table:table-cell>
          <table:table-cell office:value-type="float" office:value="0.71232408285141" calcext:value-type="float">
            <text:p>0.71232408285141</text:p>
          </table:table-cell>
          <table:table-cell table:style-name="ce1" office:value-type="string" calcext:value-type="string">
            <text:p>2025-11-17 19:04:02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2025-11-17 19:01:23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2025-11-17 19:01:23</text:p>
          </table:table-cell>
          <table:table-cell office:value-type="string" calcext:value-type="string">
            <text:p>2025-11-17 19:05:23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29" calcext:value-type="float">
            <text:p>229</text:p>
          </table:table-cell>
          <table:table-cell office:value-type="float" office:value="80" calcext:value-type="float">
            <text:p>80</text:p>
          </table:table-cell>
          <table:table-cell office:value-type="float" office:value="0.688169300556183" calcext:value-type="float">
            <text:p>0.688169300556183</text:p>
          </table:table-cell>
          <table:table-cell office:value-type="float" office:value="0.444999992847443" calcext:value-type="float">
            <text:p>0.444999992847443</text:p>
          </table:table-cell>
          <table:table-cell office:value-type="float" office:value="0.712179720401764" calcext:value-type="float">
            <text:p>0.712179720401764</text:p>
          </table:table-cell>
          <table:table-cell table:style-name="ce1" office:value-type="string" calcext:value-type="string">
            <text:p>2025-11-17 19:05:23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2025-11-17 19:21:56</text:p>
          </table:table-cell>
          <table:table-cell table:style-name="Default" office:value-type="string" calcext:value-type="string">
            <text:p>GC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2025-11-17 19:21:56</text:p>
          </table:table-cell>
          <table:table-cell office:value-type="string" calcext:value-type="string">
            <text:p>2025-11-17 19:48:0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32" calcext:value-type="float">
            <text:p>232</text:p>
          </table:table-cell>
          <table:table-cell office:value-type="float" office:value="81" calcext:value-type="float">
            <text:p>81</text:p>
          </table:table-cell>
          <table:table-cell office:value-type="float" office:value="0.652551293373108" calcext:value-type="float">
            <text:p>0.652551293373108</text:p>
          </table:table-cell>
          <table:table-cell office:value-type="float" office:value="0.474999994039536" calcext:value-type="float">
            <text:p>0.474999994039536</text:p>
          </table:table-cell>
          <table:table-cell office:value-type="float" office:value="0.731888711452484" calcext:value-type="float">
            <text:p>0.731888711452484</text:p>
          </table:table-cell>
          <table:table-cell table:style-name="ce1" office:value-type="string" calcext:value-type="string">
            <text:p>2025-11-17 19:30:52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2025-11-17 19:21:56</text:p>
          </table:table-cell>
          <table:table-cell table:style-name="Default" office:value-type="string" calcext:value-type="string">
            <text:p>GC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2025-11-17 19:21:56</text:p>
          </table:table-cell>
          <table:table-cell office:value-type="string" calcext:value-type="string">
            <text:p>2025-11-17 19:48:0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33" calcext:value-type="float">
            <text:p>233</text:p>
          </table:table-cell>
          <table:table-cell office:value-type="float" office:value="81" calcext:value-type="float">
            <text:p>81</text:p>
          </table:table-cell>
          <table:table-cell office:value-type="float" office:value="0.664193868637085" calcext:value-type="float">
            <text:p>0.664193868637085</text:p>
          </table:table-cell>
          <table:table-cell office:value-type="float" office:value="0.545000016689301" calcext:value-type="float">
            <text:p>0.545000016689301</text:p>
          </table:table-cell>
          <table:table-cell office:value-type="float" office:value="0.778244614601135" calcext:value-type="float">
            <text:p>0.778244614601135</text:p>
          </table:table-cell>
          <table:table-cell table:style-name="ce1" office:value-type="string" calcext:value-type="string">
            <text:p>2025-11-17 19:39:34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2025-11-17 19:21:56</text:p>
          </table:table-cell>
          <table:table-cell table:style-name="Default" office:value-type="string" calcext:value-type="string">
            <text:p>GC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2025-11-17 19:21:56</text:p>
          </table:table-cell>
          <table:table-cell office:value-type="string" calcext:value-type="string">
            <text:p>2025-11-17 19:48:0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34" calcext:value-type="float">
            <text:p>234</text:p>
          </table:table-cell>
          <table:table-cell office:value-type="float" office:value="81" calcext:value-type="float">
            <text:p>81</text:p>
          </table:table-cell>
          <table:table-cell office:value-type="float" office:value="0.657464981079102" calcext:value-type="float">
            <text:p>0.657464981079102</text:p>
          </table:table-cell>
          <table:table-cell office:value-type="float" office:value="0.509999990463257" calcext:value-type="float">
            <text:p>0.509999990463257</text:p>
          </table:table-cell>
          <table:table-cell office:value-type="float" office:value="0.745272576808929" calcext:value-type="float">
            <text:p>0.745272576808929</text:p>
          </table:table-cell>
          <table:table-cell table:style-name="ce1" office:value-type="string" calcext:value-type="string">
            <text:p>2025-11-17 19:48:07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2025-11-17 19:49:21</text:p>
          </table:table-cell>
          <table:table-cell table:style-name="Default" office:value-type="string" calcext:value-type="string">
            <text:p>GC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2025-11-17 19:49:21</text:p>
          </table:table-cell>
          <table:table-cell office:value-type="string" calcext:value-type="string">
            <text:p>2025-11-17 20:12:2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35" calcext:value-type="float">
            <text:p>235</text:p>
          </table:table-cell>
          <table:table-cell office:value-type="float" office:value="82" calcext:value-type="float">
            <text:p>82</text:p>
          </table:table-cell>
          <table:table-cell office:value-type="float" office:value="0.690968751907349" calcext:value-type="float">
            <text:p>0.690968751907349</text:p>
          </table:table-cell>
          <table:table-cell office:value-type="float" office:value="0.560000002384186" calcext:value-type="float">
            <text:p>0.560000002384186</text:p>
          </table:table-cell>
          <table:table-cell office:value-type="float" office:value="0.693228483200073" calcext:value-type="float">
            <text:p>0.693228483200073</text:p>
          </table:table-cell>
          <table:table-cell table:style-name="ce1" office:value-type="string" calcext:value-type="string">
            <text:p>2025-11-17 19:57:15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2025-11-17 19:49:21</text:p>
          </table:table-cell>
          <table:table-cell table:style-name="Default" office:value-type="string" calcext:value-type="string">
            <text:p>GC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2025-11-17 19:49:21</text:p>
          </table:table-cell>
          <table:table-cell office:value-type="string" calcext:value-type="string">
            <text:p>2025-11-17 20:12:2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36" calcext:value-type="float">
            <text:p>236</text:p>
          </table:table-cell>
          <table:table-cell office:value-type="float" office:value="82" calcext:value-type="float">
            <text:p>82</text:p>
          </table:table-cell>
          <table:table-cell office:value-type="float" office:value="0.691890001296997" calcext:value-type="float">
            <text:p>0.691890001296997</text:p>
          </table:table-cell>
          <table:table-cell office:value-type="float" office:value="0.615000009536743" calcext:value-type="float">
            <text:p>0.615000009536743</text:p>
          </table:table-cell>
          <table:table-cell office:value-type="float" office:value="0.689102530479431" calcext:value-type="float">
            <text:p>0.689102530479431</text:p>
          </table:table-cell>
          <table:table-cell table:style-name="ce1" office:value-type="string" calcext:value-type="string">
            <text:p>2025-11-17 20:04:55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2025-11-17 19:49:21</text:p>
          </table:table-cell>
          <table:table-cell table:style-name="Default" office:value-type="string" calcext:value-type="string">
            <text:p>GC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2025-11-17 19:49:21</text:p>
          </table:table-cell>
          <table:table-cell office:value-type="string" calcext:value-type="string">
            <text:p>2025-11-17 20:12:2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37" calcext:value-type="float">
            <text:p>237</text:p>
          </table:table-cell>
          <table:table-cell office:value-type="float" office:value="82" calcext:value-type="float">
            <text:p>82</text:p>
          </table:table-cell>
          <table:table-cell office:value-type="float" office:value="0.689904868602753" calcext:value-type="float">
            <text:p>0.689904868602753</text:p>
          </table:table-cell>
          <table:table-cell office:value-type="float" office:value="0.545000016689301" calcext:value-type="float">
            <text:p>0.545000016689301</text:p>
          </table:table-cell>
          <table:table-cell office:value-type="float" office:value="0.694805681705475" calcext:value-type="float">
            <text:p>0.694805681705475</text:p>
          </table:table-cell>
          <table:table-cell table:style-name="ce1" office:value-type="string" calcext:value-type="string">
            <text:p>2025-11-17 20:12:28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2025-11-17 20:13:36</text:p>
          </table:table-cell>
          <table:table-cell table:style-name="Default" office:value-type="string" calcext:value-type="string">
            <text:p>GC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2025-11-17 20:13:36</text:p>
          </table:table-cell>
          <table:table-cell office:value-type="string" calcext:value-type="string">
            <text:p>2025-11-17 20:46:53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38" calcext:value-type="float">
            <text:p>238</text:p>
          </table:table-cell>
          <table:table-cell office:value-type="float" office:value="83" calcext:value-type="float">
            <text:p>83</text:p>
          </table:table-cell>
          <table:table-cell office:value-type="float" office:value="0.687479019165039" calcext:value-type="float">
            <text:p>0.687479019165039</text:p>
          </table:table-cell>
          <table:table-cell office:value-type="float" office:value="0.490000009536743" calcext:value-type="float">
            <text:p>0.490000009536743</text:p>
          </table:table-cell>
          <table:table-cell office:value-type="float" office:value="0.705703914165497" calcext:value-type="float">
            <text:p>0.705703914165497</text:p>
          </table:table-cell>
          <table:table-cell table:style-name="ce1" office:value-type="string" calcext:value-type="string">
            <text:p>2025-11-17 20:24:58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2025-11-17 20:13:36</text:p>
          </table:table-cell>
          <table:table-cell table:style-name="Default" office:value-type="string" calcext:value-type="string">
            <text:p>GC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2025-11-17 20:13:36</text:p>
          </table:table-cell>
          <table:table-cell office:value-type="string" calcext:value-type="string">
            <text:p>2025-11-17 20:46:53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39" calcext:value-type="float">
            <text:p>239</text:p>
          </table:table-cell>
          <table:table-cell office:value-type="float" office:value="83" calcext:value-type="float">
            <text:p>83</text:p>
          </table:table-cell>
          <table:table-cell office:value-type="float" office:value="0.686614811420441" calcext:value-type="float">
            <text:p>0.686614811420441</text:p>
          </table:table-cell>
          <table:table-cell office:value-type="float" office:value="0.425000011920929" calcext:value-type="float">
            <text:p>0.425000011920929</text:p>
          </table:table-cell>
          <table:table-cell office:value-type="float" office:value="0.705449342727661" calcext:value-type="float">
            <text:p>0.705449342727661</text:p>
          </table:table-cell>
          <table:table-cell table:style-name="ce1" office:value-type="string" calcext:value-type="string">
            <text:p>2025-11-17 20:35:59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025_11_2_experiments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2025-11-17 20:13:36</text:p>
          </table:table-cell>
          <table:table-cell table:style-name="Default" office:value-type="string" calcext:value-type="string">
            <text:p>GC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2025-11-17 20:13:36</text:p>
          </table:table-cell>
          <table:table-cell office:value-type="string" calcext:value-type="string">
            <text:p>2025-11-17 20:46:53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40" calcext:value-type="float">
            <text:p>240</text:p>
          </table:table-cell>
          <table:table-cell office:value-type="float" office:value="83" calcext:value-type="float">
            <text:p>83</text:p>
          </table:table-cell>
          <table:table-cell office:value-type="float" office:value="0.692710816860199" calcext:value-type="float">
            <text:p>0.692710816860199</text:p>
          </table:table-cell>
          <table:table-cell office:value-type="float" office:value="0.425000011920929" calcext:value-type="float">
            <text:p>0.425000011920929</text:p>
          </table:table-cell>
          <table:table-cell office:value-type="float" office:value="0.700795531272888" calcext:value-type="float">
            <text:p>0.700795531272888</text:p>
          </table:table-cell>
          <table:table-cell table:style-name="ce1" office:value-type="string" calcext:value-type="string">
            <text:p>2025-11-17 20:46:53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025-11-18 11:43:22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d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025-11-18 11:43:22</text:p>
          </table:table-cell>
          <table:table-cell office:value-type="string" calcext:value-type="string">
            <text:p>2025-11-18 12:22:1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2888560295105" calcext:value-type="float">
            <text:p>0.52888560295105</text:p>
          </table:table-cell>
          <table:table-cell office:value-type="float" office:value="0.589999973773956" calcext:value-type="float">
            <text:p>0.589999973773956</text:p>
          </table:table-cell>
          <table:table-cell office:value-type="float" office:value="0.735866367816925" calcext:value-type="float">
            <text:p>0.735866367816925</text:p>
          </table:table-cell>
          <table:table-cell table:style-name="ce1" office:value-type="string" calcext:value-type="string">
            <text:p>2025-11-18 11:56:34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025-11-18 11:43:22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d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025-11-18 11:43:22</text:p>
          </table:table-cell>
          <table:table-cell office:value-type="string" calcext:value-type="string">
            <text:p>2025-11-18 12:22:1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526650130748749" calcext:value-type="float">
            <text:p>0.526650130748749</text:p>
          </table:table-cell>
          <table:table-cell office:value-type="float" office:value="0.540000021457672" calcext:value-type="float">
            <text:p>0.540000021457672</text:p>
          </table:table-cell>
          <table:table-cell office:value-type="float" office:value="0.730021953582764" calcext:value-type="float">
            <text:p>0.730021953582764</text:p>
          </table:table-cell>
          <table:table-cell table:style-name="ce1" office:value-type="string" calcext:value-type="string">
            <text:p>2025-11-18 12:09:30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025-11-18 11:43:22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d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025-11-18 11:43:22</text:p>
          </table:table-cell>
          <table:table-cell office:value-type="string" calcext:value-type="string">
            <text:p>2025-11-18 12:22:1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527600646018982" calcext:value-type="float">
            <text:p>0.527600646018982</text:p>
          </table:table-cell>
          <table:table-cell office:value-type="float" office:value="0.574999988079071" calcext:value-type="float">
            <text:p>0.574999988079071</text:p>
          </table:table-cell>
          <table:table-cell office:value-type="float" office:value="0.76232385635376" calcext:value-type="float">
            <text:p>0.76232385635376</text:p>
          </table:table-cell>
          <table:table-cell table:style-name="ce1" office:value-type="string" calcext:value-type="string">
            <text:p>2025-11-18 12:22:16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2025-11-18 11:45:3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o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2025-11-18 11:45:39</text:p>
          </table:table-cell>
          <table:table-cell office:value-type="string" calcext:value-type="string">
            <text:p>2025-11-18 12:10:3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table:number-columns-repeated="2" office:value-type="float" office:value="2" calcext:value-type="float">
            <text:p>2</text:p>
          </table:table-cell>
          <table:table-cell office:value-type="float" office:value="0.685382843017578" calcext:value-type="float">
            <text:p>0.685382843017578</text:p>
          </table:table-cell>
          <table:table-cell office:value-type="float" office:value="0.699999988079071" calcext:value-type="float">
            <text:p>0.699999988079071</text:p>
          </table:table-cell>
          <table:table-cell office:value-type="float" office:value="0.653723835945129" calcext:value-type="float">
            <text:p>0.653723835945129</text:p>
          </table:table-cell>
          <table:table-cell table:style-name="ce1" office:value-type="string" calcext:value-type="string">
            <text:p>2025-11-18 11:53:56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2025-11-18 11:45:3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o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2025-11-18 11:45:39</text:p>
          </table:table-cell>
          <table:table-cell office:value-type="string" calcext:value-type="string">
            <text:p>2025-11-18 12:10:3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690449774265289" calcext:value-type="float">
            <text:p>0.690449774265289</text:p>
          </table:table-cell>
          <table:table-cell office:value-type="float" office:value="0.7049999833107" calcext:value-type="float">
            <text:p>0.7049999833107</text:p>
          </table:table-cell>
          <table:table-cell office:value-type="float" office:value="0.6456538438797" calcext:value-type="float">
            <text:p>0.6456538438797</text:p>
          </table:table-cell>
          <table:table-cell table:style-name="ce1" office:value-type="string" calcext:value-type="string">
            <text:p>2025-11-18 12:02:15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2025-11-18 11:45:3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o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2025-11-18 11:45:39</text:p>
          </table:table-cell>
          <table:table-cell office:value-type="string" calcext:value-type="string">
            <text:p>2025-11-18 12:10:3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692399859428406" calcext:value-type="float">
            <text:p>0.692399859428406</text:p>
          </table:table-cell>
          <table:table-cell office:value-type="float" office:value="0.680000007152557" calcext:value-type="float">
            <text:p>0.680000007152557</text:p>
          </table:table-cell>
          <table:table-cell office:value-type="float" office:value="0.656191468238831" calcext:value-type="float">
            <text:p>0.656191468238831</text:p>
          </table:table-cell>
          <table:table-cell table:style-name="ce1" office:value-type="string" calcext:value-type="string">
            <text:p>2025-11-18 12:10:37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025-11-18 11:45:5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ub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025-11-18 11:45:59</text:p>
          </table:table-cell>
          <table:table-cell office:value-type="string" calcext:value-type="string">
            <text:p>2025-11-18 12:02:2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86088025569916" calcext:value-type="float">
            <text:p>0.686088025569916</text:p>
          </table:table-cell>
          <table:table-cell office:value-type="float" office:value="0.680000007152557" calcext:value-type="float">
            <text:p>0.680000007152557</text:p>
          </table:table-cell>
          <table:table-cell office:value-type="float" office:value="0.649877071380615" calcext:value-type="float">
            <text:p>0.649877071380615</text:p>
          </table:table-cell>
          <table:table-cell table:style-name="ce1" office:value-type="string" calcext:value-type="string">
            <text:p>2025-11-18 11:51:21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025-11-18 11:45:5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ub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025-11-18 11:45:59</text:p>
          </table:table-cell>
          <table:table-cell office:value-type="string" calcext:value-type="string">
            <text:p>2025-11-18 12:02:2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683628439903259" calcext:value-type="float">
            <text:p>0.683628439903259</text:p>
          </table:table-cell>
          <table:table-cell office:value-type="float" office:value="0.675000011920929" calcext:value-type="float">
            <text:p>0.675000011920929</text:p>
          </table:table-cell>
          <table:table-cell office:value-type="float" office:value="0.648673713207245" calcext:value-type="float">
            <text:p>0.648673713207245</text:p>
          </table:table-cell>
          <table:table-cell table:style-name="ce1" office:value-type="string" calcext:value-type="string">
            <text:p>2025-11-18 11:56:44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025-11-18 11:45:5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ub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025-11-18 11:45:59</text:p>
          </table:table-cell>
          <table:table-cell office:value-type="string" calcext:value-type="string">
            <text:p>2025-11-18 12:02:2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677409708499908" calcext:value-type="float">
            <text:p>0.677409708499908</text:p>
          </table:table-cell>
          <table:table-cell office:value-type="float" office:value="0.680000007152557" calcext:value-type="float">
            <text:p>0.680000007152557</text:p>
          </table:table-cell>
          <table:table-cell office:value-type="float" office:value="0.637120306491852" calcext:value-type="float">
            <text:p>0.637120306491852</text:p>
          </table:table-cell>
          <table:table-cell table:style-name="ce1" office:value-type="string" calcext:value-type="string">
            <text:p>2025-11-18 12:02:20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2025-11-18 11:47:00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if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2025-11-18 11:47:00</text:p>
          </table:table-cell>
          <table:table-cell office:value-type="string" calcext:value-type="string">
            <text:p>2025-11-18 12:25:2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683302819728851" calcext:value-type="float">
            <text:p>0.683302819728851</text:p>
          </table:table-cell>
          <table:table-cell office:value-type="float" office:value="0.649999976158142" calcext:value-type="float">
            <text:p>0.649999976158142</text:p>
          </table:table-cell>
          <table:table-cell office:value-type="float" office:value="0.643542230129242" calcext:value-type="float">
            <text:p>0.643542230129242</text:p>
          </table:table-cell>
          <table:table-cell table:style-name="ce1" office:value-type="string" calcext:value-type="string">
            <text:p>2025-11-18 11:59:46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2025-11-18 11:47:00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if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2025-11-18 11:47:00</text:p>
          </table:table-cell>
          <table:table-cell office:value-type="string" calcext:value-type="string">
            <text:p>2025-11-18 12:25:2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686347365379334" calcext:value-type="float">
            <text:p>0.686347365379334</text:p>
          </table:table-cell>
          <table:table-cell office:value-type="float" office:value="0.670000016689301" calcext:value-type="float">
            <text:p>0.670000016689301</text:p>
          </table:table-cell>
          <table:table-cell office:value-type="float" office:value="0.650943577289581" calcext:value-type="float">
            <text:p>0.650943577289581</text:p>
          </table:table-cell>
          <table:table-cell table:style-name="ce1" office:value-type="string" calcext:value-type="string">
            <text:p>2025-11-18 12:12:31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2025-11-18 11:47:00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if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2025-11-18 11:47:00</text:p>
          </table:table-cell>
          <table:table-cell office:value-type="string" calcext:value-type="string">
            <text:p>2025-11-18 12:25:2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.68640661239624" calcext:value-type="float">
            <text:p>0.68640661239624</text:p>
          </table:table-cell>
          <table:table-cell office:value-type="float" office:value="0.654999971389771" calcext:value-type="float">
            <text:p>0.654999971389771</text:p>
          </table:table-cell>
          <table:table-cell office:value-type="float" office:value="0.656268537044525" calcext:value-type="float">
            <text:p>0.656268537044525</text:p>
          </table:table-cell>
          <table:table-cell table:style-name="ce1" office:value-type="string" calcext:value-type="string">
            <text:p>2025-11-18 12:25:22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2025-11-18 11:47:37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2025-11-18 11:47:37</text:p>
          </table:table-cell>
          <table:table-cell office:value-type="string" calcext:value-type="string">
            <text:p>2025-11-18 12:32:3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686532020568848" calcext:value-type="float">
            <text:p>0.686532020568848</text:p>
          </table:table-cell>
          <table:table-cell office:value-type="float" office:value="0.639999985694885" calcext:value-type="float">
            <text:p>0.639999985694885</text:p>
          </table:table-cell>
          <table:table-cell office:value-type="float" office:value="0.677105009555817" calcext:value-type="float">
            <text:p>0.677105009555817</text:p>
          </table:table-cell>
          <table:table-cell table:style-name="ce1" office:value-type="string" calcext:value-type="string">
            <text:p>2025-11-18 12:02:36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2025-11-18 11:47:37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2025-11-18 11:47:37</text:p>
          </table:table-cell>
          <table:table-cell office:value-type="string" calcext:value-type="string">
            <text:p>2025-11-18 12:32:3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.685298323631287" calcext:value-type="float">
            <text:p>0.685298323631287</text:p>
          </table:table-cell>
          <table:table-cell office:value-type="float" office:value="0.685000002384186" calcext:value-type="float">
            <text:p>0.685000002384186</text:p>
          </table:table-cell>
          <table:table-cell office:value-type="float" office:value="0.655565202236176" calcext:value-type="float">
            <text:p>0.655565202236176</text:p>
          </table:table-cell>
          <table:table-cell table:style-name="ce1" office:value-type="string" calcext:value-type="string">
            <text:p>2025-11-18 12:17:35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2025-11-18 11:47:37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2025-11-18 11:47:37</text:p>
          </table:table-cell>
          <table:table-cell office:value-type="string" calcext:value-type="string">
            <text:p>2025-11-18 12:32:3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0.683060586452484" calcext:value-type="float">
            <text:p>0.683060586452484</text:p>
          </table:table-cell>
          <table:table-cell office:value-type="float" office:value="0.589999973773956" calcext:value-type="float">
            <text:p>0.589999973773956</text:p>
          </table:table-cell>
          <table:table-cell office:value-type="float" office:value="0.682715892791748" calcext:value-type="float">
            <text:p>0.682715892791748</text:p>
          </table:table-cell>
          <table:table-cell table:style-name="ce1" office:value-type="string" calcext:value-type="string">
            <text:p>2025-11-18 12:32:34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2025-11-18 11:47:51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6" calcext:value-type="float">
            <text:p>6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2025-11-18 11:47:51</text:p>
          </table:table-cell>
          <table:table-cell office:value-type="string" calcext:value-type="string">
            <text:p>2025-11-18 12:16:3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90252959728241" calcext:value-type="float">
            <text:p>0.690252959728241</text:p>
          </table:table-cell>
          <table:table-cell office:value-type="float" office:value="0.665000021457672" calcext:value-type="float">
            <text:p>0.665000021457672</text:p>
          </table:table-cell>
          <table:table-cell office:value-type="float" office:value="0.65161806344986" calcext:value-type="float">
            <text:p>0.65161806344986</text:p>
          </table:table-cell>
          <table:table-cell table:style-name="ce1" office:value-type="string" calcext:value-type="string">
            <text:p>2025-11-18 11:57:23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2025-11-18 11:47:51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6" calcext:value-type="float">
            <text:p>6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2025-11-18 11:47:51</text:p>
          </table:table-cell>
          <table:table-cell office:value-type="string" calcext:value-type="string">
            <text:p>2025-11-18 12:16:3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692377805709839" calcext:value-type="float">
            <text:p>0.692377805709839</text:p>
          </table:table-cell>
          <table:table-cell office:value-type="float" office:value="0.660000026226044" calcext:value-type="float">
            <text:p>0.660000026226044</text:p>
          </table:table-cell>
          <table:table-cell office:value-type="float" office:value="0.656786739826202" calcext:value-type="float">
            <text:p>0.656786739826202</text:p>
          </table:table-cell>
          <table:table-cell table:style-name="ce1" office:value-type="string" calcext:value-type="string">
            <text:p>2025-11-18 12:06:58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2025-11-18 11:47:51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6" calcext:value-type="float">
            <text:p>6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2025-11-18 11:47:51</text:p>
          </table:table-cell>
          <table:table-cell office:value-type="string" calcext:value-type="string">
            <text:p>2025-11-18 12:16:3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.690070390701294" calcext:value-type="float">
            <text:p>0.690070390701294</text:p>
          </table:table-cell>
          <table:table-cell office:value-type="float" office:value="0.639999985694885" calcext:value-type="float">
            <text:p>0.639999985694885</text:p>
          </table:table-cell>
          <table:table-cell office:value-type="float" office:value="0.660207688808441" calcext:value-type="float">
            <text:p>0.660207688808441</text:p>
          </table:table-cell>
          <table:table-cell table:style-name="ce1" office:value-type="string" calcext:value-type="string">
            <text:p>2025-11-18 12:16:37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2025-11-18 12:02:27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ub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2025-11-18 12:02:27</text:p>
          </table:table-cell>
          <table:table-cell office:value-type="string" calcext:value-type="string">
            <text:p>2025-11-18 12:09:0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68324339389801" calcext:value-type="float">
            <text:p>0.68324339389801</text:p>
          </table:table-cell>
          <table:table-cell office:value-type="float" office:value="0.660000026226044" calcext:value-type="float">
            <text:p>0.660000026226044</text:p>
          </table:table-cell>
          <table:table-cell office:value-type="float" office:value="0.653078615665436" calcext:value-type="float">
            <text:p>0.653078615665436</text:p>
          </table:table-cell>
          <table:table-cell table:style-name="ce1" office:value-type="string" calcext:value-type="string">
            <text:p>2025-11-18 12:04:40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2025-11-18 12:02:27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ub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2025-11-18 12:02:27</text:p>
          </table:table-cell>
          <table:table-cell office:value-type="string" calcext:value-type="string">
            <text:p>2025-11-18 12:09:0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681138336658478" calcext:value-type="float">
            <text:p>0.681138336658478</text:p>
          </table:table-cell>
          <table:table-cell office:value-type="float" office:value="0.689999997615814" calcext:value-type="float">
            <text:p>0.689999997615814</text:p>
          </table:table-cell>
          <table:table-cell office:value-type="float" office:value="0.643415808677673" calcext:value-type="float">
            <text:p>0.643415808677673</text:p>
          </table:table-cell>
          <table:table-cell table:style-name="ce1" office:value-type="string" calcext:value-type="string">
            <text:p>2025-11-18 12:06:53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2025-11-18 12:02:27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ub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2025-11-18 12:02:27</text:p>
          </table:table-cell>
          <table:table-cell office:value-type="string" calcext:value-type="string">
            <text:p>2025-11-18 12:09:0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693764388561249" calcext:value-type="float">
            <text:p>0.693764388561249</text:p>
          </table:table-cell>
          <table:table-cell office:value-type="float" office:value="0.5" calcext:value-type="float">
            <text:p>0.5</text:p>
          </table:table-cell>
          <table:table-cell office:value-type="float" office:value="0.693318128585815" calcext:value-type="float">
            <text:p>0.693318128585815</text:p>
          </table:table-cell>
          <table:table-cell table:style-name="ce1" office:value-type="string" calcext:value-type="string">
            <text:p>2025-11-18 12:09:06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2025-11-18 12:09:13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ub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8" calcext:value-type="float">
            <text:p>8</text:p>
          </table:table-cell>
          <table:table-cell office:value-type="float" office:value="163" calcext:value-type="float">
            <text:p>163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2025-11-18 12:09:13</text:p>
          </table:table-cell>
          <table:table-cell office:value-type="string" calcext:value-type="string">
            <text:p>2025-11-18 12:22:1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.604141056537628" calcext:value-type="float">
            <text:p>0.604141056537628</text:p>
          </table:table-cell>
          <table:table-cell office:value-type="float" office:value="0.610000014305115" calcext:value-type="float">
            <text:p>0.610000014305115</text:p>
          </table:table-cell>
          <table:table-cell office:value-type="float" office:value="0.655963182449341" calcext:value-type="float">
            <text:p>0.655963182449341</text:p>
          </table:table-cell>
          <table:table-cell table:style-name="ce1" office:value-type="string" calcext:value-type="string">
            <text:p>2025-11-18 12:13:31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2025-11-18 12:09:13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ub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8" calcext:value-type="float">
            <text:p>8</text:p>
          </table:table-cell>
          <table:table-cell office:value-type="float" office:value="163" calcext:value-type="float">
            <text:p>163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2025-11-18 12:09:13</text:p>
          </table:table-cell>
          <table:table-cell office:value-type="string" calcext:value-type="string">
            <text:p>2025-11-18 12:22:1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0.604697406291962" calcext:value-type="float">
            <text:p>0.604697406291962</text:p>
          </table:table-cell>
          <table:table-cell office:value-type="float" office:value="0.680000007152557" calcext:value-type="float">
            <text:p>0.680000007152557</text:p>
          </table:table-cell>
          <table:table-cell office:value-type="float" office:value="0.598287582397461" calcext:value-type="float">
            <text:p>0.598287582397461</text:p>
          </table:table-cell>
          <table:table-cell table:style-name="ce1" office:value-type="string" calcext:value-type="string">
            <text:p>2025-11-18 12:17:51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2025-11-18 12:09:13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ub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8" calcext:value-type="float">
            <text:p>8</text:p>
          </table:table-cell>
          <table:table-cell office:value-type="float" office:value="163" calcext:value-type="float">
            <text:p>163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2025-11-18 12:09:13</text:p>
          </table:table-cell>
          <table:table-cell office:value-type="string" calcext:value-type="string">
            <text:p>2025-11-18 12:22:1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0.589129328727722" calcext:value-type="float">
            <text:p>0.589129328727722</text:p>
          </table:table-cell>
          <table:table-cell office:value-type="float" office:value="0.694999992847443" calcext:value-type="float">
            <text:p>0.694999992847443</text:p>
          </table:table-cell>
          <table:table-cell office:value-type="float" office:value="0.600884258747101" calcext:value-type="float">
            <text:p>0.600884258747101</text:p>
          </table:table-cell>
          <table:table-cell table:style-name="ce1" office:value-type="string" calcext:value-type="string">
            <text:p>2025-11-18 12:22:14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2025-11-18 12:10:45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o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2025-11-18 12:10:45</text:p>
          </table:table-cell>
          <table:table-cell office:value-type="string" calcext:value-type="string">
            <text:p>2025-11-18 12:18:1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.681372702121735" calcext:value-type="float">
            <text:p>0.681372702121735</text:p>
          </table:table-cell>
          <table:table-cell office:value-type="float" office:value="0.7049999833107" calcext:value-type="float">
            <text:p>0.7049999833107</text:p>
          </table:table-cell>
          <table:table-cell office:value-type="float" office:value="0.633826851844788" calcext:value-type="float">
            <text:p>0.633826851844788</text:p>
          </table:table-cell>
          <table:table-cell table:style-name="ce1" office:value-type="string" calcext:value-type="string">
            <text:p>2025-11-18 12:13:17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2025-11-18 12:10:45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o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2025-11-18 12:10:45</text:p>
          </table:table-cell>
          <table:table-cell office:value-type="string" calcext:value-type="string">
            <text:p>2025-11-18 12:18:1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680902004241943" calcext:value-type="float">
            <text:p>0.680902004241943</text:p>
          </table:table-cell>
          <table:table-cell office:value-type="float" office:value="0.634999990463257" calcext:value-type="float">
            <text:p>0.634999990463257</text:p>
          </table:table-cell>
          <table:table-cell office:value-type="float" office:value="0.653594434261322" calcext:value-type="float">
            <text:p>0.653594434261322</text:p>
          </table:table-cell>
          <table:table-cell table:style-name="ce1" office:value-type="string" calcext:value-type="string">
            <text:p>2025-11-18 12:15:47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2025-11-18 12:10:45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o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2025-11-18 12:10:45</text:p>
          </table:table-cell>
          <table:table-cell office:value-type="string" calcext:value-type="string">
            <text:p>2025-11-18 12:18:1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0.694567799568176" calcext:value-type="float">
            <text:p>0.694567799568176</text:p>
          </table:table-cell>
          <table:table-cell office:value-type="float" office:value="0.5" calcext:value-type="float">
            <text:p>0.5</text:p>
          </table:table-cell>
          <table:table-cell office:value-type="float" office:value="0.696094989776611" calcext:value-type="float">
            <text:p>0.696094989776611</text:p>
          </table:table-cell>
          <table:table-cell table:style-name="ce1" office:value-type="string" calcext:value-type="string">
            <text:p>2025-11-18 12:18:18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2025-11-18 12:16:43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2025-11-18 12:16:43</text:p>
          </table:table-cell>
          <table:table-cell office:value-type="string" calcext:value-type="string">
            <text:p>2025-11-18 12:48:3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0.690771281719208" calcext:value-type="float">
            <text:p>0.690771281719208</text:p>
          </table:table-cell>
          <table:table-cell office:value-type="float" office:value="0.605000019073486" calcext:value-type="float">
            <text:p>0.605000019073486</text:p>
          </table:table-cell>
          <table:table-cell office:value-type="float" office:value="0.653786718845367" calcext:value-type="float">
            <text:p>0.653786718845367</text:p>
          </table:table-cell>
          <table:table-cell table:style-name="ce1" office:value-type="string" calcext:value-type="string">
            <text:p>2025-11-18 12:28:36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2025-11-18 12:16:43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2025-11-18 12:16:43</text:p>
          </table:table-cell>
          <table:table-cell office:value-type="string" calcext:value-type="string">
            <text:p>2025-11-18 12:48:3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0.688258707523346" calcext:value-type="float">
            <text:p>0.688258707523346</text:p>
          </table:table-cell>
          <table:table-cell office:value-type="float" office:value="0.620000004768372" calcext:value-type="float">
            <text:p>0.620000004768372</text:p>
          </table:table-cell>
          <table:table-cell office:value-type="float" office:value="0.665539562702179" calcext:value-type="float">
            <text:p>0.665539562702179</text:p>
          </table:table-cell>
          <table:table-cell table:style-name="ce1" office:value-type="string" calcext:value-type="string">
            <text:p>2025-11-18 12:36:37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2025-11-18 12:16:43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2025-11-18 12:16:43</text:p>
          </table:table-cell>
          <table:table-cell office:value-type="string" calcext:value-type="string">
            <text:p>2025-11-18 12:48:3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0.684031784534454" calcext:value-type="float">
            <text:p>0.684031784534454</text:p>
          </table:table-cell>
          <table:table-cell office:value-type="float" office:value="0.634999990463257" calcext:value-type="float">
            <text:p>0.634999990463257</text:p>
          </table:table-cell>
          <table:table-cell office:value-type="float" office:value="0.64778482913971" calcext:value-type="float">
            <text:p>0.64778482913971</text:p>
          </table:table-cell>
          <table:table-cell table:style-name="ce1" office:value-type="string" calcext:value-type="string">
            <text:p>2025-11-18 12:48:36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2025-11-18 12:18:26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o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2025-11-18 12:18:26</text:p>
          </table:table-cell>
          <table:table-cell office:value-type="string" calcext:value-type="string">
            <text:p>2025-11-18 12:30:0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0.629330337047577" calcext:value-type="float">
            <text:p>0.629330337047577</text:p>
          </table:table-cell>
          <table:table-cell office:value-type="float" office:value="0.59500002861023" calcext:value-type="float">
            <text:p>0.59500002861023</text:p>
          </table:table-cell>
          <table:table-cell office:value-type="float" office:value="0.653434574604034" calcext:value-type="float">
            <text:p>0.653434574604034</text:p>
          </table:table-cell>
          <table:table-cell table:style-name="ce1" office:value-type="string" calcext:value-type="string">
            <text:p>2025-11-18 12:22:20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2025-11-18 12:18:26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o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2025-11-18 12:18:26</text:p>
          </table:table-cell>
          <table:table-cell office:value-type="string" calcext:value-type="string">
            <text:p>2025-11-18 12:30:0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0.624297559261322" calcext:value-type="float">
            <text:p>0.624297559261322</text:p>
          </table:table-cell>
          <table:table-cell office:value-type="float" office:value="0.649999976158142" calcext:value-type="float">
            <text:p>0.649999976158142</text:p>
          </table:table-cell>
          <table:table-cell office:value-type="float" office:value="0.609628558158875" calcext:value-type="float">
            <text:p>0.609628558158875</text:p>
          </table:table-cell>
          <table:table-cell table:style-name="ce1" office:value-type="string" calcext:value-type="string">
            <text:p>2025-11-18 12:26:13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2025-11-18 12:18:26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o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2025-11-18 12:18:26</text:p>
          </table:table-cell>
          <table:table-cell office:value-type="string" calcext:value-type="string">
            <text:p>2025-11-18 12:30:0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0.628254473209381" calcext:value-type="float">
            <text:p>0.628254473209381</text:p>
          </table:table-cell>
          <table:table-cell office:value-type="float" office:value="0.625" calcext:value-type="float">
            <text:p>0.625</text:p>
          </table:table-cell>
          <table:table-cell office:value-type="float" office:value="0.622892796993256" calcext:value-type="float">
            <text:p>0.622892796993256</text:p>
          </table:table-cell>
          <table:table-cell table:style-name="ce1" office:value-type="string" calcext:value-type="string">
            <text:p>2025-11-18 12:30:08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2025-11-18 12:22:21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ub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2025-11-18 12:22:21</text:p>
          </table:table-cell>
          <table:table-cell office:value-type="string" calcext:value-type="string">
            <text:p>2025-11-18 12:28:35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0.656424999237061" calcext:value-type="float">
            <text:p>0.656424999237061</text:p>
          </table:table-cell>
          <table:table-cell office:value-type="float" office:value="0.699999988079071" calcext:value-type="float">
            <text:p>0.699999988079071</text:p>
          </table:table-cell>
          <table:table-cell office:value-type="float" office:value="0.597513318061829" calcext:value-type="float">
            <text:p>0.597513318061829</text:p>
          </table:table-cell>
          <table:table-cell table:style-name="ce1" office:value-type="string" calcext:value-type="string">
            <text:p>2025-11-18 12:24:22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2025-11-18 12:22:21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ub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2025-11-18 12:22:21</text:p>
          </table:table-cell>
          <table:table-cell office:value-type="string" calcext:value-type="string">
            <text:p>2025-11-18 12:28:35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0.649785995483398" calcext:value-type="float">
            <text:p>0.649785995483398</text:p>
          </table:table-cell>
          <table:table-cell office:value-type="float" office:value="0.7049999833107" calcext:value-type="float">
            <text:p>0.7049999833107</text:p>
          </table:table-cell>
          <table:table-cell office:value-type="float" office:value="0.591579914093018" calcext:value-type="float">
            <text:p>0.591579914093018</text:p>
          </table:table-cell>
          <table:table-cell table:style-name="ce1" office:value-type="string" calcext:value-type="string">
            <text:p>2025-11-18 12:26:25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2025-11-18 12:22:21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ub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2025-11-18 12:22:21</text:p>
          </table:table-cell>
          <table:table-cell office:value-type="string" calcext:value-type="string">
            <text:p>2025-11-18 12:28:35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0.648835122585297" calcext:value-type="float">
            <text:p>0.648835122585297</text:p>
          </table:table-cell>
          <table:table-cell office:value-type="float" office:value="0.709999978542328" calcext:value-type="float">
            <text:p>0.709999978542328</text:p>
          </table:table-cell>
          <table:table-cell office:value-type="float" office:value="0.586787581443787" calcext:value-type="float">
            <text:p>0.586787581443787</text:p>
          </table:table-cell>
          <table:table-cell table:style-name="ce1" office:value-type="string" calcext:value-type="string">
            <text:p>2025-11-18 12:28:35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2025-11-18 12:22:23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d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3" calcext:value-type="float">
            <text:p>13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2025-11-18 12:22:23</text:p>
          </table:table-cell>
          <table:table-cell office:value-type="string" calcext:value-type="string">
            <text:p>2025-11-18 12:25:45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0.611058652400971" calcext:value-type="float">
            <text:p>0.611058652400971</text:p>
          </table:table-cell>
          <table:table-cell office:value-type="float" office:value="0.519999980926514" calcext:value-type="float">
            <text:p>0.519999980926514</text:p>
          </table:table-cell>
          <table:table-cell office:value-type="float" office:value="0.680218756198883" calcext:value-type="float">
            <text:p>0.680218756198883</text:p>
          </table:table-cell>
          <table:table-cell table:style-name="ce1" office:value-type="string" calcext:value-type="string">
            <text:p>2025-11-18 12:23:31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2025-11-18 12:22:23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d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3" calcext:value-type="float">
            <text:p>13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2025-11-18 12:22:23</text:p>
          </table:table-cell>
          <table:table-cell office:value-type="string" calcext:value-type="string">
            <text:p>2025-11-18 12:25:45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0.655171632766724" calcext:value-type="float">
            <text:p>0.655171632766724</text:p>
          </table:table-cell>
          <table:table-cell office:value-type="float" office:value="0.5" calcext:value-type="float">
            <text:p>0.5</text:p>
          </table:table-cell>
          <table:table-cell office:value-type="float" office:value="0.741751432418823" calcext:value-type="float">
            <text:p>0.741751432418823</text:p>
          </table:table-cell>
          <table:table-cell table:style-name="ce1" office:value-type="string" calcext:value-type="string">
            <text:p>2025-11-18 12:24:37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2025-11-18 12:22:23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d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3" calcext:value-type="float">
            <text:p>13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2025-11-18 12:22:23</text:p>
          </table:table-cell>
          <table:table-cell office:value-type="string" calcext:value-type="string">
            <text:p>2025-11-18 12:25:45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0.622209906578064" calcext:value-type="float">
            <text:p>0.622209906578064</text:p>
          </table:table-cell>
          <table:table-cell office:value-type="float" office:value="0.649999976158142" calcext:value-type="float">
            <text:p>0.649999976158142</text:p>
          </table:table-cell>
          <table:table-cell office:value-type="float" office:value="0.62645947933197" calcext:value-type="float">
            <text:p>0.62645947933197</text:p>
          </table:table-cell>
          <table:table-cell table:style-name="ce1" office:value-type="string" calcext:value-type="string">
            <text:p>2025-11-18 12:25:45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2025-11-18 12:25:2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if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2025-11-18 12:25:29</text:p>
          </table:table-cell>
          <table:table-cell office:value-type="string" calcext:value-type="string">
            <text:p>2025-11-18 12:32:0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0.685636937618256" calcext:value-type="float">
            <text:p>0.685636937618256</text:p>
          </table:table-cell>
          <table:table-cell office:value-type="float" office:value="0.665000021457672" calcext:value-type="float">
            <text:p>0.665000021457672</text:p>
          </table:table-cell>
          <table:table-cell office:value-type="float" office:value="0.659063041210175" calcext:value-type="float">
            <text:p>0.659063041210175</text:p>
          </table:table-cell>
          <table:table-cell table:style-name="ce1" office:value-type="string" calcext:value-type="string">
            <text:p>2025-11-18 12:27:41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2025-11-18 12:25:2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if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2025-11-18 12:25:29</text:p>
          </table:table-cell>
          <table:table-cell office:value-type="string" calcext:value-type="string">
            <text:p>2025-11-18 12:32:0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0.683568775653839" calcext:value-type="float">
            <text:p>0.683568775653839</text:p>
          </table:table-cell>
          <table:table-cell office:value-type="float" office:value="0.685000002384186" calcext:value-type="float">
            <text:p>0.685000002384186</text:p>
          </table:table-cell>
          <table:table-cell office:value-type="float" office:value="0.632689237594605" calcext:value-type="float">
            <text:p>0.632689237594605</text:p>
          </table:table-cell>
          <table:table-cell table:style-name="ce1" office:value-type="string" calcext:value-type="string">
            <text:p>2025-11-18 12:29:55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2025-11-18 12:25:2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if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2025-11-18 12:25:29</text:p>
          </table:table-cell>
          <table:table-cell office:value-type="string" calcext:value-type="string">
            <text:p>2025-11-18 12:32:0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0.693429172039032" calcext:value-type="float">
            <text:p>0.693429172039032</text:p>
          </table:table-cell>
          <table:table-cell office:value-type="float" office:value="0.5" calcext:value-type="float">
            <text:p>0.5</text:p>
          </table:table-cell>
          <table:table-cell office:value-type="float" office:value="0.69329035282135" calcext:value-type="float">
            <text:p>0.69329035282135</text:p>
          </table:table-cell>
          <table:table-cell table:style-name="ce1" office:value-type="string" calcext:value-type="string">
            <text:p>2025-11-18 12:32:08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2025-11-18 12:25:52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d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2025-11-18 12:25:52</text:p>
          </table:table-cell>
          <table:table-cell office:value-type="string" calcext:value-type="string">
            <text:p>2025-11-18 12:35:3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0.475897282361984" calcext:value-type="float">
            <text:p>0.475897282361984</text:p>
          </table:table-cell>
          <table:table-cell office:value-type="float" office:value="0.660000026226044" calcext:value-type="float">
            <text:p>0.660000026226044</text:p>
          </table:table-cell>
          <table:table-cell office:value-type="float" office:value="0.662793517112732" calcext:value-type="float">
            <text:p>0.662793517112732</text:p>
          </table:table-cell>
          <table:table-cell table:style-name="ce1" office:value-type="string" calcext:value-type="string">
            <text:p>2025-11-18 12:29:09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2025-11-18 12:25:52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d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2025-11-18 12:25:52</text:p>
          </table:table-cell>
          <table:table-cell office:value-type="string" calcext:value-type="string">
            <text:p>2025-11-18 12:35:3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0.475797653198242" calcext:value-type="float">
            <text:p>0.475797653198242</text:p>
          </table:table-cell>
          <table:table-cell office:value-type="float" office:value="0.709999978542328" calcext:value-type="float">
            <text:p>0.709999978542328</text:p>
          </table:table-cell>
          <table:table-cell office:value-type="float" office:value="0.602796196937561" calcext:value-type="float">
            <text:p>0.602796196937561</text:p>
          </table:table-cell>
          <table:table-cell table:style-name="ce1" office:value-type="string" calcext:value-type="string">
            <text:p>2025-11-18 12:32:24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2025-11-18 12:25:52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d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2025-11-18 12:25:52</text:p>
          </table:table-cell>
          <table:table-cell office:value-type="string" calcext:value-type="string">
            <text:p>2025-11-18 12:35:3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0.449141025543213" calcext:value-type="float">
            <text:p>0.449141025543213</text:p>
          </table:table-cell>
          <table:table-cell office:value-type="float" office:value="0.654999971389771" calcext:value-type="float">
            <text:p>0.654999971389771</text:p>
          </table:table-cell>
          <table:table-cell office:value-type="float" office:value="0.677403569221497" calcext:value-type="float">
            <text:p>0.677403569221497</text:p>
          </table:table-cell>
          <table:table-cell table:style-name="ce1" office:value-type="string" calcext:value-type="string">
            <text:p>2025-11-18 12:35:36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025-11-18 12:28:43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ub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6" calcext:value-type="float">
            <text:p>16</text:p>
          </table:table-cell>
          <table:table-cell office:value-type="float" office:value="164" calcext:value-type="float">
            <text:p>164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025-11-18 12:28:43</text:p>
          </table:table-cell>
          <table:table-cell office:value-type="string" calcext:value-type="string">
            <text:p>2025-11-18 12:31:4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0.689636409282684" calcext:value-type="float">
            <text:p>0.689636409282684</text:p>
          </table:table-cell>
          <table:table-cell office:value-type="float" office:value="0.625" calcext:value-type="float">
            <text:p>0.625</text:p>
          </table:table-cell>
          <table:table-cell office:value-type="float" office:value="0.685342490673065" calcext:value-type="float">
            <text:p>0.685342490673065</text:p>
          </table:table-cell>
          <table:table-cell table:style-name="ce1" office:value-type="string" calcext:value-type="string">
            <text:p>2025-11-18 12:29:41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025-11-18 12:28:43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ub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6" calcext:value-type="float">
            <text:p>16</text:p>
          </table:table-cell>
          <table:table-cell office:value-type="float" office:value="164" calcext:value-type="float">
            <text:p>164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025-11-18 12:28:43</text:p>
          </table:table-cell>
          <table:table-cell office:value-type="string" calcext:value-type="string">
            <text:p>2025-11-18 12:31:4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0.683151125907898" calcext:value-type="float">
            <text:p>0.683151125907898</text:p>
          </table:table-cell>
          <table:table-cell office:value-type="float" office:value="0.540000021457672" calcext:value-type="float">
            <text:p>0.540000021457672</text:p>
          </table:table-cell>
          <table:table-cell office:value-type="float" office:value="0.653624951839447" calcext:value-type="float">
            <text:p>0.653624951839447</text:p>
          </table:table-cell>
          <table:table-cell table:style-name="ce1" office:value-type="string" calcext:value-type="string">
            <text:p>2025-11-18 12:30:42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025-11-18 12:28:43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ub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6" calcext:value-type="float">
            <text:p>16</text:p>
          </table:table-cell>
          <table:table-cell office:value-type="float" office:value="164" calcext:value-type="float">
            <text:p>164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025-11-18 12:28:43</text:p>
          </table:table-cell>
          <table:table-cell office:value-type="string" calcext:value-type="string">
            <text:p>2025-11-18 12:31:4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0.671542048454285" calcext:value-type="float">
            <text:p>0.671542048454285</text:p>
          </table:table-cell>
          <table:table-cell office:value-type="float" office:value="0.709999978542328" calcext:value-type="float">
            <text:p>0.709999978542328</text:p>
          </table:table-cell>
          <table:table-cell office:value-type="float" office:value="0.62809956073761" calcext:value-type="float">
            <text:p>0.62809956073761</text:p>
          </table:table-cell>
          <table:table-cell table:style-name="ce1" office:value-type="string" calcext:value-type="string">
            <text:p>2025-11-18 12:31:42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2025-11-18 12:30:15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o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2025-11-18 12:30:15</text:p>
          </table:table-cell>
          <table:table-cell office:value-type="string" calcext:value-type="string">
            <text:p>2025-11-18 12:38:1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0.66592276096344" calcext:value-type="float">
            <text:p>0.66592276096344</text:p>
          </table:table-cell>
          <table:table-cell office:value-type="float" office:value="0.669999897480011" calcext:value-type="float">
            <text:p>0.669999897480011</text:p>
          </table:table-cell>
          <table:table-cell office:value-type="float" office:value="0.63811069726944" calcext:value-type="float">
            <text:p>0.63811069726944</text:p>
          </table:table-cell>
          <table:table-cell table:style-name="ce1" office:value-type="string" calcext:value-type="string">
            <text:p>2025-11-18 12:32:54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2025-11-18 12:30:15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o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2025-11-18 12:30:15</text:p>
          </table:table-cell>
          <table:table-cell office:value-type="string" calcext:value-type="string">
            <text:p>2025-11-18 12:38:1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0.657235443592072" calcext:value-type="float">
            <text:p>0.657235443592072</text:p>
          </table:table-cell>
          <table:table-cell office:value-type="float" office:value="0.660000026226044" calcext:value-type="float">
            <text:p>0.660000026226044</text:p>
          </table:table-cell>
          <table:table-cell office:value-type="float" office:value="0.636289715766907" calcext:value-type="float">
            <text:p>0.636289715766907</text:p>
          </table:table-cell>
          <table:table-cell table:style-name="ce1" office:value-type="string" calcext:value-type="string">
            <text:p>2025-11-18 12:35:34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2025-11-18 12:30:15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o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2025-11-18 12:30:15</text:p>
          </table:table-cell>
          <table:table-cell office:value-type="string" calcext:value-type="string">
            <text:p>2025-11-18 12:38:1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0.661582291126251" calcext:value-type="float">
            <text:p>0.661582291126251</text:p>
          </table:table-cell>
          <table:table-cell office:value-type="float" office:value="0.685000002384186" calcext:value-type="float">
            <text:p>0.685000002384186</text:p>
          </table:table-cell>
          <table:table-cell office:value-type="float" office:value="0.63047057390213" calcext:value-type="float">
            <text:p>0.63047057390213</text:p>
          </table:table-cell>
          <table:table-cell table:style-name="ce1" office:value-type="string" calcext:value-type="string">
            <text:p>2025-11-18 12:38:12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2025-11-18 12:32:16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if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2025-11-18 12:32:16</text:p>
          </table:table-cell>
          <table:table-cell office:value-type="string" calcext:value-type="string">
            <text:p>2025-11-18 12:43:4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0.665819346904755" calcext:value-type="float">
            <text:p>0.665819346904755</text:p>
          </table:table-cell>
          <table:table-cell office:value-type="float" office:value="0.714999973773956" calcext:value-type="float">
            <text:p>0.714999973773956</text:p>
          </table:table-cell>
          <table:table-cell office:value-type="float" office:value="0.609926283359528" calcext:value-type="float">
            <text:p>0.609926283359528</text:p>
          </table:table-cell>
          <table:table-cell table:style-name="ce1" office:value-type="string" calcext:value-type="string">
            <text:p>2025-11-18 12:36:04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2025-11-18 12:32:16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if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2025-11-18 12:32:16</text:p>
          </table:table-cell>
          <table:table-cell office:value-type="string" calcext:value-type="string">
            <text:p>2025-11-18 12:43:4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0.666165828704834" calcext:value-type="float">
            <text:p>0.666165828704834</text:p>
          </table:table-cell>
          <table:table-cell office:value-type="float" office:value="0.685000002384186" calcext:value-type="float">
            <text:p>0.685000002384186</text:p>
          </table:table-cell>
          <table:table-cell office:value-type="float" office:value="0.60534805059433" calcext:value-type="float">
            <text:p>0.60534805059433</text:p>
          </table:table-cell>
          <table:table-cell table:style-name="ce1" office:value-type="string" calcext:value-type="string">
            <text:p>2025-11-18 12:39:55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2025-11-18 12:32:16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if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2025-11-18 12:32:16</text:p>
          </table:table-cell>
          <table:table-cell office:value-type="string" calcext:value-type="string">
            <text:p>2025-11-18 12:43:4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0.668838620185852" calcext:value-type="float">
            <text:p>0.668838620185852</text:p>
          </table:table-cell>
          <table:table-cell office:value-type="float" office:value="0.685000002384186" calcext:value-type="float">
            <text:p>0.685000002384186</text:p>
          </table:table-cell>
          <table:table-cell office:value-type="float" office:value="0.629389822483063" calcext:value-type="float">
            <text:p>0.629389822483063</text:p>
          </table:table-cell>
          <table:table-cell table:style-name="ce1" office:value-type="string" calcext:value-type="string">
            <text:p>2025-11-18 12:43:44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2025-11-18 12:32:41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9" calcext:value-type="float">
            <text:p>19</text:p>
          </table:table-cell>
          <table:table-cell office:value-type="float" office:value="107" calcext:value-type="float">
            <text:p>107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2025-11-18 12:32:41</text:p>
          </table:table-cell>
          <table:table-cell office:value-type="string" calcext:value-type="string">
            <text:p>2025-11-18 12:43:4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0.688401997089386" calcext:value-type="float">
            <text:p>0.688401997089386</text:p>
          </table:table-cell>
          <table:table-cell office:value-type="float" office:value="0.72000002861023" calcext:value-type="float">
            <text:p>0.72000002861023</text:p>
          </table:table-cell>
          <table:table-cell office:value-type="float" office:value="0.650348663330078" calcext:value-type="float">
            <text:p>0.650348663330078</text:p>
          </table:table-cell>
          <table:table-cell table:style-name="ce1" office:value-type="string" calcext:value-type="string">
            <text:p>2025-11-18 12:36:21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2025-11-18 12:32:41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9" calcext:value-type="float">
            <text:p>19</text:p>
          </table:table-cell>
          <table:table-cell office:value-type="float" office:value="107" calcext:value-type="float">
            <text:p>107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2025-11-18 12:32:41</text:p>
          </table:table-cell>
          <table:table-cell office:value-type="string" calcext:value-type="string">
            <text:p>2025-11-18 12:43:4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0.685152411460877" calcext:value-type="float">
            <text:p>0.685152411460877</text:p>
          </table:table-cell>
          <table:table-cell office:value-type="float" office:value="0.72000002861023" calcext:value-type="float">
            <text:p>0.72000002861023</text:p>
          </table:table-cell>
          <table:table-cell office:value-type="float" office:value="0.623589992523193" calcext:value-type="float">
            <text:p>0.623589992523193</text:p>
          </table:table-cell>
          <table:table-cell table:style-name="ce1" office:value-type="string" calcext:value-type="string">
            <text:p>2025-11-18 12:40:01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2025-11-18 12:32:41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9" calcext:value-type="float">
            <text:p>19</text:p>
          </table:table-cell>
          <table:table-cell office:value-type="float" office:value="107" calcext:value-type="float">
            <text:p>107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2025-11-18 12:32:41</text:p>
          </table:table-cell>
          <table:table-cell office:value-type="string" calcext:value-type="string">
            <text:p>2025-11-18 12:43:4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0.689305365085602" calcext:value-type="float">
            <text:p>0.689305365085602</text:p>
          </table:table-cell>
          <table:table-cell office:value-type="float" office:value="0.670000016689301" calcext:value-type="float">
            <text:p>0.670000016689301</text:p>
          </table:table-cell>
          <table:table-cell office:value-type="float" office:value="0.658658623695374" calcext:value-type="float">
            <text:p>0.658658623695374</text:p>
          </table:table-cell>
          <table:table-cell table:style-name="ce1" office:value-type="string" calcext:value-type="string">
            <text:p>2025-11-18 12:43:41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2025-11-18 12:35:43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d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2025-11-18 12:35:43</text:p>
          </table:table-cell>
          <table:table-cell office:value-type="string" calcext:value-type="string">
            <text:p>2025-11-18 12:40:3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0.555761992931366" calcext:value-type="float">
            <text:p>0.555761992931366</text:p>
          </table:table-cell>
          <table:table-cell office:value-type="float" office:value="0.699999988079071" calcext:value-type="float">
            <text:p>0.699999988079071</text:p>
          </table:table-cell>
          <table:table-cell office:value-type="float" office:value="0.577611744403839" calcext:value-type="float">
            <text:p>0.577611744403839</text:p>
          </table:table-cell>
          <table:table-cell table:style-name="ce1" office:value-type="string" calcext:value-type="string">
            <text:p>2025-11-18 12:37:20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2025-11-18 12:35:43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d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2025-11-18 12:35:43</text:p>
          </table:table-cell>
          <table:table-cell office:value-type="string" calcext:value-type="string">
            <text:p>2025-11-18 12:40:3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0.549711465835571" calcext:value-type="float">
            <text:p>0.549711465835571</text:p>
          </table:table-cell>
          <table:table-cell office:value-type="float" office:value="0.714999973773956" calcext:value-type="float">
            <text:p>0.714999973773956</text:p>
          </table:table-cell>
          <table:table-cell office:value-type="float" office:value="0.580350995063782" calcext:value-type="float">
            <text:p>0.580350995063782</text:p>
          </table:table-cell>
          <table:table-cell table:style-name="ce1" office:value-type="string" calcext:value-type="string">
            <text:p>2025-11-18 12:38:58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2025-11-18 12:35:43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d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2025-11-18 12:35:43</text:p>
          </table:table-cell>
          <table:table-cell office:value-type="string" calcext:value-type="string">
            <text:p>2025-11-18 12:40:3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0.556911468505859" calcext:value-type="float">
            <text:p>0.556911468505859</text:p>
          </table:table-cell>
          <table:table-cell office:value-type="float" office:value="0.689999997615814" calcext:value-type="float">
            <text:p>0.689999997615814</text:p>
          </table:table-cell>
          <table:table-cell office:value-type="float" office:value="0.591008424758911" calcext:value-type="float">
            <text:p>0.591008424758911</text:p>
          </table:table-cell>
          <table:table-cell table:style-name="ce1" office:value-type="string" calcext:value-type="string">
            <text:p>2025-11-18 12:40:36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2025-11-18 12:38:1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o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2025-11-18 12:38:19</text:p>
          </table:table-cell>
          <table:table-cell office:value-type="string" calcext:value-type="string">
            <text:p>2025-11-18 12:44:1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0.686203479766846" calcext:value-type="float">
            <text:p>0.686203479766846</text:p>
          </table:table-cell>
          <table:table-cell office:value-type="float" office:value="0.649999976158142" calcext:value-type="float">
            <text:p>0.649999976158142</text:p>
          </table:table-cell>
          <table:table-cell office:value-type="float" office:value="0.657812118530273" calcext:value-type="float">
            <text:p>0.657812118530273</text:p>
          </table:table-cell>
          <table:table-cell table:style-name="ce1" office:value-type="string" calcext:value-type="string">
            <text:p>2025-11-18 12:40:18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2025-11-18 12:38:1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o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2025-11-18 12:38:19</text:p>
          </table:table-cell>
          <table:table-cell office:value-type="string" calcext:value-type="string">
            <text:p>2025-11-18 12:44:1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0.683026492595673" calcext:value-type="float">
            <text:p>0.683026492595673</text:p>
          </table:table-cell>
          <table:table-cell office:value-type="float" office:value="0.649999976158142" calcext:value-type="float">
            <text:p>0.649999976158142</text:p>
          </table:table-cell>
          <table:table-cell office:value-type="float" office:value="0.651038885116577" calcext:value-type="float">
            <text:p>0.651038885116577</text:p>
          </table:table-cell>
          <table:table-cell table:style-name="ce1" office:value-type="string" calcext:value-type="string">
            <text:p>2025-11-18 12:42:15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2025-11-18 12:38:1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om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2025-11-18 12:38:19</text:p>
          </table:table-cell>
          <table:table-cell office:value-type="string" calcext:value-type="string">
            <text:p>2025-11-18 12:44:1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0.68747752904892" calcext:value-type="float">
            <text:p>0.68747752904892</text:p>
          </table:table-cell>
          <table:table-cell office:value-type="float" office:value="0.670000016689301" calcext:value-type="float">
            <text:p>0.670000016689301</text:p>
          </table:table-cell>
          <table:table-cell office:value-type="float" office:value="0.634617209434509" calcext:value-type="float">
            <text:p>0.634617209434509</text:p>
          </table:table-cell>
          <table:table-cell table:style-name="ce1" office:value-type="string" calcext:value-type="string">
            <text:p>2025-11-18 12:44:14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2025-11-18 12:40:43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d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2" calcext:value-type="float">
            <text:p>22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2025-11-18 12:40:43</text:p>
          </table:table-cell>
          <table:table-cell office:value-type="string" calcext:value-type="string">
            <text:p>2025-11-18 12:42:4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0.478424787521362" calcext:value-type="float">
            <text:p>0.478424787521362</text:p>
          </table:table-cell>
          <table:table-cell office:value-type="float" office:value="0.709999978542328" calcext:value-type="float">
            <text:p>0.709999978542328</text:p>
          </table:table-cell>
          <table:table-cell office:value-type="float" office:value="0.62820839881897" calcext:value-type="float">
            <text:p>0.62820839881897</text:p>
          </table:table-cell>
          <table:table-cell table:style-name="ce1" office:value-type="string" calcext:value-type="string">
            <text:p>2025-11-18 12:41:24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2025-11-18 12:40:43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d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2" calcext:value-type="float">
            <text:p>22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2025-11-18 12:40:43</text:p>
          </table:table-cell>
          <table:table-cell office:value-type="string" calcext:value-type="string">
            <text:p>2025-11-18 12:42:4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0.469873011112213" calcext:value-type="float">
            <text:p>0.469873011112213</text:p>
          </table:table-cell>
          <table:table-cell office:value-type="float" office:value="0.540000021457672" calcext:value-type="float">
            <text:p>0.540000021457672</text:p>
          </table:table-cell>
          <table:table-cell office:value-type="float" office:value="0.722077608108521" calcext:value-type="float">
            <text:p>0.722077608108521</text:p>
          </table:table-cell>
          <table:table-cell table:style-name="ce1" office:value-type="string" calcext:value-type="string">
            <text:p>2025-11-18 12:42:06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2025-11-18 12:40:43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ed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2" calcext:value-type="float">
            <text:p>22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2025-11-18 12:40:43</text:p>
          </table:table-cell>
          <table:table-cell office:value-type="string" calcext:value-type="string">
            <text:p>2025-11-18 12:42:4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0.476391732692719" calcext:value-type="float">
            <text:p>0.476391732692719</text:p>
          </table:table-cell>
          <table:table-cell office:value-type="float" office:value="0.725000023841858" calcext:value-type="float">
            <text:p>0.725000023841858</text:p>
          </table:table-cell>
          <table:table-cell office:value-type="float" office:value="0.606945276260376" calcext:value-type="float">
            <text:p>0.606945276260376</text:p>
          </table:table-cell>
          <table:table-cell table:style-name="ce1" office:value-type="string" calcext:value-type="string">
            <text:p>2025-11-18 12:42:48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2025-11-18 12:43:48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3" calcext:value-type="float">
            <text:p>23</text:p>
          </table:table-cell>
          <table:table-cell office:value-type="float" office:value="108" calcext:value-type="float">
            <text:p>108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2025-11-18 12:43:48</text:p>
          </table:table-cell>
          <table:table-cell office:value-type="string" calcext:value-type="string">
            <text:p>2025-11-18 12:53:3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0.663574635982513" calcext:value-type="float">
            <text:p>0.663574635982513</text:p>
          </table:table-cell>
          <table:table-cell office:value-type="float" office:value="0.660000026226044" calcext:value-type="float">
            <text:p>0.660000026226044</text:p>
          </table:table-cell>
          <table:table-cell office:value-type="float" office:value="0.607531487941742" calcext:value-type="float">
            <text:p>0.607531487941742</text:p>
          </table:table-cell>
          <table:table-cell table:style-name="ce1" office:value-type="string" calcext:value-type="string">
            <text:p>2025-11-18 12:46:59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2025-11-18 12:43:48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3" calcext:value-type="float">
            <text:p>23</text:p>
          </table:table-cell>
          <table:table-cell office:value-type="float" office:value="108" calcext:value-type="float">
            <text:p>108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2025-11-18 12:43:48</text:p>
          </table:table-cell>
          <table:table-cell office:value-type="string" calcext:value-type="string">
            <text:p>2025-11-18 12:53:3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0.674333453178406" calcext:value-type="float">
            <text:p>0.674333453178406</text:p>
          </table:table-cell>
          <table:table-cell office:value-type="float" office:value="0.670000016689301" calcext:value-type="float">
            <text:p>0.670000016689301</text:p>
          </table:table-cell>
          <table:table-cell office:value-type="float" office:value="0.620808184146881" calcext:value-type="float">
            <text:p>0.620808184146881</text:p>
          </table:table-cell>
          <table:table-cell table:style-name="ce1" office:value-type="string" calcext:value-type="string">
            <text:p>2025-11-18 12:50:11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2025-11-18 12:43:48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3" calcext:value-type="float">
            <text:p>23</text:p>
          </table:table-cell>
          <table:table-cell office:value-type="float" office:value="108" calcext:value-type="float">
            <text:p>108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2025-11-18 12:43:48</text:p>
          </table:table-cell>
          <table:table-cell office:value-type="string" calcext:value-type="string">
            <text:p>2025-11-18 12:53:3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0.661592543125153" calcext:value-type="float">
            <text:p>0.661592543125153</text:p>
          </table:table-cell>
          <table:table-cell office:value-type="float" office:value="0.680000007152557" calcext:value-type="float">
            <text:p>0.680000007152557</text:p>
          </table:table-cell>
          <table:table-cell office:value-type="float" office:value="0.603886902332306" calcext:value-type="float">
            <text:p>0.603886902332306</text:p>
          </table:table-cell>
          <table:table-cell table:style-name="ce1" office:value-type="string" calcext:value-type="string">
            <text:p>2025-11-18 12:53:30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2025-11-18 12:43:52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if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2025-11-18 12:43:52</text:p>
          </table:table-cell>
          <table:table-cell office:value-type="string" calcext:value-type="string">
            <text:p>2025-11-18 12:52:1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0.656155526638031" calcext:value-type="float">
            <text:p>0.656155526638031</text:p>
          </table:table-cell>
          <table:table-cell office:value-type="float" office:value="0.699999988079071" calcext:value-type="float">
            <text:p>0.699999988079071</text:p>
          </table:table-cell>
          <table:table-cell office:value-type="float" office:value="0.57616513967514" calcext:value-type="float">
            <text:p>0.57616513967514</text:p>
          </table:table-cell>
          <table:table-cell table:style-name="ce1" office:value-type="string" calcext:value-type="string">
            <text:p>2025-11-18 12:46:37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2025-11-18 12:43:52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if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2025-11-18 12:43:52</text:p>
          </table:table-cell>
          <table:table-cell office:value-type="string" calcext:value-type="string">
            <text:p>2025-11-18 12:52:1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0.663293778896332" calcext:value-type="float">
            <text:p>0.663293778896332</text:p>
          </table:table-cell>
          <table:table-cell office:value-type="float" office:value="0.689999997615814" calcext:value-type="float">
            <text:p>0.689999997615814</text:p>
          </table:table-cell>
          <table:table-cell office:value-type="float" office:value="0.59136825799942" calcext:value-type="float">
            <text:p>0.59136825799942</text:p>
          </table:table-cell>
          <table:table-cell table:style-name="ce1" office:value-type="string" calcext:value-type="string">
            <text:p>2025-11-18 12:49:22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2025-11-18 12:43:52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if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2025-11-18 12:43:52</text:p>
          </table:table-cell>
          <table:table-cell office:value-type="string" calcext:value-type="string">
            <text:p>2025-11-18 12:52:1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float" office:value="0.658901810646057" calcext:value-type="float">
            <text:p>0.658901810646057</text:p>
          </table:table-cell>
          <table:table-cell office:value-type="float" office:value="0.709999978542328" calcext:value-type="float">
            <text:p>0.709999978542328</text:p>
          </table:table-cell>
          <table:table-cell office:value-type="float" office:value="0.588353753089905" calcext:value-type="float">
            <text:p>0.588353753089905</text:p>
          </table:table-cell>
          <table:table-cell table:style-name="ce1" office:value-type="string" calcext:value-type="string">
            <text:p>2025-11-18 12:52:12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2025-11-18 12:48:42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2025-11-18 12:48:42</text:p>
          </table:table-cell>
          <table:table-cell office:value-type="string" calcext:value-type="string">
            <text:p>2025-11-18 13:12:4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0.655314385890961" calcext:value-type="float">
            <text:p>0.655314385890961</text:p>
          </table:table-cell>
          <table:table-cell office:value-type="float" office:value="0.665000021457672" calcext:value-type="float">
            <text:p>0.665000021457672</text:p>
          </table:table-cell>
          <table:table-cell office:value-type="float" office:value="0.59880793094635" calcext:value-type="float">
            <text:p>0.59880793094635</text:p>
          </table:table-cell>
          <table:table-cell table:style-name="ce1" office:value-type="string" calcext:value-type="string">
            <text:p>2025-11-18 12:55:51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2025-11-18 12:48:42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2025-11-18 12:48:42</text:p>
          </table:table-cell>
          <table:table-cell office:value-type="string" calcext:value-type="string">
            <text:p>2025-11-18 13:12:4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float" office:value="0.660926818847656" calcext:value-type="float">
            <text:p>0.660926818847656</text:p>
          </table:table-cell>
          <table:table-cell office:value-type="float" office:value="0.699999988079071" calcext:value-type="float">
            <text:p>0.699999988079071</text:p>
          </table:table-cell>
          <table:table-cell office:value-type="float" office:value="0.593659043312073" calcext:value-type="float">
            <text:p>0.593659043312073</text:p>
          </table:table-cell>
          <table:table-cell table:style-name="ce1" office:value-type="string" calcext:value-type="string">
            <text:p>2025-11-18 13:05:42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2025-11-18 12:48:42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2025-11-18 12:48:42</text:p>
          </table:table-cell>
          <table:table-cell office:value-type="string" calcext:value-type="string">
            <text:p>2025-11-18 13:12:4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0.658475637435913" calcext:value-type="float">
            <text:p>0.658475637435913</text:p>
          </table:table-cell>
          <table:table-cell office:value-type="float" office:value="0.670000016689301" calcext:value-type="float">
            <text:p>0.670000016689301</text:p>
          </table:table-cell>
          <table:table-cell office:value-type="float" office:value="0.59650719165802" calcext:value-type="float">
            <text:p>0.59650719165802</text:p>
          </table:table-cell>
          <table:table-cell table:style-name="ce1" office:value-type="string" calcext:value-type="string">
            <text:p>2025-11-18 13:12:46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2025-11-18 12:52:1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if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2025-11-18 12:52:19</text:p>
          </table:table-cell>
          <table:table-cell office:value-type="string" calcext:value-type="string">
            <text:p>2025-11-18 12:57:1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0.678653299808502" calcext:value-type="float">
            <text:p>0.678653299808502</text:p>
          </table:table-cell>
          <table:table-cell office:value-type="float" office:value="0.665000021457672" calcext:value-type="float">
            <text:p>0.665000021457672</text:p>
          </table:table-cell>
          <table:table-cell office:value-type="float" office:value="0.630601644515991" calcext:value-type="float">
            <text:p>0.630601644515991</text:p>
          </table:table-cell>
          <table:table-cell table:style-name="ce1" office:value-type="string" calcext:value-type="string">
            <text:p>2025-11-18 12:53:54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2025-11-18 12:52:1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if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2025-11-18 12:52:19</text:p>
          </table:table-cell>
          <table:table-cell office:value-type="string" calcext:value-type="string">
            <text:p>2025-11-18 12:57:1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0.678006172180176" calcext:value-type="float">
            <text:p>0.678006172180176</text:p>
          </table:table-cell>
          <table:table-cell office:value-type="float" office:value="0.709999978542328" calcext:value-type="float">
            <text:p>0.709999978542328</text:p>
          </table:table-cell>
          <table:table-cell office:value-type="float" office:value="0.625571191310883" calcext:value-type="float">
            <text:p>0.625571191310883</text:p>
          </table:table-cell>
          <table:table-cell table:style-name="ce1" office:value-type="string" calcext:value-type="string">
            <text:p>2025-11-18 12:55:38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2025-11-18 12:52:1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if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2025-11-18 12:52:19</text:p>
          </table:table-cell>
          <table:table-cell office:value-type="string" calcext:value-type="string">
            <text:p>2025-11-18 12:57:1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0.677843570709229" calcext:value-type="float">
            <text:p>0.677843570709229</text:p>
          </table:table-cell>
          <table:table-cell office:value-type="float" office:value="0.709999978542328" calcext:value-type="float">
            <text:p>0.709999978542328</text:p>
          </table:table-cell>
          <table:table-cell office:value-type="float" office:value="0.619591176509857" calcext:value-type="float">
            <text:p>0.619591176509857</text:p>
          </table:table-cell>
          <table:table-cell table:style-name="ce1" office:value-type="string" calcext:value-type="string">
            <text:p>2025-11-18 12:57:14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2025-11-18 12:53:38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7" calcext:value-type="float">
            <text:p>27</text:p>
          </table:table-cell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2025-11-18 12:53:38</text:p>
          </table:table-cell>
          <table:table-cell office:value-type="string" calcext:value-type="string">
            <text:p>2025-11-18 13:04:2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0.666868150234222" calcext:value-type="float">
            <text:p>0.666868150234222</text:p>
          </table:table-cell>
          <table:table-cell office:value-type="float" office:value="0.660000026226044" calcext:value-type="float">
            <text:p>0.660000026226044</text:p>
          </table:table-cell>
          <table:table-cell office:value-type="float" office:value="0.614036321640015" calcext:value-type="float">
            <text:p>0.614036321640015</text:p>
          </table:table-cell>
          <table:table-cell table:style-name="ce1" office:value-type="string" calcext:value-type="string">
            <text:p>2025-11-18 12:57:12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2025-11-18 12:53:38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7" calcext:value-type="float">
            <text:p>27</text:p>
          </table:table-cell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2025-11-18 12:53:38</text:p>
          </table:table-cell>
          <table:table-cell office:value-type="string" calcext:value-type="string">
            <text:p>2025-11-18 13:04:2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0.670197606086731" calcext:value-type="float">
            <text:p>0.670197606086731</text:p>
          </table:table-cell>
          <table:table-cell office:value-type="float" office:value="0.729999899864197" calcext:value-type="float">
            <text:p>0.729999899864197</text:p>
          </table:table-cell>
          <table:table-cell office:value-type="float" office:value="0.592719614505768" calcext:value-type="float">
            <text:p>0.592719614505768</text:p>
          </table:table-cell>
          <table:table-cell table:style-name="ce1" office:value-type="string" calcext:value-type="string">
            <text:p>2025-11-18 13:00:46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2025-11-18 12:53:38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7" calcext:value-type="float">
            <text:p>27</text:p>
          </table:table-cell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2025-11-18 12:53:38</text:p>
          </table:table-cell>
          <table:table-cell office:value-type="string" calcext:value-type="string">
            <text:p>2025-11-18 13:04:2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float" office:value="0.673087000846863" calcext:value-type="float">
            <text:p>0.673087000846863</text:p>
          </table:table-cell>
          <table:table-cell office:value-type="float" office:value="0.7049999833107" calcext:value-type="float">
            <text:p>0.7049999833107</text:p>
          </table:table-cell>
          <table:table-cell office:value-type="float" office:value="0.591526985168457" calcext:value-type="float">
            <text:p>0.591526985168457</text:p>
          </table:table-cell>
          <table:table-cell table:style-name="ce1" office:value-type="string" calcext:value-type="string">
            <text:p>2025-11-18 13:04:20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2025-11-18 13:04:27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8" calcext:value-type="float">
            <text:p>28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2025-11-18 13:04:27</text:p>
          </table:table-cell>
          <table:table-cell office:value-type="string" calcext:value-type="string">
            <text:p>2025-11-18 13:07:53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0.686685621738434" calcext:value-type="float">
            <text:p>0.686685621738434</text:p>
          </table:table-cell>
          <table:table-cell office:value-type="float" office:value="0.709999978542328" calcext:value-type="float">
            <text:p>0.709999978542328</text:p>
          </table:table-cell>
          <table:table-cell office:value-type="float" office:value="0.610832512378693" calcext:value-type="float">
            <text:p>0.610832512378693</text:p>
          </table:table-cell>
          <table:table-cell table:style-name="ce1" office:value-type="string" calcext:value-type="string">
            <text:p>2025-11-18 13:05:35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2025-11-18 13:04:27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8" calcext:value-type="float">
            <text:p>28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2025-11-18 13:04:27</text:p>
          </table:table-cell>
          <table:table-cell office:value-type="string" calcext:value-type="string">
            <text:p>2025-11-18 13:07:53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0.677191853523254" calcext:value-type="float">
            <text:p>0.677191853523254</text:p>
          </table:table-cell>
          <table:table-cell office:value-type="float" office:value="0.675000011920929" calcext:value-type="float">
            <text:p>0.675000011920929</text:p>
          </table:table-cell>
          <table:table-cell office:value-type="float" office:value="0.617933988571167" calcext:value-type="float">
            <text:p>0.617933988571167</text:p>
          </table:table-cell>
          <table:table-cell table:style-name="ce1" office:value-type="string" calcext:value-type="string">
            <text:p>2025-11-18 13:06:44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2025-11-18 13:04:27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g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8" calcext:value-type="float">
            <text:p>28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2025-11-18 13:04:27</text:p>
          </table:table-cell>
          <table:table-cell office:value-type="string" calcext:value-type="string">
            <text:p>2025-11-18 13:07:53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float" office:value="0.676520228385925" calcext:value-type="float">
            <text:p>0.676520228385925</text:p>
          </table:table-cell>
          <table:table-cell office:value-type="float" office:value="0.694999992847443" calcext:value-type="float">
            <text:p>0.694999992847443</text:p>
          </table:table-cell>
          <table:table-cell office:value-type="float" office:value="0.622784912586212" calcext:value-type="float">
            <text:p>0.622784912586212</text:p>
          </table:table-cell>
          <table:table-cell table:style-name="ce1" office:value-type="string" calcext:value-type="string">
            <text:p>2025-11-18 13:07:53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2025-11-18 13:12:51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9" calcext:value-type="float">
            <text:p>29</text:p>
          </table:table-cell>
          <table:table-cell office:value-type="float" office:value="144" calcext:value-type="float">
            <text:p>144</text:p>
          </table:table-cell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2025-11-18 13:12:51</text:p>
          </table:table-cell>
          <table:table-cell office:value-type="string" calcext:value-type="string">
            <text:p>2025-11-18 13:31:1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0.659944355487824" calcext:value-type="float">
            <text:p>0.659944355487824</text:p>
          </table:table-cell>
          <table:table-cell office:value-type="float" office:value="0.714999973773956" calcext:value-type="float">
            <text:p>0.714999973773956</text:p>
          </table:table-cell>
          <table:table-cell office:value-type="float" office:value="0.611238121986389" calcext:value-type="float">
            <text:p>0.611238121986389</text:p>
          </table:table-cell>
          <table:table-cell table:style-name="ce1" office:value-type="string" calcext:value-type="string">
            <text:p>2025-11-18 13:18:43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2025-11-18 13:12:51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9" calcext:value-type="float">
            <text:p>29</text:p>
          </table:table-cell>
          <table:table-cell office:value-type="float" office:value="144" calcext:value-type="float">
            <text:p>144</text:p>
          </table:table-cell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2025-11-18 13:12:51</text:p>
          </table:table-cell>
          <table:table-cell office:value-type="string" calcext:value-type="string">
            <text:p>2025-11-18 13:31:1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office:value-type="float" office:value="0.647025465965271" calcext:value-type="float">
            <text:p>0.647025465965271</text:p>
          </table:table-cell>
          <table:table-cell office:value-type="float" office:value="0.675000011920929" calcext:value-type="float">
            <text:p>0.675000011920929</text:p>
          </table:table-cell>
          <table:table-cell office:value-type="float" office:value="0.600629508495331" calcext:value-type="float">
            <text:p>0.600629508495331</text:p>
          </table:table-cell>
          <table:table-cell table:style-name="ce1" office:value-type="string" calcext:value-type="string">
            <text:p>2025-11-18 13:25:15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2025-11-18 13:12:51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9" calcext:value-type="float">
            <text:p>29</text:p>
          </table:table-cell>
          <table:table-cell office:value-type="float" office:value="144" calcext:value-type="float">
            <text:p>144</text:p>
          </table:table-cell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2025-11-18 13:12:51</text:p>
          </table:table-cell>
          <table:table-cell office:value-type="string" calcext:value-type="string">
            <text:p>2025-11-18 13:31:1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office:value-type="float" office:value="0.661610960960388" calcext:value-type="float">
            <text:p>0.661610960960388</text:p>
          </table:table-cell>
          <table:table-cell office:value-type="float" office:value="0.714999973773956" calcext:value-type="float">
            <text:p>0.714999973773956</text:p>
          </table:table-cell>
          <table:table-cell office:value-type="float" office:value="0.599409520626068" calcext:value-type="float">
            <text:p>0.599409520626068</text:p>
          </table:table-cell>
          <table:table-cell table:style-name="ce1" office:value-type="string" calcext:value-type="string">
            <text:p>2025-11-18 13:31:12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2025-11-18 13:31:17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30" calcext:value-type="float">
            <text:p>30</text:p>
          </table:table-cell>
          <table:table-cell office:value-type="float" office:value="145" calcext:value-type="float">
            <text:p>145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2025-11-18 13:31:17</text:p>
          </table:table-cell>
          <table:table-cell office:value-type="string" calcext:value-type="string">
            <text:p>2025-11-18 13:53:43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0.664766430854797" calcext:value-type="float">
            <text:p>0.664766430854797</text:p>
          </table:table-cell>
          <table:table-cell office:value-type="float" office:value="0.699999988079071" calcext:value-type="float">
            <text:p>0.699999988079071</text:p>
          </table:table-cell>
          <table:table-cell office:value-type="float" office:value="0.5985546708107" calcext:value-type="float">
            <text:p>0.5985546708107</text:p>
          </table:table-cell>
          <table:table-cell table:style-name="ce1" office:value-type="string" calcext:value-type="string">
            <text:p>2025-11-18 13:39:27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2025-11-18 13:31:17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30" calcext:value-type="float">
            <text:p>30</text:p>
          </table:table-cell>
          <table:table-cell office:value-type="float" office:value="145" calcext:value-type="float">
            <text:p>145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2025-11-18 13:31:17</text:p>
          </table:table-cell>
          <table:table-cell office:value-type="string" calcext:value-type="string">
            <text:p>2025-11-18 13:53:43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office:value-type="float" office:value="30" calcext:value-type="float">
            <text:p>30</text:p>
          </table:table-cell>
          <table:table-cell office:value-type="float" office:value="0.666066110134125" calcext:value-type="float">
            <text:p>0.666066110134125</text:p>
          </table:table-cell>
          <table:table-cell office:value-type="float" office:value="0.685000002384186" calcext:value-type="float">
            <text:p>0.685000002384186</text:p>
          </table:table-cell>
          <table:table-cell office:value-type="float" office:value="0.629661619663239" calcext:value-type="float">
            <text:p>0.629661619663239</text:p>
          </table:table-cell>
          <table:table-cell table:style-name="ce1" office:value-type="string" calcext:value-type="string">
            <text:p>2025-11-18 13:48:59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2025-11-18 13:31:17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s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30" calcext:value-type="float">
            <text:p>30</text:p>
          </table:table-cell>
          <table:table-cell office:value-type="float" office:value="145" calcext:value-type="float">
            <text:p>145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2025-11-18 13:31:17</text:p>
          </table:table-cell>
          <table:table-cell office:value-type="string" calcext:value-type="string">
            <text:p>2025-11-18 13:53:43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0.675937652587891" calcext:value-type="float">
            <text:p>0.675937652587891</text:p>
          </table:table-cell>
          <table:table-cell office:value-type="float" office:value="0.680000007152557" calcext:value-type="float">
            <text:p>0.680000007152557</text:p>
          </table:table-cell>
          <table:table-cell office:value-type="float" office:value="0.629391431808472" calcext:value-type="float">
            <text:p>0.629391431808472</text:p>
          </table:table-cell>
          <table:table-cell table:style-name="ce1" office:value-type="string" calcext:value-type="string">
            <text:p>2025-11-18 13:53:43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2025-11-18 16:01:05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emb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2025-11-18 16:01:05</text:p>
          </table:table-cell>
          <table:table-cell office:value-type="string" calcext:value-type="string">
            <text:p>2025-11-18 16:17:3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91" calcext:value-type="float">
            <text:p>91</text:p>
          </table:table-cell>
          <table:table-cell office:value-type="float" office:value="31" calcext:value-type="float">
            <text:p>31</text:p>
          </table:table-cell>
          <table:table-cell office:value-type="float" office:value="0.699925661087036" calcext:value-type="float">
            <text:p>0.699925661087036</text:p>
          </table:table-cell>
          <table:table-cell office:value-type="float" office:value="0.665000021457672" calcext:value-type="float">
            <text:p>0.665000021457672</text:p>
          </table:table-cell>
          <table:table-cell office:value-type="float" office:value="0.616739809513092" calcext:value-type="float">
            <text:p>0.616739809513092</text:p>
          </table:table-cell>
          <table:table-cell table:style-name="ce1" office:value-type="string" calcext:value-type="string">
            <text:p>2025-11-18 16:06:36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2025-11-18 16:01:05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emb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2025-11-18 16:01:05</text:p>
          </table:table-cell>
          <table:table-cell office:value-type="string" calcext:value-type="string">
            <text:p>2025-11-18 16:17:3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92" calcext:value-type="float">
            <text:p>92</text:p>
          </table:table-cell>
          <table:table-cell office:value-type="float" office:value="31" calcext:value-type="float">
            <text:p>31</text:p>
          </table:table-cell>
          <table:table-cell office:value-type="float" office:value="0.694343090057373" calcext:value-type="float">
            <text:p>0.694343090057373</text:p>
          </table:table-cell>
          <table:table-cell office:value-type="float" office:value="0.7049999833107" calcext:value-type="float">
            <text:p>0.7049999833107</text:p>
          </table:table-cell>
          <table:table-cell office:value-type="float" office:value="0.648771226406097" calcext:value-type="float">
            <text:p>0.648771226406097</text:p>
          </table:table-cell>
          <table:table-cell table:style-name="ce1" office:value-type="string" calcext:value-type="string">
            <text:p>2025-11-18 16:12:07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2025-11-18 16:01:05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emb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2025-11-18 16:01:05</text:p>
          </table:table-cell>
          <table:table-cell office:value-type="string" calcext:value-type="string">
            <text:p>2025-11-18 16:17:3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0.68817412853241" calcext:value-type="float">
            <text:p>0.68817412853241</text:p>
          </table:table-cell>
          <table:table-cell office:value-type="float" office:value="0.625" calcext:value-type="float">
            <text:p>0.625</text:p>
          </table:table-cell>
          <table:table-cell office:value-type="float" office:value="0.659463047981262" calcext:value-type="float">
            <text:p>0.659463047981262</text:p>
          </table:table-cell>
          <table:table-cell table:style-name="ce1" office:value-type="string" calcext:value-type="string">
            <text:p>2025-11-18 16:17:39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2025-11-18 16:17:48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emb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2025-11-18 16:17:48</text:p>
          </table:table-cell>
          <table:table-cell office:value-type="string" calcext:value-type="string">
            <text:p>2025-11-18 16:20:5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94" calcext:value-type="float">
            <text:p>94</text:p>
          </table:table-cell>
          <table:table-cell office:value-type="float" office:value="32" calcext:value-type="float">
            <text:p>32</text:p>
          </table:table-cell>
          <table:table-cell office:value-type="float" office:value="0.673709154129028" calcext:value-type="float">
            <text:p>0.673709154129028</text:p>
          </table:table-cell>
          <table:table-cell office:value-type="float" office:value="0.725000023841858" calcext:value-type="float">
            <text:p>0.725000023841858</text:p>
          </table:table-cell>
          <table:table-cell office:value-type="float" office:value="0.6089026927948" calcext:value-type="float">
            <text:p>0.6089026927948</text:p>
          </table:table-cell>
          <table:table-cell table:style-name="ce1" office:value-type="string" calcext:value-type="string">
            <text:p>2025-11-18 16:18:52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2025-11-18 16:17:48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emb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2025-11-18 16:17:48</text:p>
          </table:table-cell>
          <table:table-cell office:value-type="string" calcext:value-type="string">
            <text:p>2025-11-18 16:20:5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0.677686512470245" calcext:value-type="float">
            <text:p>0.677686512470245</text:p>
          </table:table-cell>
          <table:table-cell office:value-type="float" office:value="0.740000009536743" calcext:value-type="float">
            <text:p>0.740000009536743</text:p>
          </table:table-cell>
          <table:table-cell office:value-type="float" office:value="0.623221158981323" calcext:value-type="float">
            <text:p>0.623221158981323</text:p>
          </table:table-cell>
          <table:table-cell table:style-name="ce1" office:value-type="string" calcext:value-type="string">
            <text:p>2025-11-18 16:19:55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2025-11-18 16:17:48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emb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2025-11-18 16:17:48</text:p>
          </table:table-cell>
          <table:table-cell office:value-type="string" calcext:value-type="string">
            <text:p>2025-11-18 16:20:5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0.683770179748535" calcext:value-type="float">
            <text:p>0.683770179748535</text:p>
          </table:table-cell>
          <table:table-cell office:value-type="float" office:value="0.685000002384186" calcext:value-type="float">
            <text:p>0.685000002384186</text:p>
          </table:table-cell>
          <table:table-cell office:value-type="float" office:value="0.64739191532135" calcext:value-type="float">
            <text:p>0.64739191532135</text:p>
          </table:table-cell>
          <table:table-cell table:style-name="ce1" office:value-type="string" calcext:value-type="string">
            <text:p>2025-11-18 16:20:59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2025-11-18 16:21:07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emb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2025-11-18 16:21:07</text:p>
          </table:table-cell>
          <table:table-cell office:value-type="string" calcext:value-type="string">
            <text:p>2025-11-18 16:23:0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office:value-type="float" office:value="0.673920094966888" calcext:value-type="float">
            <text:p>0.673920094966888</text:p>
          </table:table-cell>
          <table:table-cell office:value-type="float" office:value="0.699999988079071" calcext:value-type="float">
            <text:p>0.699999988079071</text:p>
          </table:table-cell>
          <table:table-cell office:value-type="float" office:value="0.620206713676453" calcext:value-type="float">
            <text:p>0.620206713676453</text:p>
          </table:table-cell>
          <table:table-cell table:style-name="ce1" office:value-type="string" calcext:value-type="string">
            <text:p>2025-11-18 16:21:45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2025-11-18 16:21:07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emb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2025-11-18 16:21:07</text:p>
          </table:table-cell>
          <table:table-cell office:value-type="string" calcext:value-type="string">
            <text:p>2025-11-18 16:23:0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98" calcext:value-type="float">
            <text:p>98</text:p>
          </table:table-cell>
          <table:table-cell office:value-type="float" office:value="33" calcext:value-type="float">
            <text:p>33</text:p>
          </table:table-cell>
          <table:table-cell office:value-type="float" office:value="0.676381528377533" calcext:value-type="float">
            <text:p>0.676381528377533</text:p>
          </table:table-cell>
          <table:table-cell office:value-type="float" office:value="0.685000002384186" calcext:value-type="float">
            <text:p>0.685000002384186</text:p>
          </table:table-cell>
          <table:table-cell office:value-type="float" office:value="0.612392485141754" calcext:value-type="float">
            <text:p>0.612392485141754</text:p>
          </table:table-cell>
          <table:table-cell table:style-name="ce1" office:value-type="string" calcext:value-type="string">
            <text:p>2025-11-18 16:22:24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2025-11-18 16:21:07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emb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2025-11-18 16:21:07</text:p>
          </table:table-cell>
          <table:table-cell office:value-type="string" calcext:value-type="string">
            <text:p>2025-11-18 16:23:0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99" calcext:value-type="float">
            <text:p>99</text:p>
          </table:table-cell>
          <table:table-cell office:value-type="float" office:value="33" calcext:value-type="float">
            <text:p>33</text:p>
          </table:table-cell>
          <table:table-cell office:value-type="float" office:value="0.672200262546539" calcext:value-type="float">
            <text:p>0.672200262546539</text:p>
          </table:table-cell>
          <table:table-cell office:value-type="float" office:value="0.644999980926514" calcext:value-type="float">
            <text:p>0.644999980926514</text:p>
          </table:table-cell>
          <table:table-cell office:value-type="float" office:value="0.642835557460785" calcext:value-type="float">
            <text:p>0.642835557460785</text:p>
          </table:table-cell>
          <table:table-cell table:style-name="ce1" office:value-type="string" calcext:value-type="string">
            <text:p>2025-11-18 16:23:02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2025-11-18 16:23:10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emb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2025-11-18 16:23:10</text:p>
          </table:table-cell>
          <table:table-cell office:value-type="string" calcext:value-type="string">
            <text:p>2025-11-18 16:26:03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0.648332118988037" calcext:value-type="float">
            <text:p>0.648332118988037</text:p>
          </table:table-cell>
          <table:table-cell office:value-type="float" office:value="0.675000011920929" calcext:value-type="float">
            <text:p>0.675000011920929</text:p>
          </table:table-cell>
          <table:table-cell office:value-type="float" office:value="0.590588688850403" calcext:value-type="float">
            <text:p>0.590588688850403</text:p>
          </table:table-cell>
          <table:table-cell table:style-name="ce1" office:value-type="string" calcext:value-type="string">
            <text:p>2025-11-18 16:24:07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2025-11-18 16:23:10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emb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2025-11-18 16:23:10</text:p>
          </table:table-cell>
          <table:table-cell office:value-type="string" calcext:value-type="string">
            <text:p>2025-11-18 16:26:03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1" calcext:value-type="float">
            <text:p>101</text:p>
          </table:table-cell>
          <table:table-cell office:value-type="float" office:value="34" calcext:value-type="float">
            <text:p>34</text:p>
          </table:table-cell>
          <table:table-cell office:value-type="float" office:value="0.658726096153259" calcext:value-type="float">
            <text:p>0.658726096153259</text:p>
          </table:table-cell>
          <table:table-cell office:value-type="float" office:value="0.7049999833107" calcext:value-type="float">
            <text:p>0.7049999833107</text:p>
          </table:table-cell>
          <table:table-cell office:value-type="float" office:value="0.59799736738205" calcext:value-type="float">
            <text:p>0.59799736738205</text:p>
          </table:table-cell>
          <table:table-cell table:style-name="ce1" office:value-type="string" calcext:value-type="string">
            <text:p>2025-11-18 16:25:05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2025-11-18 16:23:10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emb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2025-11-18 16:23:10</text:p>
          </table:table-cell>
          <table:table-cell office:value-type="string" calcext:value-type="string">
            <text:p>2025-11-18 16:26:03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2" calcext:value-type="float">
            <text:p>102</text:p>
          </table:table-cell>
          <table:table-cell office:value-type="float" office:value="34" calcext:value-type="float">
            <text:p>34</text:p>
          </table:table-cell>
          <table:table-cell office:value-type="float" office:value="0.657201588153839" calcext:value-type="float">
            <text:p>0.657201588153839</text:p>
          </table:table-cell>
          <table:table-cell office:value-type="float" office:value="0.689999997615814" calcext:value-type="float">
            <text:p>0.689999997615814</text:p>
          </table:table-cell>
          <table:table-cell office:value-type="float" office:value="0.589619517326355" calcext:value-type="float">
            <text:p>0.589619517326355</text:p>
          </table:table-cell>
          <table:table-cell table:style-name="ce1" office:value-type="string" calcext:value-type="string">
            <text:p>2025-11-18 16:26:03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2025-11-18 16:26:0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emb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2025-11-18 16:26:09</text:p>
          </table:table-cell>
          <table:table-cell office:value-type="string" calcext:value-type="string">
            <text:p>2025-11-18 16:27:1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3" calcext:value-type="float">
            <text:p>103</text:p>
          </table:table-cell>
          <table:table-cell office:value-type="float" office:value="35" calcext:value-type="float">
            <text:p>35</text:p>
          </table:table-cell>
          <table:table-cell office:value-type="float" office:value="0.681049406528473" calcext:value-type="float">
            <text:p>0.681049406528473</text:p>
          </table:table-cell>
          <table:table-cell office:value-type="float" office:value="0.709999978542328" calcext:value-type="float">
            <text:p>0.709999978542328</text:p>
          </table:table-cell>
          <table:table-cell office:value-type="float" office:value="0.632570564746857" calcext:value-type="float">
            <text:p>0.632570564746857</text:p>
          </table:table-cell>
          <table:table-cell table:style-name="ce1" office:value-type="string" calcext:value-type="string">
            <text:p>2025-11-18 16:26:30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2025-11-18 16:26:0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emb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2025-11-18 16:26:09</text:p>
          </table:table-cell>
          <table:table-cell office:value-type="string" calcext:value-type="string">
            <text:p>2025-11-18 16:27:1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4" calcext:value-type="float">
            <text:p>104</text:p>
          </table:table-cell>
          <table:table-cell office:value-type="float" office:value="35" calcext:value-type="float">
            <text:p>35</text:p>
          </table:table-cell>
          <table:table-cell office:value-type="float" office:value="0.691931188106537" calcext:value-type="float">
            <text:p>0.691931188106537</text:p>
          </table:table-cell>
          <table:table-cell office:value-type="float" office:value="0.644999980926514" calcext:value-type="float">
            <text:p>0.644999980926514</text:p>
          </table:table-cell>
          <table:table-cell office:value-type="float" office:value="0.662485599517822" calcext:value-type="float">
            <text:p>0.662485599517822</text:p>
          </table:table-cell>
          <table:table-cell table:style-name="ce1" office:value-type="string" calcext:value-type="string">
            <text:p>2025-11-18 16:26:50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4_experiments</text:p>
          </table:table-cell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2025-11-18 16:26:09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 office:value-type="string" calcext:value-type="string">
            <text:p>emb_mixu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2025-11-18 16:26:09</text:p>
          </table:table-cell>
          <table:table-cell office:value-type="string" calcext:value-type="string">
            <text:p>2025-11-18 16:27:1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0.680766642093658" calcext:value-type="float">
            <text:p>0.680766642093658</text:p>
          </table:table-cell>
          <table:table-cell office:value-type="float" office:value="0.680000007152557" calcext:value-type="float">
            <text:p>0.680000007152557</text:p>
          </table:table-cell>
          <table:table-cell office:value-type="float" office:value="0.632486820220947" calcext:value-type="float">
            <text:p>0.632486820220947</text:p>
          </table:table-cell>
          <table:table-cell table:style-name="ce1" office:value-type="string" calcext:value-type="string">
            <text:p>2025-11-18 16:27:10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5_experiment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025-11-18 11:52:04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025-11-18 11:52:04</text:p>
          </table:table-cell>
          <table:table-cell office:value-type="string" calcext:value-type="string">
            <text:p>2025-11-18 12:14:2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office:value-type="float" office:value="0.691270589828491" calcext:value-type="float">
            <text:p>0.691270589828491</text:p>
          </table:table-cell>
          <table:table-cell office:value-type="float" office:value="0.7049999833107" calcext:value-type="float">
            <text:p>0.7049999833107</text:p>
          </table:table-cell>
          <table:table-cell office:value-type="float" office:value="0.63381040096283" calcext:value-type="float">
            <text:p>0.63381040096283</text:p>
          </table:table-cell>
          <table:table-cell table:style-name="ce1" office:value-type="string" calcext:value-type="string">
            <text:p>2025-11-18 11:59:30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5_experiment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025-11-18 11:52:04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025-11-18 11:52:04</text:p>
          </table:table-cell>
          <table:table-cell office:value-type="string" calcext:value-type="string">
            <text:p>2025-11-18 12:14:2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91434800624847" calcext:value-type="float">
            <text:p>0.691434800624847</text:p>
          </table:table-cell>
          <table:table-cell office:value-type="float" office:value="0.680000007152557" calcext:value-type="float">
            <text:p>0.680000007152557</text:p>
          </table:table-cell>
          <table:table-cell office:value-type="float" office:value="0.645425498485565" calcext:value-type="float">
            <text:p>0.645425498485565</text:p>
          </table:table-cell>
          <table:table-cell table:style-name="ce1" office:value-type="string" calcext:value-type="string">
            <text:p>2025-11-18 12:06:54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5_experiment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025-11-18 11:52:04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025-11-18 11:52:04</text:p>
          </table:table-cell>
          <table:table-cell office:value-type="string" calcext:value-type="string">
            <text:p>2025-11-18 12:14:2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74460768699646" calcext:value-type="float">
            <text:p>0.674460768699646</text:p>
          </table:table-cell>
          <table:table-cell office:value-type="float" office:value="0.680000007152557" calcext:value-type="float">
            <text:p>0.680000007152557</text:p>
          </table:table-cell>
          <table:table-cell office:value-type="float" office:value="0.634677529335022" calcext:value-type="float">
            <text:p>0.634677529335022</text:p>
          </table:table-cell>
          <table:table-cell table:style-name="ce1" office:value-type="string" calcext:value-type="string">
            <text:p>2025-11-18 12:14:21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5_experiments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2025-11-18 12:15:28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2025-11-18 12:15:28</text:p>
          </table:table-cell>
          <table:table-cell office:value-type="string" calcext:value-type="string">
            <text:p>2025-11-18 12:18:1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64795219898224" calcext:value-type="float">
            <text:p>0.664795219898224</text:p>
          </table:table-cell>
          <table:table-cell office:value-type="float" office:value="0.709999978542328" calcext:value-type="float">
            <text:p>0.709999978542328</text:p>
          </table:table-cell>
          <table:table-cell office:value-type="float" office:value="0.592347919940949" calcext:value-type="float">
            <text:p>0.592347919940949</text:p>
          </table:table-cell>
          <table:table-cell table:style-name="ce1" office:value-type="string" calcext:value-type="string">
            <text:p>2025-11-18 12:16:23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5_experiments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2025-11-18 12:15:28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2025-11-18 12:15:28</text:p>
          </table:table-cell>
          <table:table-cell office:value-type="string" calcext:value-type="string">
            <text:p>2025-11-18 12:18:1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676646947860718" calcext:value-type="float">
            <text:p>0.676646947860718</text:p>
          </table:table-cell>
          <table:table-cell office:value-type="float" office:value="0.649999976158142" calcext:value-type="float">
            <text:p>0.649999976158142</text:p>
          </table:table-cell>
          <table:table-cell office:value-type="float" office:value="0.617146193981171" calcext:value-type="float">
            <text:p>0.617146193981171</text:p>
          </table:table-cell>
          <table:table-cell table:style-name="ce1" office:value-type="string" calcext:value-type="string">
            <text:p>2025-11-18 12:17:19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5_experiments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2025-11-18 12:15:28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2025-11-18 12:15:28</text:p>
          </table:table-cell>
          <table:table-cell office:value-type="string" calcext:value-type="string">
            <text:p>2025-11-18 12:18:1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674814999103546" calcext:value-type="float">
            <text:p>0.674814999103546</text:p>
          </table:table-cell>
          <table:table-cell office:value-type="float" office:value="0.694999992847443" calcext:value-type="float">
            <text:p>0.694999992847443</text:p>
          </table:table-cell>
          <table:table-cell office:value-type="float" office:value="0.630122363567352" calcext:value-type="float">
            <text:p>0.630122363567352</text:p>
          </table:table-cell>
          <table:table-cell table:style-name="ce1" office:value-type="string" calcext:value-type="string">
            <text:p>2025-11-18 12:18:14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5_experiments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025-11-18 12:19:21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025-11-18 12:19:21</text:p>
          </table:table-cell>
          <table:table-cell office:value-type="string" calcext:value-type="string">
            <text:p>2025-11-18 12:24:4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611865401268005" calcext:value-type="float">
            <text:p>0.611865401268005</text:p>
          </table:table-cell>
          <table:table-cell office:value-type="float" office:value="0.5" calcext:value-type="float">
            <text:p>0.5</text:p>
          </table:table-cell>
          <table:table-cell office:value-type="float" office:value="1.04032647609711" calcext:value-type="float">
            <text:p>1.04032647609711</text:p>
          </table:table-cell>
          <table:table-cell table:style-name="ce1" office:value-type="string" calcext:value-type="string">
            <text:p>2025-11-18 12:21:08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5_experiments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025-11-18 12:19:21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025-11-18 12:19:21</text:p>
          </table:table-cell>
          <table:table-cell office:value-type="string" calcext:value-type="string">
            <text:p>2025-11-18 12:24:4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58843594789505" calcext:value-type="float">
            <text:p>0.58843594789505</text:p>
          </table:table-cell>
          <table:table-cell office:value-type="float" office:value="0.660000026226044" calcext:value-type="float">
            <text:p>0.660000026226044</text:p>
          </table:table-cell>
          <table:table-cell office:value-type="float" office:value="0.619768857955933" calcext:value-type="float">
            <text:p>0.619768857955933</text:p>
          </table:table-cell>
          <table:table-cell table:style-name="ce1" office:value-type="string" calcext:value-type="string">
            <text:p>2025-11-18 12:22:55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5_experiments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025-11-18 12:19:21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025-11-18 12:19:21</text:p>
          </table:table-cell>
          <table:table-cell office:value-type="string" calcext:value-type="string">
            <text:p>2025-11-18 12:24:4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585113108158112" calcext:value-type="float">
            <text:p>0.585113108158112</text:p>
          </table:table-cell>
          <table:table-cell office:value-type="float" office:value="0.665000021457672" calcext:value-type="float">
            <text:p>0.665000021457672</text:p>
          </table:table-cell>
          <table:table-cell office:value-type="float" office:value="0.629899799823761" calcext:value-type="float">
            <text:p>0.629899799823761</text:p>
          </table:table-cell>
          <table:table-cell table:style-name="ce1" office:value-type="string" calcext:value-type="string">
            <text:p>2025-11-18 12:24:41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5_experiments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2025-11-18 12:25:48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2025-11-18 12:25:48</text:p>
          </table:table-cell>
          <table:table-cell office:value-type="string" calcext:value-type="string">
            <text:p>2025-11-18 12:28:4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62452906370163" calcext:value-type="float">
            <text:p>0.62452906370163</text:p>
          </table:table-cell>
          <table:table-cell office:value-type="float" office:value="0.709999978542328" calcext:value-type="float">
            <text:p>0.709999978542328</text:p>
          </table:table-cell>
          <table:table-cell office:value-type="float" office:value="0.576831519603729" calcext:value-type="float">
            <text:p>0.576831519603729</text:p>
          </table:table-cell>
          <table:table-cell table:style-name="ce1" office:value-type="string" calcext:value-type="string">
            <text:p>2025-11-18 12:26:45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5_experiments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2025-11-18 12:25:48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2025-11-18 12:25:48</text:p>
          </table:table-cell>
          <table:table-cell office:value-type="string" calcext:value-type="string">
            <text:p>2025-11-18 12:28:4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.63465029001236" calcext:value-type="float">
            <text:p>0.63465029001236</text:p>
          </table:table-cell>
          <table:table-cell office:value-type="float" office:value="0.685000002384186" calcext:value-type="float">
            <text:p>0.685000002384186</text:p>
          </table:table-cell>
          <table:table-cell office:value-type="float" office:value="0.587338268756867" calcext:value-type="float">
            <text:p>0.587338268756867</text:p>
          </table:table-cell>
          <table:table-cell table:style-name="ce1" office:value-type="string" calcext:value-type="string">
            <text:p>2025-11-18 12:27:41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5_experiments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2025-11-18 12:25:48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2025-11-18 12:25:48</text:p>
          </table:table-cell>
          <table:table-cell office:value-type="string" calcext:value-type="string">
            <text:p>2025-11-18 12:28:4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636855781078339" calcext:value-type="float">
            <text:p>0.636855781078339</text:p>
          </table:table-cell>
          <table:table-cell office:value-type="float" office:value="0.654999971389771" calcext:value-type="float">
            <text:p>0.654999971389771</text:p>
          </table:table-cell>
          <table:table-cell office:value-type="float" office:value="0.588056445121765" calcext:value-type="float">
            <text:p>0.588056445121765</text:p>
          </table:table-cell>
          <table:table-cell table:style-name="ce1" office:value-type="string" calcext:value-type="string">
            <text:p>2025-11-18 12:28:40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5_experiments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2025-11-18 12:29:47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2025-11-18 12:29:47</text:p>
          </table:table-cell>
          <table:table-cell office:value-type="string" calcext:value-type="string">
            <text:p>2025-11-18 12:33:1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655586779117584" calcext:value-type="float">
            <text:p>0.655586779117584</text:p>
          </table:table-cell>
          <table:table-cell office:value-type="float" office:value="0.685000002384186" calcext:value-type="float">
            <text:p>0.685000002384186</text:p>
          </table:table-cell>
          <table:table-cell office:value-type="float" office:value="0.608496487140656" calcext:value-type="float">
            <text:p>0.608496487140656</text:p>
          </table:table-cell>
          <table:table-cell table:style-name="ce1" office:value-type="string" calcext:value-type="string">
            <text:p>2025-11-18 12:30:57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5_experiments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2025-11-18 12:29:47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2025-11-18 12:29:47</text:p>
          </table:table-cell>
          <table:table-cell office:value-type="string" calcext:value-type="string">
            <text:p>2025-11-18 12:33:1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.665162444114685" calcext:value-type="float">
            <text:p>0.665162444114685</text:p>
          </table:table-cell>
          <table:table-cell office:value-type="float" office:value="0.694999992847443" calcext:value-type="float">
            <text:p>0.694999992847443</text:p>
          </table:table-cell>
          <table:table-cell office:value-type="float" office:value="0.613108336925507" calcext:value-type="float">
            <text:p>0.613108336925507</text:p>
          </table:table-cell>
          <table:table-cell table:style-name="ce1" office:value-type="string" calcext:value-type="string">
            <text:p>2025-11-18 12:32:06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2025_11_5_experiments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2025-11-18 12:29:47</text:p>
          </table:table-cell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IMDB-BI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1d15f7664af776f09281c5041b5072cff833307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2025-11-18 12:29:47</text:p>
          </table:table-cell>
          <table:table-cell office:value-type="string" calcext:value-type="string">
            <text:p>2025-11-18 12:33:1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648339927196503" calcext:value-type="float">
            <text:p>0.648339927196503</text:p>
          </table:table-cell>
          <table:table-cell office:value-type="float" office:value="0.644999980926514" calcext:value-type="float">
            <text:p>0.644999980926514</text:p>
          </table:table-cell>
          <table:table-cell office:value-type="float" office:value="0.612558126449585" calcext:value-type="float">
            <text:p>0.612558126449585</text:p>
          </table:table-cell>
          <table:table-cell table:style-name="ce1" office:value-type="string" calcext:value-type="string">
            <text:p>2025-11-18 12:33:17</text:p>
          </table:table-cell>
          <table:table-cell/>
        </table:table-row>
        <table:table-row table:style-name="ro1" table:number-rows-repeated="614">
          <table:table-cell table:number-columns-repeated="34"/>
        </table:table-row>
        <table:table-row table:style-name="ro1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3">00/00/0000</text:date>, <text:time style:data-style-name="N2" text:time-value="09:51:52.038028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4T10:23:52.882950600</meta:creation-date>
    <dc:date>2026-07-03T09:52:01.116451200</dc:date>
    <meta:editing-duration>PT6M11S</meta:editing-duration>
    <meta:editing-cycles>7</meta:editing-cycles>
    <meta:generator>LibreOffice/26.2.4.2$Windows_X86_64 LibreOffice_project/0229ac93fcf0d7cbc6376066c6f35021cef002dc</meta:generator>
    <meta:document-statistic meta:table-count="1" meta:cell-count="10068" meta:object-count="0"/>
  </office:meta>
</office:document-meta>
</file>